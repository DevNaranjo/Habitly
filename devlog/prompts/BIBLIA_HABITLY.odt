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Google Sans"/>
    </style:style>
    <style:style style:name="P2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3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5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/>
    </style:style>
    <style:style style:name="P6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7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/>
    </style:style>
    <style:style style:name="P8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9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0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1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/>
    </style:style>
    <style:style style:name="P12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3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4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1. Visión General del Proyecto</text:h>
      <text:list text:style-name="L1">
        <text:list-item>
          <text:p text:style-name="P2"><text:span text:style-name="T1">Nombre Oficial:</text:span> Habitly</text:p>
        </text:list-item>
        <text:list-item>
          <text:p text:style-name="P2"><text:span text:style-name="T1">Subtítulo Técnico:</text:span> Sistema de Gestión Inmobiliaria en Java</text:p>
        </text:list-item>
        <text:list-item>
          <text:p text:style-name="P2"><text:span text:style-name="T1">Definición del Producto:</text:span> Habitly es un sistema modular de gestión inmobiliaria, actualmente desarrollado en Java y operado por consola. Funciona como el embrión de un ERP inmobiliario simplificado, diseñado para administrar inmuebles, alquileres, pagos y actualizaciones económicas.</text:p>
        </text:list-item>
        <text:list-item>
          <text:p text:style-name="P2"><text:span text:style-name="T1">Público Objetivo Futuro:</text:span> Pequeños gestores inmobiliarios, propietarios con múltiples viviendas e inversores que requieran control centralizado de sus activos.</text:p>
        </text:list-item>
      </text:list>
      <text:h text:style-name="P3" text:outline-level="2">2. Filosofía y Estado de Desarrollo</text:h>
      <text:p text:style-name="P4"><text:bookmark text:name="p-rc_e3605691f186e390-69"/>El proyecto se encuentra en <text:span text:style-name="T1">Fase 0: Estado Actual (BETA Funcional)</text:span>. El objetivo primordial no es reescribir el sistema, sino consolidar la base funcional existente.</text:p>
      <text:list text:style-name="L2">
        <text:list-item>
          <text:p text:style-name="P5">Reglas de Oro del Desarrollo:</text:p>
          <text:list>
            <text:list-item>
              <text:p text:style-name="P6">Crecimiento progresivo y modular.</text:p>
            </text:list-item>
            <text:list-item>
              <text:p text:style-name="P6"><text:bookmark text:name="p-rc_e3605691f186e390-70"/>Priorización de la estabilidad, mantenibilidad y escalabilidad.</text:p>
            </text:list-item>
            <text:list-item>
              <text:p text:style-name="P6"><text:bookmark text:name="p-rc_e3605691f186e390-71"/>Cero sobreingeniería: las tecnologías complejas (interfaces gráficas, bases de datos reales, frameworks pesados) quedan pospuestas hasta fases posteriores.</text:p>
            </text:list-item>
          </text:list>
        </text:list-item>
      </text:list>
      <text:h text:style-name="P3" text:outline-level="2">3. Arquitectura y Modelo de Dominio</text:h>
      <text:p text:style-name="P4"><text:bookmark text:name="p-rc_e3605691f186e390-72"/>El sistema está construido bajo el paradigma de Programación Orientada a Objetos (POO), apoyándose fuertemente en la herencia y el polimorfismo.</text:p>
      <text:list text:style-name="L3">
        <text:list-item>
          <text:p text:style-name="P7">Estructura de Clases:</text:p>
          <text:list>
            <text:list-item>
              <text:p text:style-name="P8"><text:span text:style-name="Source_20_Text"><text:span text:style-name="T2">Vivienda</text:span></text:span><text:span text:style-name="T2"> (Superclase abstracta/base): Centraliza la ubicación, el precio base, el cálculo de impuestos (IGIC), el registro de pagos, la proyección de ingresos y la aplicación del IPC.</text:span></text:p>
            </text:list-item>
            <text:list-item>
              <text:p text:style-name="P8"><text:span text:style-name="Source_20_Text"><text:span text:style-name="T2">Piso</text:span></text:span><text:span text:style-name="T2"> (Subclase): Extiende </text:span><text:span text:style-name="Source_20_Text"><text:span text:style-name="T2">Vivienda</text:span></text:span><text:span text:style-name="T2"> añadiendo atributos específicos de propiedad horizontal (</text:span><text:span text:style-name="Source_20_Text"><text:span text:style-name="T2">planta</text:span></text:span><text:span text:style-name="T2">, </text:span><text:span text:style-name="Source_20_Text"><text:span text:style-name="T2">puerta</text:span></text:span><text:span text:style-name="T2">).</text:span></text:p>
            </text:list-item>
            <text:list-item>
              <text:p text:style-name="P8"><text:span text:style-name="Source_20_Text"><text:span text:style-name="T2">Casa</text:span></text:span><text:span text:style-name="T2"> (Subclase): Extiende </text:span><text:span text:style-name="Source_20_Text"><text:span text:style-name="T2">Vivienda</text:span></text:span><text:span text:style-name="T2"> añadiendo atributos de propiedad independiente (</text:span><text:span text:style-name="Source_20_Text"><text:span text:style-name="T2">metrosParcela</text:span></text:span><text:span text:style-name="T2">).</text:span></text:p>
            </text:list-item>
          </text:list>
        </text:list-item>
        <text:list-item>
          <text:p text:style-name="P8"><text:bookmark text:name="p-rc_e3605691f186e390-73"/><text:span text:style-name="T3">Flujo Principal:</text:span><text:span text:style-name="T2"> Gestionado actualmente a través de una clase </text:span><text:span text:style-name="Source_20_Text"><text:span text:style-name="T2">GestionInmobiliaria</text:span></text:span><text:span text:style-name="T2"> (</text:span><text:span text:style-name="Source_20_Text"><text:span text:style-name="T2">main</text:span></text:span><text:span text:style-name="T2">), la cual utiliza un </text:span><text:span text:style-name="Source_20_Text"><text:span text:style-name="T2">ArrayList&lt;Vivienda&gt;</text:span></text:span><text:span text:style-name="T2"> para la persistencia volátil y un menú iterativo para la interacción del usuario.</text:span></text:p>
        </text:list-item>
        <text:list-item>
          <text:p text:style-name="P9"><text:bookmark text:name="p-rc_e3605691f186e390-74"/><text:span text:style-name="T1">Entorno Técnico:</text:span> En proceso de migración hacia <text:span text:style-name="T1">IntelliJ IDEA</text:span>, preparándose para la separación por paquetes y el control de versiones (Git/GitHub).</text:p>
        </text:list-item>
      </text:list>
      <text:h text:style-name="P3" text:outline-level="2"><text:soft-page-break/>4. Contexto Funcional y Fiscal</text:h>
      <text:p text:style-name="P4"><text:bookmark text:name="p-rc_e3605691f186e390-75"/>La versión actual del sistema está estrictamente <text:span text:style-name="T1">adaptada al marco fiscal de Canarias</text:span>.</text:p>
      <text:list text:style-name="L4">
        <text:list-item>
          <text:p text:style-name="P10"><text:span text:style-name="T1">Tributación:</text:span> Todo cálculo económico asume la aplicación del IGIC (7.0%). No se contempla el IVA ni otras lógicas tributarias peninsulares en esta fase.</text:p>
        </text:list-item>
        <text:list-item>
          <text:p text:style-name="P11">Módulos Activos:</text:p>
          <text:list>
            <text:list-item>
              <text:p text:style-name="P10">Registro de viviendas (Pisos y Casas) con validaciones robustas.</text:p>
            </text:list-item>
            <text:list-item>
              <text:p text:style-name="P12"><text:span text:style-name="T2">Listado de inventario utilizando </text:span><text:span text:style-name="Source_20_Text"><text:span text:style-name="T2">instanceof</text:span></text:span><text:span text:style-name="T2"> para mostrar detalles específicos.</text:span></text:p>
            </text:list-item>
            <text:list-item>
              <text:p text:style-name="P10">Registro de pagos (soporta pagos parciales y totales, manteniendo el estado de deuda).</text:p>
            </text:list-item>
            <text:list-item>
              <text:p text:style-name="P10"><text:bookmark text:name="p-rc_e3605691f186e390-76"/>Aplicación de subidas anuales (IPC) recalculando automáticamente precios e impuestos.</text:p>
            </text:list-item>
          </text:list>
        </text:list-item>
      </text:list>
      <text:h text:style-name="P3" text:outline-level="2">5. Hoja de Ruta (Roadmap Oficial)</text:h>
      <text:p text:style-name="P4"><text:bookmark text:name="p-rc_e3605691f186e390-77"/>El crecimiento del sistema está delimitado por las siguientes fases estratégicas:</text:p>
      <text:list text:style-name="L5">
        <text:list-item>
          <text:p text:style-name="P13"><text:bookmark text:name="p-rc_e3605691f186e390-78"/><text:span text:style-name="T1">Fase 1: Organización del Proyecto</text:span> </text:p>
          <text:list>
            <text:list-item>
              <text:p text:style-name="P13"><text:bookmark text:name="p-rc_e3605691f186e390-79"/>Reestructuración en IntelliJ y separación por paquetes lógicos (modelo, main, gestión).</text:p>
            </text:list-item>
            <text:list-item>
              <text:p text:style-name="P13"><text:bookmark text:name="p-rc_e3605691f186e390-80"/>Preparación y subida a Git/GitHub.</text:p>
            </text:list-item>
          </text:list>
        </text:list-item>
        <text:list-item>
          <text:p text:style-name="P13"><text:bookmark text:name="p-rc_e3605691f186e390-81"/><text:span text:style-name="T1">Fase 2: Mejora Arquitectónica (BETA)</text:span> </text:p>
          <text:list>
            <text:list-item>
              <text:p text:style-name="P14"><text:bookmark text:name="p-rc_e3605691f186e390-82"/><text:span text:style-name="T2">Desacoplamiento ligero y reducción de carga lógica en la clase </text:span><text:span text:style-name="Source_20_Text"><text:span text:style-name="T2">main</text:span></text:span><text:span text:style-name="T2">.</text:span></text:p>
            </text:list-item>
          </text:list>
        </text:list-item>
        <text:list-item>
          <text:p text:style-name="P13"><text:bookmark text:name="p-rc_e3605691f186e390-83"/><text:span text:style-name="T1">Fase 3: Consolidación Funcional</text:span> </text:p>
          <text:list>
            <text:list-item>
              <text:p text:style-name="P13"><text:bookmark text:name="p-rc_e3605691f186e390-84"/>Refuerzo del sistema actual (validaciones, control de errores).</text:p>
            </text:list-item>
          </text:list>
        </text:list-item>
        <text:list-item>
          <text:p text:style-name="P13"><text:bookmark text:name="p-rc_e3605691f186e390-85"/><text:span text:style-name="T1">Fase 4: Preparación para v1.0</text:span> </text:p>
          <text:list>
            <text:list-item>
              <text:p text:style-name="P13"><text:bookmark text:name="p-rc_e3605691f186e390-86"/>Estandarización del flujo, redacción de documentación final y estabilización total.</text:p>
            </text:list-item>
          </text:list>
        </text:list-item>
        <text:list-item>
          <text:p text:style-name="P13"><text:bookmark text:name="p-rc_e3605691f186e390-87"/><text:span text:style-name="T1">Versión 1.0 (Objetivo)</text:span> </text:p>
          <text:list>
            <text:list-item>
              <text:p text:style-name="P13"><text:bookmark text:name="p-rc_e3605691f186e390-88"/>Producto inicial funcional y limpio (ERP inmobiliario simplificado).</text:p>
            </text:list-item>
          </text:list>
        </text:list-item>
        <text:list-item>
          <text:p text:style-name="P13"><text:bookmark text:name="p-rc_e3605691f186e390-89"/><text:span text:style-name="T1">Evolución Futura (v1.1 en adelante)</text:span> </text:p>
          <text:list>
            <text:list-item>
              <text:p text:style-name="P13"><text:bookmark text:name="p-rc_e3605691f186e390-90"/>Expansión fiscal (IVA, sistema multi-territorio), persistencia de datos real, perfiles de usuario, cálculo de rentabilidad y, eventualmente, interfaz gráfica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1T12:07:05.392728200</meta:creation-date>
    <dc:date>2026-03-31T12:07:09.733091200</dc:date>
    <meta:editing-duration>PT4S</meta:editing-duration>
    <meta:editing-cycles>1</meta:editing-cycles>
    <meta:document-statistic meta:table-count="0" meta:image-count="0" meta:object-count="0" meta:page-count="2" meta:paragraph-count="42" meta:word-count="499" meta:character-count="3471" meta:non-whitespace-character-count="3041"/>
    <meta:generator>LibreOffice/25.8.5.2$Windows_X86_64 LibreOffice_project/9c8b85f387cc00a89945a79c9e6239f32e450ac2</meta:generator>
  </office:meta>
</office:document-meta>
</file>