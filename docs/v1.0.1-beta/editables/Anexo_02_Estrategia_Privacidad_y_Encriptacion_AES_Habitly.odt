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9B200000DB58182EAB5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Heading_20_1" style:list-style-name="">
      <style:paragraph-properties fo:line-height="115%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Centrado_5f_Subrayado">
      <style:text-properties fo:background-color="#ffffd7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Quotations">
      <style:paragraph-properties fo:margin-top="0cm" fo:margin-bottom="0.247cm" style:contextual-spacing="false" fo:line-height="150%" fo:text-align="justify" style:justify-single-word="false">
        <style:tab-stops/>
      </style:paragraph-properties>
      <style:text-properties style:font-name="Arial3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3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4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5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7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8"/>
    <style:style style:name="P46" style:family="paragraph" style:parent-style-name="Text_20_body" style:list-style-name="L19">
      <style:paragraph-properties fo:margin-top="0cm" fo:margin-bottom="0cm" style:contextual-spacing="false"/>
    </style:style>
    <style:style style:name="P47" style:family="paragraph" style:parent-style-name="Text_20_body" style:list-style-name="L19"/>
    <style:style style:name="P48" style:family="paragraph" style:parent-style-name="Text_20_body" style:list-style-name="L20">
      <style:paragraph-properties fo:margin-top="0cm" fo:margin-bottom="0cm" style:contextual-spacing="false"/>
    </style:style>
    <style:style style:name="P49" style:family="paragraph" style:parent-style-name="Text_20_body" style:list-style-name="L20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1"/>
    <style:style style:name="P52" style:family="paragraph" style:parent-style-name="Text_20_body" style:list-style-name="L22">
      <style:paragraph-properties fo:margin-top="0cm" fo:margin-bottom="0cm" style:contextual-spacing="false"/>
    </style:style>
    <style:style style:name="P53" style:family="paragraph" style:parent-style-name="Text_20_body" style:list-style-name="L22"/>
    <style:style style:name="P54" style:family="paragraph" style:parent-style-name="Centrado_5f_Subrayado">
      <style:paragraph-properties fo:margin-top="0cm" fo:margin-bottom="0.247cm" style:contextual-spacing="false" fo:line-height="150%" fo:text-indent="0.75cm" style:auto-text-indent="false"/>
      <style:text-properties style:font-name="Arial3" officeooo:paragraph-rsid="00d00d7a" fo:background-color="#ffffd7"/>
    </style:style>
    <style:style style:name="P55" style:family="paragraph" style:parent-style-name="Text_20_body" style:list-style-name="L23">
      <style:paragraph-properties fo:margin-top="0cm" fo:margin-bottom="0cm" style:contextual-spacing="false"/>
    </style:style>
    <style:style style:name="P56" style:family="paragraph" style:parent-style-name="Text_20_body" style:list-style-name="L23"/>
    <style:style style:name="P57" style:family="paragraph" style:parent-style-name="Text_20_body" style:list-style-name="L24">
      <style:paragraph-properties fo:margin-top="0cm" fo:margin-bottom="0cm" style:contextual-spacing="false"/>
    </style:style>
    <style:style style:name="P58" style:family="paragraph" style:parent-style-name="Text_20_body" style:list-style-name="L24"/>
    <style:style style:name="P59" style:family="paragraph" style:parent-style-name="Text_20_body" style:list-style-name="L25">
      <style:paragraph-properties fo:margin-top="0cm" fo:margin-bottom="0cm" style:contextual-spacing="false"/>
    </style:style>
    <style:style style:name="P60" style:family="paragraph" style:parent-style-name="Text_20_body" style:list-style-name="L25"/>
    <style:style style:name="P61" style:family="paragraph" style:parent-style-name="Text_20_body" style:list-style-name="L26">
      <style:paragraph-properties fo:margin-top="0cm" fo:margin-bottom="0cm" style:contextual-spacing="false"/>
    </style:style>
    <style:style style:name="P62" style:family="paragraph" style:parent-style-name="Text_20_body" style:list-style-name="L26"/>
    <style:style style:name="P63" style:family="paragraph" style:parent-style-name="Text_20_body" style:list-style-name="L27">
      <style:paragraph-properties fo:margin-top="0cm" fo:margin-bottom="0cm" style:contextual-spacing="false"/>
    </style:style>
    <style:style style:name="P64" style:family="paragraph" style:parent-style-name="Text_20_body" style:list-style-name="L27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8">
      <style:text-properties officeooo:paragraph-rsid="00dbb7d7"/>
    </style:style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29"/>
    <style:style style:name="P69" style:family="paragraph" style:parent-style-name="Text_20_body" style:list-style-name="L30">
      <style:paragraph-properties fo:margin-top="0cm" fo:margin-bottom="0cm" style:contextual-spacing="false"/>
    </style:style>
    <style:style style:name="P70" style:family="paragraph" style:parent-style-name="Text_20_body" style:list-style-name="L30"/>
    <style:style style:name="P71" style:family="paragraph" style:parent-style-name="Text_20_body" style:list-style-name="L31">
      <style:paragraph-properties fo:margin-top="0cm" fo:margin-bottom="0cm" style:contextual-spacing="false"/>
    </style:style>
    <style:style style:name="P72" style:family="paragraph" style:parent-style-name="Text_20_body" style:list-style-name="L31"/>
    <style:style style:name="P73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</style:style>
    <style:style style:name="T1" style:family="text">
      <style:text-properties officeooo:rsid="00c27192"/>
    </style:style>
    <style:style style:name="T2" style:family="text">
      <style:text-properties officeooo:rsid="00c6730b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d89f40"/>
    </style:style>
    <style:style style:name="T5" style:family="text">
      <style:text-properties officeooo:rsid="00be825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-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2">Índice</text:p>
          </text:index-title>
          <text:p text:style-name="P3"><text:a xlink:type="simple" xlink:href="#__RefHeading___Toc982_4090663898" office:name="Introducción" text:style-name="Index_20_Link" text:visited-style-name="Index_20_Link">1. Introducción<text:tab/>4</text:a></text:p>
          <text:p text:style-name="P3"><text:a xlink:type="simple" xlink:href="#__RefHeading___Toc984_4090663898" office:name="Contexto Actual de Persistencia" text:style-name="Index_20_Link" text:visited-style-name="Index_20_Link">2. Contexto Actual de Persistencia<text:tab/>5</text:a></text:p>
          <text:p text:style-name="P4"><text:a xlink:type="simple" xlink:href="#__RefHeading___Toc986_4090663898" office:name="Flujo actual" text:style-name="Index_20_Link" text:visited-style-name="Index_20_Link">2.1 Flujo actual<text:tab/>5</text:a></text:p>
          <text:p text:style-name="P4"><text:a xlink:type="simple" xlink:href="#__RefHeading___Toc988_4090663898" office:name="Ventajas de la solución actual" text:style-name="Index_20_Link" text:visited-style-name="Index_20_Link">2.2 Ventajas de la solución actual<text:tab/>5</text:a></text:p>
          <text:p text:style-name="P3"><text:a xlink:type="simple" xlink:href="#__RefHeading___Toc990_4090663898" office:name="Problema Principal: La Serialización No Es Seguridad" text:style-name="Index_20_Link" text:visited-style-name="Index_20_Link">3. Problema Principal: La Serialización No Es Seguridad<text:tab/>6</text:a></text:p>
          <text:p text:style-name="P4"><text:a xlink:type="simple" xlink:href="#__RefHeading___Toc992_4090663898" office:name="En otras palabras:" text:style-name="Index_20_Link" text:visited-style-name="Index_20_Link">3.1 En otras palabras:<text:tab/>6</text:a></text:p>
          <text:p text:style-name="P3"><text:a xlink:type="simple" xlink:href="#__RefHeading___Toc994_4090663898" office:name="Riesgos de Seguridad del Sistema Actual" text:style-name="Index_20_Link" text:visited-style-name="Index_20_Link">4. Riesgos de Seguridad del Sistema Actual<text:tab/>7</text:a></text:p>
          <text:p text:style-name="P4"><text:a xlink:type="simple" xlink:href="#__RefHeading___Toc996_4090663898" office:name="Lectura no autorizada de datos" text:style-name="Index_20_Link" text:visited-style-name="Index_20_Link">4.1 Lectura no autorizada de datos<text:tab/>7</text:a></text:p>
          <text:p text:style-name="P4"><text:a xlink:type="simple" xlink:href="#__RefHeading___Toc998_4090663898" office:name="Exposición futura de información personal" text:style-name="Index_20_Link" text:visited-style-name="Index_20_Link">4.2 Exposición futura de información personal<text:tab/>7</text:a></text:p>
          <text:p text:style-name="P4"><text:a xlink:type="simple" xlink:href="#__RefHeading___Toc1000_4090663898" office:name="Riesgo de copia, duplicado o filtración" text:style-name="Index_20_Link" text:visited-style-name="Index_20_Link">4.3 Riesgo de copia, duplicado o filtración<text:tab/>8</text:a></text:p>
          <text:p text:style-name="P4"><text:a xlink:type="simple" xlink:href="#__RefHeading___Toc1002_4090663898" office:name="Falta de preparación para una evolución real del sistema" text:style-name="Index_20_Link" text:visited-style-name="Index_20_Link">4.4 Falta de preparación para una evolución real del sistema<text:tab/>8</text:a></text:p>
          <text:p text:style-name="P3"><text:a xlink:type="simple" xlink:href="#__RefHeading___Toc1004_4090663898" office:name="Objetivo del Anexo" text:style-name="Index_20_Link" text:visited-style-name="Index_20_Link">5. Objetivo del Anexo<text:tab/>9</text:a></text:p>
          <text:p text:style-name="P3"><text:a xlink:type="simple" xlink:href="#__RefHeading___Toc1010_4090663898" office:name="Principio de Seguridad Aplicado" text:style-name="Index_20_Link" text:visited-style-name="Index_20_Link">6. Principio de Seguridad Aplicado<text:tab/>10</text:a></text:p>
          <text:p text:style-name="P4"><text:a xlink:type="simple" xlink:href="#__RefHeading___Toc1012_4090663898" office:name="Situación deseada" text:style-name="Index_20_Link" text:visited-style-name="Index_20_Link">6.1 Situación deseada<text:tab/>10</text:a></text:p>
          <text:p text:style-name="P3"><text:a xlink:type="simple" xlink:href="#__RefHeading___Toc1014_4090663898" office:name="Solución Propuesta: Cifrado Simétrico AES-128" text:style-name="Index_20_Link" text:visited-style-name="Index_20_Link">7. Solución Propuesta: Cifrado Simétrico AES-128<text:tab/>11</text:a></text:p>
          <text:p text:style-name="P3"><text:a xlink:type="simple" xlink:href="#__RefHeading___Toc1016_4090663898" office:name="¿Qué es AES?" text:style-name="Index_20_Link" text:visited-style-name="Index_20_Link">8. ¿Qué es AES?<text:tab/>12</text:a></text:p>
          <text:p text:style-name="P4"><text:a xlink:type="simple" xlink:href="#__RefHeading___Toc1018_4090663898" office:name="Características principales" text:style-name="Index_20_Link" text:visited-style-name="Index_20_Link">8.1 Características principales<text:tab/>12</text:a></text:p>
          <text:p text:style-name="P3"><text:a xlink:type="simple" xlink:href="#__RefHeading___Toc1022_4090663898" office:name="¿Por qué AES-128 y no otra opción?" text:style-name="Index_20_Link" text:visited-style-name="Index_20_Link">9. ¿Por qué AES-128 y no otra opción?<text:tab/>13</text:a></text:p>
          <text:p text:style-name="P4"><text:a xlink:type="simple" xlink:href="#__RefHeading___Toc1024_4090663898" office:name="Razones técnicas" text:style-name="Index_20_Link" text:visited-style-name="Index_20_Link">9.1 Razones técnicas<text:tab/>13</text:a></text:p>
          <text:p text:style-name="P3"><text:a xlink:type="simple" xlink:href="#__RefHeading___Toc1028_4090663898" office:name="Flujo de Seguridad Recomendado" text:style-name="Index_20_Link" text:visited-style-name="Index_20_Link">10. Flujo de Seguridad Recomendado<text:tab/>14</text:a></text:p>
          <text:p text:style-name="P4"><text:a xlink:type="simple" xlink:href="#__RefHeading___Toc1030_4090663898" office:name=" Fase de guardado" text:style-name="Index_20_Link" text:visited-style-name="Index_20_Link">10.1 <text:s/>Fase de guardado<text:tab/>14</text:a></text:p>
          <text:p text:style-name="P4"><text:a xlink:type="simple" xlink:href="#__RefHeading___Toc1032_4090663898" office:name=" Fase de carga" text:style-name="Index_20_Link" text:visited-style-name="Index_20_Link">10.2 <text:s/>Fase de carga<text:tab/>14</text:a></text:p>
          <text:p text:style-name="P3"><text:a xlink:type="simple" xlink:href="#__RefHeading___Toc1034_4090663898" office:name="Beneficio Técnico de este Enfoque" text:style-name="Index_20_Link" text:visited-style-name="Index_20_Link">11. Beneficio Técnico de este Enfoque<text:tab/>15</text:a></text:p>
          <text:p text:style-name="P4"><text:a xlink:type="simple" xlink:href="#__RefHeading___Toc1036_4090663898" office:name=" El modelo de datos no necesita cambiar" text:style-name="Index_20_Link" text:visited-style-name="Index_20_Link">11.1 <text:s/>El modelo de datos no necesita cambiar<text:tab/>15</text:a></text:p>
          <text:p text:style-name="P3"><text:a xlink:type="simple" xlink:href="#__RefHeading___Toc1038_4090663898" office:name="Vulnerabilidad Actual del Archivo SerializadO" text:style-name="Index_20_Link" text:visited-style-name="Index_20_Link">12. Vulnerabilidad Actual del Archivo SerializadO<text:tab/>16</text:a></text:p>
          <text:p text:style-name="P4"><text:a xlink:type="simple" xlink:href="#__RefHeading___Toc1040_4090663898" office:name=" Riesgo conceptual importante" text:style-name="Index_20_Link" text:visited-style-name="Index_20_Link">12.1 <text:s/>Riesgo conceptual importante<text:tab/>16</text:a></text:p>
          <text:p text:style-name="P3"><text:a xlink:type="simple" xlink:href="#__RefHeading___Toc1042_4090663898" office:name="Protección de Datos de Inquilinos y Usuarios" text:style-name="Index_20_Link" text:visited-style-name="Index_20_Link">13. Protección de Datos de Inquilinos y Usuarios<text:tab/>17</text:a></text:p>
          <text:p text:style-name="P3"><text:a xlink:type="simple" xlink:href="#__RefHeading___Toc1044_4090663898" office:name="Diseño de la Clave de Cifrado" text:style-name="Index_20_Link" text:visited-style-name="Index_20_Link">14. Diseño de la Clave de Cifrado<text:tab/>18</text:a></text:p>
          <text:p text:style-name="P3"><text:a xlink:type="simple" xlink:href="#__RefHeading___Toc1048_4090663898" office:name="Qué NO conviene hacer" text:style-name="Index_20_Link" text:visited-style-name="Index_20_Link">15. Qué NO conviene hacer<text:tab/>19</text:a></text:p>
          <text:p text:style-name="P3"><text:a xlink:type="simple" xlink:href="#__RefHeading___Toc1050_4090663898" office:name="Qué SÍ conviene hacer" text:style-name="Index_20_Link" text:visited-style-name="Index_20_Link">16. Qué SÍ conviene hacer<text:tab/>20</text:a></text:p>
          <text:p text:style-name="P3"><text:a xlink:type="simple" xlink:href="#__RefHeading___Toc1056_4090663898" office:name="Consideración Importante: Seguridad Realista para Habitly" text:style-name="Index_20_Link" text:visited-style-name="Index_20_Link">17. Consideración Importante: Seguridad Realista para Habitly<text:tab/>21</text:a></text:p>
          <text:p text:style-name="P4"><text:a xlink:type="simple" xlink:href="#__RefHeading___Toc1058_4090663898" office:name=" Esta mejora no convierte Habitly en un sistema blindado absoluto" text:style-name="Index_20_Link" text:visited-style-name="Index_20_Link">17.1 <text:s/>Esta mejora no convierte Habitly en un sistema blindado absoluto<text:tab/>21</text:a></text:p>
          <text:p text:style-name="P3"><text:a xlink:type="simple" xlink:href="#__RefHeading___Toc1060_4090663898" office:name="Riesgos y Límites de la Solución" text:style-name="Index_20_Link" text:visited-style-name="Index_20_Link">18. Riesgos y Límites de la Solución<text:tab/>22</text:a></text:p>
          <text:p text:style-name="P4"><text:a xlink:type="simple" xlink:href="#__RefHeading___Toc1062_4090663898" office:name=" Limitaciones principales" text:style-name="Index_20_Link" text:visited-style-name="Index_20_Link">18.1 <text:s/>Limitaciones principales<text:tab/>22</text:a></text:p>
          <text:p text:style-name="P3"><text:a xlink:type="simple" xlink:href="#__RefHeading___Toc1064_4090663898" office:name="Requisitos Funcionales Asociados" text:style-name="Index_20_Link" text:visited-style-name="Index_20_Link">19. Requisitos Funcionales Asociados<text:tab/>23</text:a></text:p>
          <text:p text:style-name="P4"><text:a xlink:type="simple" xlink:href="#__RefHeading___Toc1066_4090663898" office:name=" RF-II.1" text:style-name="Index_20_Link" text:visited-style-name="Index_20_Link">19.1 <text:s/>RF-II.1<text:tab/>23</text:a></text:p>
          <text:p text:style-name="P4"><text:a xlink:type="simple" xlink:href="#__RefHeading___Toc1068_4090663898" office:name=" RF-II.2" text:style-name="Index_20_Link" text:visited-style-name="Index_20_Link">19.2 <text:s/>RF-II.2<text:tab/>23</text:a></text:p>
          <text:p text:style-name="P4"><text:a xlink:type="simple" xlink:href="#__RefHeading___Toc1070_4090663898" office:name=" RF-II.3" text:style-name="Index_20_Link" text:visited-style-name="Index_20_Link">19.3 <text:s/>RF-II.3<text:tab/>23</text:a></text:p>
          <text:p text:style-name="P4"><text:a xlink:type="simple" xlink:href="#__RefHeading___Toc1072_4090663898" office:name=" RF-II.4" text:style-name="Index_20_Link" text:visited-style-name="Index_20_Link">19.4 <text:s/>RF-II.4<text:tab/>23</text:a></text:p>
          <text:p text:style-name="P4"><text:a xlink:type="simple" xlink:href="#__RefHeading___Toc1074_4090663898" office:name=" RF-II.5" text:style-name="Index_20_Link" text:visited-style-name="Index_20_Link">19.5 <text:s/>RF-II.5<text:tab/>23</text:a></text:p>
          <text:p text:style-name="P3"><text:a xlink:type="simple" xlink:href="#__RefHeading___Toc1076_4090663898" office:name="Requisitos No Funcionales Asociados" text:style-name="Index_20_Link" text:visited-style-name="Index_20_Link">20. Requisitos No Funcionales Asociados<text:tab/>24</text:a></text:p>
          <text:p text:style-name="P4"><text:a xlink:type="simple" xlink:href="#__RefHeading___Toc1078_4090663898" office:name=" RNF-II.1 — Privacidad" text:style-name="Index_20_Link" text:visited-style-name="Index_20_Link">20.1 <text:s/>RNF-II.1 — Privacidad<text:tab/>24</text:a></text:p>
          <text:p text:style-name="P4"><text:a xlink:type="simple" xlink:href="#__RefHeading___Toc1080_4090663898" office:name=" RNF-II.2 — Robustez" text:style-name="Index_20_Link" text:visited-style-name="Index_20_Link"><text:soft-page-break/>20.2 <text:s/>RNF-II.2 — Robustez<text:tab/>24</text:a></text:p>
          <text:p text:style-name="P4"><text:a xlink:type="simple" xlink:href="#__RefHeading___Toc1082_4090663898" office:name=" RNF-II.3 — Mantenibilidad" text:style-name="Index_20_Link" text:visited-style-name="Index_20_Link">20.3 <text:s/>RNF-II.3 — Mantenibilidad<text:tab/>24</text:a></text:p>
          <text:p text:style-name="P4"><text:a xlink:type="simple" xlink:href="#__RefHeading___Toc1084_4090663898" office:name=" RNF-II.4 — Escalabilidad" text:style-name="Index_20_Link" text:visited-style-name="Index_20_Link">20.4 <text:s/>RNF-II.4 — Escalabilidad<text:tab/>24</text:a></text:p>
          <text:p text:style-name="P4"><text:a xlink:type="simple" xlink:href="#__RefHeading___Toc1086_4090663898" office:name=" RNF-II.5 — Transparencia de uso" text:style-name="Index_20_Link" text:visited-style-name="Index_20_Link">20.5 <text:s/>RNF-II.5 — Transparencia de uso<text:tab/>24</text:a></text:p>
          <text:p text:style-name="P3"><text:a xlink:type="simple" xlink:href="#__RefHeading___Toc1088_4090663898" office:name="Integración Recomendada en la Arquitectura de Habitly" text:style-name="Index_20_Link" text:visited-style-name="Index_20_Link">21. Integración Recomendada en la Arquitectura de Habitly<text:tab/>25</text:a></text:p>
          <text:p text:style-name="P4"><text:a xlink:type="simple" xlink:href="#__RefHeading___Toc1090_4090663898" office:name=" Arquitectura lógica recomendada" text:style-name="Index_20_Link" text:visited-style-name="Index_20_Link">21.1 <text:s/>Arquitectura lógica recomendada<text:tab/>25</text:a></text:p>
          <text:p text:style-name="P3"><text:a xlink:type="simple" xlink:href="#__RefHeading___Toc1092_4090663898" office:name="Relación con el Anexo 01" text:style-name="Index_20_Link" text:visited-style-name="Index_20_Link">22. Relación con el Anexo 01<text:tab/>26</text:a></text:p>
          <text:p text:style-name="P4"><text:a xlink:type="simple" xlink:href="#__RefHeading___Toc1094_4090663898" office:name=" Anexo 01 aporta:" text:style-name="Index_20_Link" text:visited-style-name="Index_20_Link">22.1 <text:s/>Anexo 01 aporta:<text:tab/>26</text:a></text:p>
          <text:p text:style-name="P4"><text:a xlink:type="simple" xlink:href="#__RefHeading___Toc2063_4090663898" office:name=" Anexo 02 aporta:" text:style-name="Index_20_Link" text:visited-style-name="Index_20_Link">22.2 <text:s/>Anexo 02 aporta:<text:tab/>26</text:a></text:p>
          <text:p text:style-name="P3"><text:a xlink:type="simple" xlink:href="#__RefHeading___Toc1100_4090663898" office:name="Riesgos si No se Implementa esta Mejora" text:style-name="Index_20_Link" text:visited-style-name="Index_20_Link">23. Riesgos si No se Implementa esta Mejora<text:tab/>27</text:a></text:p>
          <text:p text:style-name="P3"><text:a xlink:type="simple" xlink:href="#__RefHeading___Toc1102_4090663898" office:name="Conclusión" text:style-name="Index_20_Link" text:visited-style-name="Index_20_Link">24. Conclusión<text:tab/>28</text:a></text:p>
        </text:index-body>
      </text:table-of-content>
      <text:p text:style-name="Text_20_body"/>
      <text:h text:style-name="P5" text:outline-level="1"><text:bookmark-start text:name="__RefHeading___Toc982_4090663898"/><text:span text:style-name="Strong_20_Emphasis">Introducción</text:span><text:bookmark-end text:name="__RefHeading___Toc982_4090663898"/></text:h>
      <text:p text:style-name="Text_20_body">En la versión <text:span text:style-name="Strong_20_Emphasis">v1.0.1-BETA</text:span>, Habitly incorporó un sistema funcional de persistencia basado en <text:span text:style-name="Strong_20_Emphasis">serialización de objetos Java</text:span>, permitiendo guardar el inventario de viviendas y su estado financiero en un archivo binario <text:span text:style-name="Source_20_Text">.dat</text:span>.</text:p>
      <text:p text:style-name="Text_20_body">Esta solución ha sido suficiente para la fase inicial del proyecto, ya que permite:</text:p>
      <text:list text:style-name="L1">
        <text:list-item>
          <text:p text:style-name="P6">conservar los datos entre ejecuciones, </text:p>
        </text:list-item>
        <text:list-item>
          <text:p text:style-name="P6">evitar pérdida de información al cerrar el programa, </text:p>
        </text:list-item>
        <text:list-item>
          <text:p text:style-name="P7">y sentar una base técnica para futuras mejoras. </text:p>
        </text:list-item>
      </text:list>
      <text:p text:style-name="Text_20_body">Sin embargo, desde una perspectiva de <text:span text:style-name="Strong_20_Emphasis">seguridad y privacidad</text:span>, esta implementación sigue siendo insuficiente para un sistema que, en próximas versiones, gestionará datos más delicados relacionados con:</text:p>
      <text:list text:style-name="L2">
        <text:list-item>
          <text:p text:style-name="P8">inquilinos, </text:p>
        </text:list-item>
        <text:list-item>
          <text:p text:style-name="P8">propietarios, </text:p>
        </text:list-item>
        <text:list-item>
          <text:p text:style-name="P8">historial de pagos, </text:p>
        </text:list-item>
        <text:list-item>
          <text:p text:style-name="P8">posibles gastos recurrentes, </text:p>
        </text:list-item>
        <text:list-item>
          <text:p text:style-name="P8">trazabilidad económica, </text:p>
        </text:list-item>
        <text:list-item>
          <text:p text:style-name="P9">y futura identificación de usuarios. </text:p>
        </text:list-item>
      </text:list>
      <text:p text:style-name="Text_20_body">Por ello, antes de avanzar hacia una versión más completa del sistema, se considera necesario definir una <text:span text:style-name="Strong_20_Emphasis">estrategia de protección de datos en reposo</text:span>, incorporando un sistema de <text:span text:style-name="Strong_20_Emphasis">cifrado simétrico AES-128</text:span> antes de escribir la información al disco.</text:p>
      <text:p text:style-name="Text_20_body">Este anexo establece la justificación técnica, los riesgos del sistema actual y la estrategia recomendada para su evolución.</text:p>
      <text:h text:style-name="P10" text:outline-level="1"/>
      <text:h text:style-name="P5" text:outline-level="1"><text:bookmark-start text:name="__RefHeading___Toc984_4090663898"/>Contexto Actual de Persistencia<text:bookmark-end text:name="__RefHeading___Toc984_4090663898"/></text:h>
      <text:p text:style-name="Text_20_body">Actualmente, Habitly guarda la información principal del sistema mediante un proceso de:</text:p>
      <text:h text:style-name="Heading_20_2" text:outline-level="2"><text:bookmark-start text:name="__RefHeading___Toc986_4090663898"/>Flujo actual<text:bookmark-end text:name="__RefHeading___Toc986_4090663898"/></text:h>
      <text:list text:style-name="L3">
        <text:list-item>
          <text:p text:style-name="P11">el <text:span text:style-name="Source_20_Text">ArrayList&lt;Vivienda&gt;</text:span> se serializa, </text:p>
        </text:list-item>
        <text:list-item>
          <text:p text:style-name="P11">se transforma en un flujo binario, </text:p>
        </text:list-item>
        <text:list-item>
          <text:p text:style-name="P12">y se almacena directamente en un archivo: </text:p>
        </text:list-item>
      </text:list>
      <text:p text:style-name="P13">inventario_habitly.dat</text:p>
      <text:p text:style-name="Text_20_body">Esto significa que el programa puede reconstruir posteriormente la estructura completa de objetos al volver a ejecutarse.</text:p>
      <text:h text:style-name="Heading_20_2" text:outline-level="2"><text:bookmark-start text:name="__RefHeading___Toc988_4090663898"/>Ventajas de la solución actual<text:bookmark-end text:name="__RefHeading___Toc988_4090663898"/></text:h>
      <text:list text:style-name="L4">
        <text:list-item>
          <text:p text:style-name="P14">simplicidad de implementación, </text:p>
        </text:list-item>
        <text:list-item>
          <text:p text:style-name="P14">integración natural con Java, </text:p>
        </text:list-item>
        <text:list-item>
          <text:p text:style-name="P14">rapidez para una fase beta, </text:p>
        </text:list-item>
        <text:list-item>
          <text:p text:style-name="P15">y persistencia funcional sin necesidad de base de datos. </text:p>
        </text:list-item>
      </text:list>
      <text:p text:style-name="Text_20_body">No obstante, esta estrategia <text:span text:style-name="Strong_20_Emphasis">no protege realmente la información</text:span>.</text:p>
      <text:h text:style-name="P10" text:outline-level="1"/>
      <text:h text:style-name="P5" text:outline-level="1"><text:bookmark-start text:name="__RefHeading___Toc990_4090663898"/>Problema Principal: La Serialización No Es Seguridad<text:bookmark-end text:name="__RefHeading___Toc990_4090663898"/></text:h>
      <text:p text:style-name="Text_20_body">Un error común en proyectos en crecimiento es asumir que, por el hecho de guardar datos en un archivo <text:span text:style-name="Source_20_Text">.dat</text:span> binario, estos ya están “ocultos” o “protegidos”.</text:p>
      <text:p text:style-name="Text_20_body">Esto es <text:span text:style-name="Strong_20_Emphasis">incorrecto</text:span>.</text:p>
      <text:p text:style-name="Text_20_body">La serialización de objetos Java <text:span text:style-name="Strong_20_Emphasis">no cifra la información</text:span>.<text:line-break/>Solo la transforma a un formato binario que el sistema puede reconstruir más tarde.</text:p>
      <text:h text:style-name="Heading_20_2" text:outline-level="2"><text:bookmark-start text:name="__RefHeading___Toc992_4090663898"/>En otras palabras:<text:bookmark-end text:name="__RefHeading___Toc992_4090663898"/></text:h>
      <text:p text:style-name="P16">Un archivo serializado puede ser ilegible a simple vista para un usuario básico, pero sigue siendo técnicamente accesible y vulnerable.</text:p>
      <text:p text:style-name="Text_20_body">Por tanto, <text:span text:style-name="Strong_20_Emphasis">serializar no equivale a securizar</text:span>.</text:p>
      <text:h text:style-name="P10" text:outline-level="1"/>
      <text:h text:style-name="P5" text:outline-level="1"><text:bookmark-start text:name="__RefHeading___Toc994_4090663898"/>Riesgos de Seguridad del Sistema Actual<text:bookmark-end text:name="__RefHeading___Toc994_4090663898"/></text:h>
      <text:p text:style-name="Text_20_body">Si Habitly sigue guardando los datos serializados directamente en disco sin ninguna capa de cifrado, se mantienen varios riesgos relevantes.</text:p>
      <text:h text:style-name="Heading_20_2" text:outline-level="2"><text:bookmark-start text:name="__RefHeading___Toc996_4090663898"/>Lectura no autorizada de datos<text:bookmark-end text:name="__RefHeading___Toc996_4090663898"/></text:h>
      <text:p text:style-name="Text_20_body">Una persona con acceso al equipo podría:</text:p>
      <text:list text:style-name="L5">
        <text:list-item>
          <text:p text:style-name="P17">copiar el archivo <text:span text:style-name="Source_20_Text">.dat</text:span>, </text:p>
        </text:list-item>
        <text:list-item>
          <text:p text:style-name="P17">moverlo a otro entorno Java, </text:p>
        </text:list-item>
        <text:list-item>
          <text:p text:style-name="P17">intentar deserializarlo, </text:p>
        </text:list-item>
        <text:list-item>
          <text:p text:style-name="P18">o inspeccionarlo con herramientas técnicas. </text:p>
        </text:list-item>
      </text:list>
      <text:p text:style-name="Text_20_body">Aunque no sea una lectura “bonita” o inmediata, <text:span text:style-name="Strong_20_Emphasis">la información no está protegida de verdad</text:span>.</text:p>
      <text:h text:style-name="Heading_20_2" text:outline-level="2"><text:bookmark-start text:name="__RefHeading___Toc998_4090663898"/>Exposición futura de información personal<text:bookmark-end text:name="__RefHeading___Toc998_4090663898"/></text:h>
      <text:p text:style-name="Text_20_body">Actualmente el sistema gira principalmente en torno a viviendas y estados de pago, pero el roadmap de Habitly contempla incorporar más adelante datos como:</text:p>
      <text:list text:style-name="L6">
        <text:list-item>
          <text:p text:style-name="P19">nombre de arrendatarios, </text:p>
        </text:list-item>
        <text:list-item>
          <text:p text:style-name="P19">historial de pagos, </text:p>
        </text:list-item>
        <text:list-item>
          <text:p text:style-name="P19">deudas, </text:p>
        </text:list-item>
        <text:list-item>
          <text:p text:style-name="P19">información económica, </text:p>
        </text:list-item>
        <text:list-item>
          <text:p text:style-name="P19">gastos asociados, </text:p>
        </text:list-item>
        <text:list-item>
          <text:p text:style-name="P19">posibles perfiles de usuario, </text:p>
        </text:list-item>
        <text:list-item>
          <text:p text:style-name="P20">y trazabilidad de operaciones. </text:p>
        </text:list-item>
      </text:list>
      <text:p text:style-name="Text_20_body">Esto convierte al archivo persistente en un <text:span text:style-name="Strong_20_Emphasis">activo sensible</text:span>.</text:p>
      <text:p text:style-name="Text_20_body">Guardar esa información sin cifrado sería una mala práctica.</text:p>
      <text:h text:style-name="Heading_20_2" text:outline-level="2"><text:bookmark-start text:name="__RefHeading___Toc1000_4090663898"/><text:soft-page-break/>Riesgo de copia, duplicado o filtración<text:bookmark-end text:name="__RefHeading___Toc1000_4090663898"/></text:h>
      <text:p text:style-name="Text_20_body">Un archivo <text:span text:style-name="Source_20_Text">.dat</text:span> no cifrado puede:</text:p>
      <text:list text:style-name="L7">
        <text:list-item>
          <text:p text:style-name="P21">copiarse fácilmente, </text:p>
        </text:list-item>
        <text:list-item>
          <text:p text:style-name="P21">moverse entre equipos, </text:p>
        </text:list-item>
        <text:list-item>
          <text:p text:style-name="P22">o quedar expuesto en backups inseguros. </text:p>
        </text:list-item>
      </text:list>
      <text:p text:style-name="Text_20_body">Esto compromete la privacidad de los datos gestionados por Habitly.</text:p>
      <text:h text:style-name="Heading_20_2" text:outline-level="2"><text:bookmark-start text:name="__RefHeading___Toc1002_4090663898"/>Falta de preparación para una evolución real del sistema<text:bookmark-end text:name="__RefHeading___Toc1002_4090663898"/></text:h>
      <text:p text:style-name="Text_20_body">Aunque Habitly aún no sea una aplicación comercial desplegada, <text:span text:style-name="Strong_20_Emphasis">ya está creciendo con lógica de negocio real</text:span>.</text:p>
      <text:p text:style-name="Text_20_body">Por tanto, seguir usando persistencia sin cifrado más allá de la beta generaría deuda técnica y un mal punto de partida para la v1.1.</text:p>
      <text:h text:style-name="P10" text:outline-level="1"/>
      <text:h text:style-name="P5" text:outline-level="1"><text:bookmark-start text:name="__RefHeading___Toc1004_4090663898"/>Objetivo del Anexo<text:bookmark-end text:name="__RefHeading___Toc1004_4090663898"/></text:h>
      <text:p text:style-name="Text_20_body">El objetivo de este anexo es definir una estrategia técnica para que Habitly:</text:p>
      <text:list text:style-name="L8">
        <text:list-item>
          <text:p text:style-name="P23">proteja los datos persistentes en disco, </text:p>
        </text:list-item>
        <text:list-item>
          <text:p text:style-name="P23">dificulte accesos no autorizados, </text:p>
        </text:list-item>
        <text:list-item>
          <text:p text:style-name="P23">refuerce la privacidad del usuario, </text:p>
        </text:list-item>
        <text:list-item>
          <text:p text:style-name="P24">y prepare una base sólida de seguridad para futuras ampliaciones. </text:p>
        </text:list-item>
      </text:list>
      <text:p text:style-name="Text_20_body">La medida propuesta consiste en incorporar un proceso de:</text:p>
      <text:p text:style-name="Text_20_body"><text:bookmark-start text:name="__RefHeading___Toc1006_4090663898"/><text:span text:style-name="Strong_20_Emphasis">Cifrado AES-128 antes de guardar en disco</text:span><text:bookmark-end text:name="__RefHeading___Toc1006_4090663898"/></text:p>
      <text:p text:style-name="Text_20_body">y su correspondiente:</text:p>
      <text:p text:style-name="Text_20_body"><text:bookmark-start text:name="__RefHeading___Toc1008_4090663898"/><text:span text:style-name="Strong_20_Emphasis">Descifrado AES-128 antes de cargar en memoria</text:span><text:bookmark-end text:name="__RefHeading___Toc1008_4090663898"/></text:p>
      <text:h text:style-name="P10" text:outline-level="1"/>
      <text:h text:style-name="P5" text:outline-level="1"><text:bookmark-start text:name="__RefHeading___Toc1010_4090663898"/>Principio de Seguridad Aplicado<text:bookmark-end text:name="__RefHeading___Toc1010_4090663898"/></text:h>
      <text:p text:style-name="Text_20_body">La mejora propuesta se apoya en un principio esencial de seguridad informática:</text:p>
      <text:p text:style-name="P16"><text:span text:style-name="Strong_20_Emphasis">Los datos sensibles deben almacenarse cifrados cuando están en reposo.</text:span></text:p>
      <text:p text:style-name="Text_20_body">Esto significa que, aunque el programa no esté ejecutándose, la información almacenada físicamente en el disco debe seguir protegida.</text:p>
      <text:p text:style-name="Text_20_body">En Habitly esto afecta directamente al archivo de inventario persistente.</text:p>
      <text:h text:style-name="Heading_20_2" text:outline-level="2"><text:bookmark-start text:name="__RefHeading___Toc1012_4090663898"/>Situación deseada<text:bookmark-end text:name="__RefHeading___Toc1012_4090663898"/></text:h>
      <text:list text:style-name="L9">
        <text:list-item>
          <text:p text:style-name="P25">En memoria: los objetos se manejan normalmente. </text:p>
        </text:list-item>
        <text:list-item>
          <text:p text:style-name="P26">En disco: los datos deben quedar cifrados. </text:p>
        </text:list-item>
      </text:list>
      <text:p text:style-name="Text_20_body">De esta forma, si alguien accede directamente al archivo físico, <text:span text:style-name="Strong_20_Emphasis">no podrá interpretarlo sin la clave correspondiente</text:span>.</text:p>
      <text:h text:style-name="P10" text:outline-level="1"/>
      <text:h text:style-name="P5" text:outline-level="1"><text:bookmark-start text:name="__RefHeading___Toc1014_4090663898"/>Solución Propuesta: Cifrado Simétrico AES-128<text:bookmark-end text:name="__RefHeading___Toc1014_4090663898"/></text:h>
      <text:p text:style-name="Text_20_body">La estrategia recomendada para Habitly en esta fase es el uso de:</text:p>
      <text:p text:style-name="P13"><text:span text:style-name="T1">A</text:span>ES-128</text:p>
      <text:h text:style-name="P10" text:outline-level="1"/>
      <text:h text:style-name="P5" text:outline-level="1"><text:bookmark-start text:name="__RefHeading___Toc1016_4090663898"/>¿Qué es AES?<text:bookmark-end text:name="__RefHeading___Toc1016_4090663898"/></text:h>
      <text:p text:style-name="Text_20_body">AES (<text:span text:style-name="Strong_20_Emphasis">Advanced Encryption Standard</text:span>) es uno de los algoritmos de cifrado simétrico más utilizados y aceptados en la industria.</text:p>
      <text:h text:style-name="Heading_20_2" text:outline-level="2"><text:bookmark-start text:name="__RefHeading___Toc1018_4090663898"/>Características principales<text:bookmark-end text:name="__RefHeading___Toc1018_4090663898"/></text:h>
      <text:list text:style-name="L10">
        <text:list-item>
          <text:p text:style-name="P27">estándar ampliamente reconocido, </text:p>
        </text:list-item>
        <text:list-item>
          <text:p text:style-name="P27">rápido y eficiente, </text:p>
        </text:list-item>
        <text:list-item>
          <text:p text:style-name="P27">adecuado para archivos locales, </text:p>
        </text:list-item>
        <text:list-item>
          <text:p text:style-name="P27">fácil de integrar con Java, </text:p>
        </text:list-item>
        <text:list-item>
          <text:p text:style-name="P28">suficientemente robusto para el contexto actual de Habitly. </text:p>
        </text:list-item>
      </text:list>
      <text:p text:style-name="P29"><text:bookmark-start text:name="__RefHeading___Toc1020_4090663898"/>¿Qué significa “simétrico”?<text:bookmark-end text:name="__RefHeading___Toc1020_4090663898"/></text:p>
      <text:p text:style-name="Text_20_body">Significa que:</text:p>
      <text:list text:style-name="L11">
        <text:list-item>
          <text:p text:style-name="P30">se usa <text:span text:style-name="Strong_20_Emphasis">la misma clave</text:span> para cifrar </text:p>
        </text:list-item>
        <text:list-item>
          <text:p text:style-name="P31">y para descifrar. </text:p>
        </text:list-item>
      </text:list>
      <text:p text:style-name="Text_20_body">Esto lo hace especialmente práctico para una aplicación local de escritorio o consola como Habitly.</text:p>
      <text:h text:style-name="P10" text:outline-level="1"/>
      <text:h text:style-name="P5" text:outline-level="1"><text:bookmark-start text:name="__RefHeading___Toc1022_4090663898"/>¿Por qué AES-128 y no otra opción?<text:bookmark-end text:name="__RefHeading___Toc1022_4090663898"/></text:h>
      <text:p text:style-name="Text_20_body">Para el momento actual del proyecto, <text:span text:style-name="Strong_20_Emphasis">AES-128</text:span> es una elección equilibrada.</text:p>
      <text:h text:style-name="Heading_20_2" text:outline-level="2"><text:bookmark-start text:name="__RefHeading___Toc1024_4090663898"/>Razones técnicas<text:bookmark-end text:name="__RefHeading___Toc1024_4090663898"/></text:h>
      <text:list text:style-name="L12">
        <text:list-item>
          <text:p text:style-name="P32">Es suficientemente seguro para la escala actual del proyecto. </text:p>
        </text:list-item>
        <text:list-item>
          <text:p text:style-name="P32">Tiene una integración sencilla en Java. </text:p>
        </text:list-item>
        <text:list-item>
          <text:p text:style-name="P32">Evita complejidad innecesaria frente a soluciones más avanzadas. </text:p>
        </text:list-item>
        <text:list-item>
          <text:p text:style-name="P33">Es una mejora realista y asumible antes de la v1.1. </text:p>
        </text:list-item>
      </text:list>
      <text:p text:style-name="P29"><text:bookmark-start text:name="__RefHeading___Toc1026_4090663898"/>Importante<text:bookmark-end text:name="__RefHeading___Toc1026_4090663898"/></text:p>
      <text:p text:style-name="Text_20_body">No se busca ahora mismo construir un sistema criptográfico complejo, sino:</text:p>
      <text:list text:style-name="L13">
        <text:list-item>
          <text:p text:style-name="P34"><text:span text:style-name="Strong_20_Emphasis">subir el nivel de seguridad real</text:span> </text:p>
        </text:list-item>
        <text:list-item>
          <text:p text:style-name="P34">sin sobreingeniería </text:p>
        </text:list-item>
        <text:list-item>
          <text:p text:style-name="P35">y manteniendo el proyecto entendible. </text:p>
        </text:list-item>
      </text:list>
      <text:p text:style-name="Text_20_body">Esto encaja muy bien con la filosofía actual de Habitly.</text:p>
      <text:h text:style-name="P10" text:outline-level="1"/>
      <text:h text:style-name="P5" text:outline-level="1"><text:bookmark-start text:name="__RefHeading___Toc1028_4090663898"/>Flujo de Seguridad Recomendado<text:bookmark-end text:name="__RefHeading___Toc1028_4090663898"/></text:h>
      <text:p text:style-name="Text_20_body">Habitly no debería escribir directamente el objeto serializado al archivo final.</text:p>
      <text:p text:style-name="Text_20_body">En su lugar, el flujo recomendado sería el siguiente:</text:p>
      <text:h text:style-name="Heading_20_2" text:outline-level="2"><text:bookmark-start text:name="__RefHeading___Toc1030_4090663898"/><text:s/>Fase de guardado<text:bookmark-end text:name="__RefHeading___Toc1030_4090663898"/></text:h>
      <text:list text:style-name="L14">
        <text:list-item>
          <text:p text:style-name="P36">El sistema reúne en memoria el inventario actual. </text:p>
        </text:list-item>
        <text:list-item>
          <text:p text:style-name="P36">Ese inventario se serializa temporalmente. </text:p>
        </text:list-item>
        <text:list-item>
          <text:p text:style-name="P36">El flujo binario resultante se cifra mediante AES-128. </text:p>
        </text:list-item>
        <text:list-item>
          <text:p text:style-name="P37">Solo el contenido ya cifrado se escribe en disco. </text:p>
        </text:list-item>
      </text:list>
      <text:h text:style-name="Heading_20_2" text:outline-level="2"><text:bookmark-start text:name="__RefHeading___Toc1032_4090663898"/><text:s/>Fase de carga<text:bookmark-end text:name="__RefHeading___Toc1032_4090663898"/></text:h>
      <text:list text:style-name="L15">
        <text:list-item>
          <text:p text:style-name="P38">Habitly localiza el archivo persistente. </text:p>
        </text:list-item>
        <text:list-item>
          <text:p text:style-name="P38">Lee el contenido cifrado desde disco. </text:p>
        </text:list-item>
        <text:list-item>
          <text:p text:style-name="P38">Descifra el contenido con la clave correcta. </text:p>
        </text:list-item>
        <text:list-item>
          <text:p text:style-name="P38">Deserializa el contenido ya recuperado. </text:p>
        </text:list-item>
        <text:list-item>
          <text:p text:style-name="P39">Reconstruye el <text:span text:style-name="Source_20_Text">ArrayList&lt;Vivienda&gt;</text:span> en memoria. </text:p>
        </text:list-item>
      </text:list>
      <text:h text:style-name="P10" text:outline-level="1"/>
      <text:h text:style-name="P5" text:outline-level="1"><text:bookmark-start text:name="__RefHeading___Toc1034_4090663898"/>Beneficio Técnico de este Enfoque<text:bookmark-end text:name="__RefHeading___Toc1034_4090663898"/></text:h>
      <text:p text:style-name="Text_20_body">Este diseño tiene una ventaja muy importante:</text:p>
      <text:h text:style-name="Heading_20_2" text:outline-level="2"><text:bookmark-start text:name="__RefHeading___Toc1036_4090663898"/><text:s/>El modelo de datos no necesita cambiar<text:bookmark-end text:name="__RefHeading___Toc1036_4090663898"/></text:h>
      <text:p text:style-name="Text_20_body">Es decir:</text:p>
      <text:list text:style-name="L16">
        <text:list-item>
          <text:p text:style-name="P40"><text:span text:style-name="Source_20_Text">Vivienda</text:span>, <text:span text:style-name="Source_20_Text">Piso</text:span>, <text:span text:style-name="Source_20_Text">Casa</text:span> y demás clases pueden seguir funcionando igual. </text:p>
        </text:list-item>
        <text:list-item>
          <text:p text:style-name="P41">La seguridad se aplica <text:span text:style-name="Strong_20_Emphasis">en la capa de persistencia</text:span>, no en la capa de negocio. </text:p>
        </text:list-item>
      </text:list>
      <text:p text:style-name="Text_20_body">Esto es muy positivo porque permite:</text:p>
      <text:list text:style-name="L17">
        <text:list-item>
          <text:p text:style-name="P42">mantener el código limpio, </text:p>
        </text:list-item>
        <text:list-item>
          <text:p text:style-name="P42">no romper la lógica funcional, </text:p>
        </text:list-item>
        <text:list-item>
          <text:p text:style-name="P43">y encapsular la mejora donde realmente corresponde. </text:p>
        </text:list-item>
      </text:list>
      <text:h text:style-name="P10" text:outline-level="1"/>
      <text:h text:style-name="P5" text:outline-level="1"><text:bookmark-start text:name="__RefHeading___Toc1038_4090663898"/>Vulnerabilidad Actual del Archivo Serializad<text:span text:style-name="T2">O</text:span><text:bookmark-end text:name="__RefHeading___Toc1038_4090663898"/></text:h>
      <text:p text:style-name="Text_20_body">Aunque el archivo <text:span text:style-name="Source_20_Text">.dat</text:span> no sea un documento de texto plano, su contenido sigue siendo vulnerable porque:</text:p>
      <text:list text:style-name="L18">
        <text:list-item>
          <text:p text:style-name="P44">no está protegido criptográficamente, </text:p>
        </text:list-item>
        <text:list-item>
          <text:p text:style-name="P44">puede ser copiado o reemplazado, </text:p>
        </text:list-item>
        <text:list-item>
          <text:p text:style-name="P45">y depende únicamente de “estar escondido” o “ser raro”. </text:p>
        </text:list-item>
      </text:list>
      <text:p text:style-name="Text_20_body">Eso <text:span text:style-name="Strong_20_Emphasis">no es seguridad real</text:span>.</text:p>
      <text:h text:style-name="Heading_20_2" text:outline-level="2"><text:bookmark-start text:name="__RefHeading___Toc1040_4090663898"/><text:s/>Riesgo conceptual importante<text:bookmark-end text:name="__RefHeading___Toc1040_4090663898"/></text:h>
      <text:p text:style-name="P16">“Que un archivo no sea cómodo de leer no significa que esté protegido”.</text:p>
      <text:p text:style-name="Text_20_body">Por eso la seguridad no puede basarse en:</text:p>
      <text:list text:style-name="L19">
        <text:list-item>
          <text:p text:style-name="P46">la invisibilidad, </text:p>
        </text:list-item>
        <text:list-item>
          <text:p text:style-name="P46">la ubicación, </text:p>
        </text:list-item>
        <text:list-item>
          <text:p text:style-name="P47">ni el desconocimiento del usuario. </text:p>
        </text:list-item>
      </text:list>
      <text:p text:style-name="Text_20_body">Debe basarse en <text:span text:style-name="Strong_20_Emphasis">protección técnica efectiva</text:span>.</text:p>
      <text:h text:style-name="P10" text:outline-level="1"/>
      <text:h text:style-name="P5" text:outline-level="1"><text:bookmark-start text:name="__RefHeading___Toc1042_4090663898"/>Protección de Datos de Inquilinos y Usuarios<text:bookmark-end text:name="__RefHeading___Toc1042_4090663898"/></text:h>
      <text:p text:style-name="Text_20_body">Aunque en la versión actual Habitly aún no haya desplegado un sistema completo de usuarios, esta mejora se plantea con visión de continuidad.</text:p>
      <text:p text:style-name="Text_20_body">A medio plazo, Habitly podría almacenar datos como:</text:p>
      <text:list text:style-name="L20">
        <text:list-item>
          <text:p text:style-name="P48">identificadores de arrendatarios, </text:p>
        </text:list-item>
        <text:list-item>
          <text:p text:style-name="P48">historial de alquileres, </text:p>
        </text:list-item>
        <text:list-item>
          <text:p text:style-name="P48">pagos parciales o completos, </text:p>
        </text:list-item>
        <text:list-item>
          <text:p text:style-name="P48">gastos por vivienda, </text:p>
        </text:list-item>
        <text:list-item>
          <text:p text:style-name="P48">registros económicos, </text:p>
        </text:list-item>
        <text:list-item>
          <text:p text:style-name="P49">e incluso trazabilidad de acciones. </text:p>
        </text:list-item>
      </text:list>
      <text:p text:style-name="Text_20_body">Todo esto constituye información con valor funcional y cierta sensibilidad.</text:p>
      <text:p text:style-name="Text_20_body">Por ello, esta capa de cifrado debe entenderse como una <text:span text:style-name="Strong_20_Emphasis">inversión estructural temprana</text:span> y no como una mejora opcional.</text:p>
      <text:h text:style-name="P10" text:outline-level="1"/>
      <text:h text:style-name="P5" text:outline-level="1"><text:bookmark-start text:name="__RefHeading___Toc1044_4090663898"/>Diseño de la Clave de Cifrado<text:bookmark-end text:name="__RefHeading___Toc1044_4090663898"/></text:h>
      <text:p text:style-name="Text_20_body">Uno de los puntos más importantes de esta estrategia no es solo cifrar, sino <text:span text:style-name="Strong_20_Emphasis">cómo gestionar la clave</text:span>.</text:p>
      <text:p text:style-name="P29"><text:bookmark-start text:name="__RefHeading___Toc1046_4090663898"/>Problema<text:bookmark-end text:name="__RefHeading___Toc1046_4090663898"/></text:p>
      <text:p text:style-name="P13">AES-128 requiere una clave.</text:p>
      <text:p text:style-name="Text_20_body">Y si esa clave se guarda mal, la seguridad pierde valor.</text:p>
      <text:h text:style-name="P10" text:outline-level="1"/>
      <text:h text:style-name="P5" text:outline-level="1"><text:bookmark-start text:name="__RefHeading___Toc1048_4090663898"/>Qué NO conviene hacer<text:bookmark-end text:name="__RefHeading___Toc1048_4090663898"/></text:h>
      <text:p text:style-name="Text_20_body">Habitly <text:span text:style-name="Strong_20_Emphasis">no debería</text:span>:</text:p>
      <text:list text:style-name="L21">
        <text:list-item>
          <text:p text:style-name="P50">dejar la clave escrita directamente en múltiples clases, </text:p>
        </text:list-item>
        <text:list-item>
          <text:p text:style-name="P50">repetirla por el proyecto, </text:p>
        </text:list-item>
        <text:list-item>
          <text:p text:style-name="P50">ponerla en comentarios, </text:p>
        </text:list-item>
        <text:list-item>
          <text:p text:style-name="P51">o dejarla dispersa dentro del código sin control. </text:p>
        </text:list-item>
      </text:list>
      <text:p text:style-name="Text_20_body">Eso generaría una mala práctica de seguridad y dificultaría el mantenimiento.</text:p>
      <text:h text:style-name="P10" text:outline-level="1"/>
      <text:h text:style-name="P5" text:outline-level="1"><text:bookmark-start text:name="__RefHeading___Toc1050_4090663898"/>Qué SÍ conviene hacer<text:bookmark-end text:name="__RefHeading___Toc1050_4090663898"/></text:h>
      <text:p text:style-name="Text_20_body">Para esta fase, la estrategia más razonable es:</text:p>
      <text:list text:style-name="L22">
        <text:list-item>
          <text:p text:style-name="P52">centralizar la clave en una única capa de seguridad, </text:p>
        </text:list-item>
        <text:list-item>
          <text:p text:style-name="P52">encapsular la lógica de cifrado y descifrado, </text:p>
        </text:list-item>
        <text:list-item>
          <text:p text:style-name="P53">y dejar el sistema preparado para una mejora posterior. </text:p>
        </text:list-item>
      </text:list>
      <text:p text:style-name="P29"><text:bookmark-start text:name="__RefHeading___Toc1052_4090663898"/>Recomendación técnica<text:bookmark-end text:name="__RefHeading___Toc1052_4090663898"/></text:p>
      <text:p text:style-name="Text_20_body">Crear más adelante una clase responsable del cifrado, por ejemplo:</text:p>
      <text:p text:style-name="P13"><text:bookmark text:name="code-block-viewer Copia 1"/>GestorSeguridad</text:p>
      <text:p text:style-name="Text_20_body">o</text:p>
      <text:p text:style-name="P54"><text:bookmark text:name="code-block-viewer Copia 2"/>CifradorAES</text:p>
      <text:p text:style-name="Text_20_body"><text:bookmark-start text:name="__RefHeading___Toc1054_4090663898"/><text:span text:style-name="T3">Posibles responsabilidades</text:span><text:bookmark-end text:name="__RefHeading___Toc1054_4090663898"/></text:p>
      <text:list text:style-name="L23">
        <text:list-item>
          <text:p text:style-name="P55">cifrar datos antes de guardar </text:p>
        </text:list-item>
        <text:list-item>
          <text:p text:style-name="P55">descifrar datos al cargar </text:p>
        </text:list-item>
        <text:list-item>
          <text:p text:style-name="P55">centralizar la clave </text:p>
        </text:list-item>
        <text:list-item>
          <text:p text:style-name="P56">abstraer la complejidad criptográfica del resto del sistema </text:p>
        </text:list-item>
      </text:list>
      <text:p text:style-name="Text_20_body">Esto evita contaminar la lógica de negocio con detalles de seguridad.</text:p>
      <text:h text:style-name="P10" text:outline-level="1"/>
      <text:h text:style-name="P5" text:outline-level="1"><text:bookmark-start text:name="__RefHeading___Toc1056_4090663898"/>Consideración Importante: Seguridad Realista para Habitly<text:bookmark-end text:name="__RefHeading___Toc1056_4090663898"/></text:h>
      <text:p text:style-name="Text_20_body">Conviene dejar claro algo importante:</text:p>
      <text:h text:style-name="Heading_20_2" text:outline-level="2"><text:bookmark-start text:name="__RefHeading___Toc1058_4090663898"/><text:s/>Esta mejora no convierte Habitly en un sistema blindado absoluto<text:bookmark-end text:name="__RefHeading___Toc1058_4090663898"/></text:h>
      <text:p text:style-name="Text_20_body">Pero sí lo convierte en un sistema <text:span text:style-name="Strong_20_Emphasis">mucho más serio y responsable</text:span>.</text:p>
      <text:p text:style-name="Text_20_body">Eso es exactamente lo que interesa ahora.</text:p>
      <text:p text:style-name="Text_20_body">La meta de esta fase no es construir una plataforma bancaria, sino:</text:p>
      <text:list text:style-name="L24">
        <text:list-item>
          <text:p text:style-name="P57">eliminar vulnerabilidades básicas, </text:p>
        </text:list-item>
        <text:list-item>
          <text:p text:style-name="P57">elevar la madurez del proyecto, </text:p>
        </text:list-item>
        <text:list-item>
          <text:p text:style-name="P58">y dejar la base preparada para futuras versiones. </text:p>
        </text:list-item>
      </text:list>
      <text:p text:style-name="Text_20_body">Ese enfoque es técnicamente sano.</text:p>
      <text:h text:style-name="P10" text:outline-level="1"/>
      <text:h text:style-name="P5" text:outline-level="1"><text:bookmark-start text:name="__RefHeading___Toc1060_4090663898"/>Riesgos y Límites de la Solución<text:bookmark-end text:name="__RefHeading___Toc1060_4090663898"/></text:h>
      <text:p text:style-name="Text_20_body">Como toda mejora, esta estrategia también tiene limitaciones que conviene documentar.</text:p>
      <text:h text:style-name="Heading_20_2" text:outline-level="2"><text:bookmark-start text:name="__RefHeading___Toc1062_4090663898"/><text:s/>Limitaciones principales<text:bookmark-end text:name="__RefHeading___Toc1062_4090663898"/></text:h>
      <text:list text:style-name="L25">
        <text:list-item>
          <text:p text:style-name="P59">Si la clave está embebida localmente, sigue existiendo un nivel de exposición técnica. </text:p>
        </text:list-item>
        <text:list-item>
          <text:p text:style-name="P59">El cifrado protege el archivo en reposo, pero no sustituye otras capas de seguridad. </text:p>
        </text:list-item>
        <text:list-item>
          <text:p text:style-name="P60">No protege frente a todo tipo de manipulación avanzada del sistema. </text:p>
        </text:list-item>
      </text:list>
      <text:p text:style-name="Text_20_body">Aun así, para el contexto actual de Habitly, el beneficio es muy superior al coste de implementación.</text:p>
      <text:h text:style-name="P10" text:outline-level="1"/>
      <text:h text:style-name="P5" text:outline-level="1"><text:bookmark-start text:name="__RefHeading___Toc1064_4090663898"/>Requisitos Funcionales Asociados<text:bookmark-end text:name="__RefHeading___Toc1064_4090663898"/></text:h>
      <text:p text:style-name="Text_20_body">Para considerar correctamente implementada esta mejora, Habitly deberá cumplir los siguientes requisitos:</text:p>
      <text:h text:style-name="Heading_20_2" text:outline-level="2"><text:bookmark-start text:name="__RefHeading___Toc1066_4090663898"/><text:s/>RF-II.1<text:bookmark-end text:name="__RefHeading___Toc1066_4090663898"/></text:h>
      <text:p text:style-name="Text_20_body">El sistema deberá cifrar el inventario antes de escribirlo en disco.</text:p>
      <text:h text:style-name="Heading_20_2" text:outline-level="2"><text:bookmark-start text:name="__RefHeading___Toc1068_4090663898"/><text:s/>RF-II.2<text:bookmark-end text:name="__RefHeading___Toc1068_4090663898"/></text:h>
      <text:p text:style-name="Text_20_body">El sistema deberá descifrar correctamente el archivo antes de reconstruir los objetos.</text:p>
      <text:h text:style-name="Heading_20_2" text:outline-level="2"><text:bookmark-start text:name="__RefHeading___Toc1070_4090663898"/><text:s/>RF-II.3<text:bookmark-end text:name="__RefHeading___Toc1070_4090663898"/></text:h>
      <text:p text:style-name="Text_20_body">La persistencia cifrada deberá mantener la compatibilidad funcional con la lógica actual del inventario.</text:p>
      <text:h text:style-name="Heading_20_2" text:outline-level="2"><text:bookmark-start text:name="__RefHeading___Toc1072_4090663898"/><text:s/>RF-II.4<text:bookmark-end text:name="__RefHeading___Toc1072_4090663898"/></text:h>
      <text:p text:style-name="Text_20_body">El usuario no deberá percibir una complejidad adicional durante el uso normal del sistema.</text:p>
      <text:h text:style-name="Heading_20_2" text:outline-level="2"><text:bookmark-start text:name="__RefHeading___Toc1074_4090663898"/><text:s/>RF-II.5<text:bookmark-end text:name="__RefHeading___Toc1074_4090663898"/></text:h>
      <text:p text:style-name="Text_20_body">La capa de seguridad deberá estar desacoplada de la lógica principal de negocio.</text:p>
      <text:h text:style-name="P10" text:outline-level="1"/>
      <text:h text:style-name="P5" text:outline-level="1"><text:bookmark-start text:name="__RefHeading___Toc1076_4090663898"/>Requisitos No Funcionales Asociados<text:bookmark-end text:name="__RefHeading___Toc1076_4090663898"/></text:h>
      <text:h text:style-name="Heading_20_2" text:outline-level="2"><text:bookmark-start text:name="__RefHeading___Toc1078_4090663898"/><text:s/>RNF-II.1 — Privacidad<text:bookmark-end text:name="__RefHeading___Toc1078_4090663898"/></text:h>
      <text:p text:style-name="Text_20_body">Los datos persistentes no deberán quedar accesibles en bruto sobre el disco.</text:p>
      <text:h text:style-name="Heading_20_2" text:outline-level="2"><text:bookmark-start text:name="__RefHeading___Toc1080_4090663898"/><text:s/>RNF-II.2 — Robustez<text:bookmark-end text:name="__RefHeading___Toc1080_4090663898"/></text:h>
      <text:p text:style-name="Text_20_body">La aplicación deberá gestionar correctamente errores de lectura o descifrado.</text:p>
      <text:h text:style-name="Heading_20_2" text:outline-level="2"><text:bookmark-start text:name="__RefHeading___Toc1082_4090663898"/><text:s/>RNF-II.3 — Mantenibilidad<text:bookmark-end text:name="__RefHeading___Toc1082_4090663898"/></text:h>
      <text:p text:style-name="Text_20_body">La lógica criptográfica deberá centralizarse y no repartirse por múltiples clases.</text:p>
      <text:h text:style-name="Heading_20_2" text:outline-level="2"><text:bookmark-start text:name="__RefHeading___Toc1084_4090663898"/><text:s/>RNF-II.4 — Escalabilidad<text:bookmark-end text:name="__RefHeading___Toc1084_4090663898"/></text:h>
      <text:p text:style-name="Text_20_body">La solución deberá ser compatible con futuras ampliaciones del modelo de datos.</text:p>
      <text:h text:style-name="Heading_20_2" text:outline-level="2"><text:bookmark-start text:name="__RefHeading___Toc1086_4090663898"/><text:s/>RNF-II.5 — Transparencia de uso<text:bookmark-end text:name="__RefHeading___Toc1086_4090663898"/></text:h>
      <text:p text:style-name="Text_20_body">El usuario no deberá tener que intervenir manualmente para cifrar o descifrar.</text:p>
      <text:h text:style-name="P10" text:outline-level="1"/>
      <text:h text:style-name="P5" text:outline-level="1"><text:bookmark-start text:name="__RefHeading___Toc1088_4090663898"/>Integración Recomendada en la Arquitectura de Habitly<text:bookmark-end text:name="__RefHeading___Toc1088_4090663898"/></text:h>
      <text:p text:style-name="Text_20_body">Desde una perspectiva de diseño, esta mejora debería integrarse dentro del bloque de persistencia del sistema.</text:p>
      <text:h text:style-name="Heading_20_2" text:outline-level="2"><text:bookmark-start text:name="__RefHeading___Toc1090_4090663898"/><text:s/>Arquitectura lógica recomendada<text:bookmark-end text:name="__RefHeading___Toc1090_4090663898"/></text:h>
      <text:list text:style-name="L26">
        <text:list-item>
          <text:p text:style-name="P61"><text:span text:style-name="Source_20_Text">GestionInmobiliaria</text:span> </text:p>
          <text:list>
            <text:list-item>
              <text:p text:style-name="P61">controla el flujo del programa </text:p>
            </text:list-item>
          </text:list>
        </text:list-item>
        <text:list-item>
          <text:p text:style-name="P61"><text:span text:style-name="Source_20_Text">GestorPersistencia</text:span> </text:p>
          <text:list>
            <text:list-item>
              <text:p text:style-name="P61">gestiona guardado y carga </text:p>
            </text:list-item>
          </text:list>
        </text:list-item>
        <text:list-item>
          <text:p text:style-name="P61"><text:span text:style-name="Source_20_Text">CifradorAES</text:span> </text:p>
          <text:list>
            <text:list-item>
              <text:p text:style-name="P61">cifra y descifra el contenido </text:p>
            </text:list-item>
          </text:list>
        </text:list-item>
        <text:list-item>
          <text:p text:style-name="P61"><text:span text:style-name="Source_20_Text">Vivienda / Piso / Casa</text:span> </text:p>
          <text:list>
            <text:list-item>
              <text:p text:style-name="P62">mantienen la lógica de negocio y el modelo de datos </text:p>
            </text:list-item>
          </text:list>
        </text:list-item>
      </text:list>
      <text:p text:style-name="Text_20_body">Esto permite una separación mucho más limpia entre:</text:p>
      <text:list text:style-name="L27">
        <text:list-item>
          <text:p text:style-name="P63">negocio, </text:p>
        </text:list-item>
        <text:list-item>
          <text:p text:style-name="P63">almacenamiento, </text:p>
        </text:list-item>
        <text:list-item>
          <text:p text:style-name="P64">y seguridad. </text:p>
        </text:list-item>
      </text:list>
      <text:h text:style-name="P10" text:outline-level="1"/>
      <text:h text:style-name="P5" text:outline-level="1"><text:bookmark-start text:name="__RefHeading___Toc1092_4090663898"/>Relación con el Anexo <text:span text:style-name="T4">01</text:span><text:bookmark-end text:name="__RefHeading___Toc1092_4090663898"/></text:h>
      <text:p text:style-name="Text_20_body">Este anexo está estrechamente relacionado con el <text:span text:style-name="Strong_20_Emphasis">Anexo I — Protocolo de Rutas de Sistema y Almacenamiento Oculto</text:span>.</text:p>
      <text:p text:style-name="Text_20_body">La combinación de ambas mejoras proporciona una protección mucho más sólida:</text:p>
      <text:h text:style-name="Heading_20_2" text:outline-level="2"><text:bookmark-start text:name="__RefHeading___Toc1094_4090663898"/><text:s/>Anexo <text:span text:style-name="T5">01</text:span> aporta:<text:bookmark-end text:name="__RefHeading___Toc1094_4090663898"/></text:h>
      <text:list text:style-name="L28">
        <text:list-item>
          <text:p text:style-name="P65">mejor ubicación del archivo </text:p>
        </text:list-item>
        <text:list-item>
          <text:p text:style-name="P65">menor exposición operativa </text:p>
        </text:list-item>
        <text:list-item>
          <text:p text:style-name="P66">mejor desacoplamiento del proyecto </text:p>
        </text:list-item>
      </text:list>
      <text:h text:style-name="Heading_20_2" text:outline-level="2"><text:bookmark-start text:name="__RefHeading___Toc2063_4090663898"/><text:s/>Anexo <text:span text:style-name="T5">02</text:span> aporta:<text:bookmark-end text:name="__RefHeading___Toc2063_4090663898"/></text:h>
      <text:list text:style-name="L29">
        <text:list-item>
          <text:p text:style-name="P67">protección real del contenido del archivo </text:p>
        </text:list-item>
        <text:list-item>
          <text:p text:style-name="P67">privacidad técnica de los datos </text:p>
        </text:list-item>
        <text:list-item>
          <text:p text:style-name="P68">endurecimiento de la persistencia </text:p>
        </text:list-item>
      </text:list>
      <text:p text:style-name="P29"><text:bookmark-start text:name="__RefHeading___Toc1098_4090663898"/>Conclusión técnica conjunta<text:bookmark-end text:name="__RefHeading___Toc1098_4090663898"/></text:p>
      <text:p text:style-name="P16">Guardar el archivo en una ruta oculta ayuda, pero cifrarlo es lo que realmente protege su contenido.</text:p>
      <text:p text:style-name="Text_20_body">Ambas mejoras deben entenderse como complementarias.</text:p>
      <text:h text:style-name="P10" text:outline-level="1"/>
      <text:h text:style-name="P5" text:outline-level="1"><text:bookmark-start text:name="__RefHeading___Toc1100_4090663898"/>Riesgos si No se Implementa esta Mejora<text:bookmark-end text:name="__RefHeading___Toc1100_4090663898"/></text:h>
      <text:p text:style-name="Text_20_body">Si Habitly continúa almacenando el inventario serializado sin cifrado, se mantendrán los siguientes problemas:</text:p>
      <text:list text:style-name="L30">
        <text:list-item>
          <text:p text:style-name="P69">exposición innecesaria de datos locales, </text:p>
        </text:list-item>
        <text:list-item>
          <text:p text:style-name="P69">mala práctica de seguridad, </text:p>
        </text:list-item>
        <text:list-item>
          <text:p text:style-name="P69">mayor fragilidad de cara a la evolución del sistema, </text:p>
        </text:list-item>
        <text:list-item>
          <text:p text:style-name="P70">y acumulación de deuda técnica antes de la v1.1. </text:p>
        </text:list-item>
      </text:list>
      <text:p text:style-name="Text_20_body">A medida que Habitly incorpore más información económica y operativa, esta vulnerabilidad dejará de ser tolerable.</text:p>
      <text:h text:style-name="P10" text:outline-level="1"/>
      <text:h text:style-name="P5" text:outline-level="1"><text:bookmark-start text:name="__RefHeading___Toc1102_4090663898"/>Conclusión<text:bookmark-end text:name="__RefHeading___Toc1102_4090663898"/></text:h>
      <text:p text:style-name="Text_20_body">La implementación de un sistema de cifrado simétrico <text:span text:style-name="Strong_20_Emphasis">AES-128</text:span> para la persistencia local de Habitly representa una mejora crítica en términos de <text:span text:style-name="Strong_20_Emphasis">privacidad, madurez técnica y responsabilidad estructural</text:span>.</text:p>
      <text:p text:style-name="Text_20_body">Aunque la serialización de objetos Java ha permitido construir una base funcional rápida y eficaz durante la fase beta, su uso sin protección criptográfica resulta insuficiente para una aplicación que ya empieza a gestionar datos con valor operativo real.</text:p>
      <text:p text:style-name="Text_20_body">Adoptar un modelo en el que el inventario se <text:span text:style-name="Strong_20_Emphasis">serialice, se cifre y solo entonces se escriba en disco</text:span> permitirá a Habitly:</text:p>
      <text:list text:style-name="L31">
        <text:list-item>
          <text:p text:style-name="P71">proteger mejor la información, </text:p>
        </text:list-item>
        <text:list-item>
          <text:p text:style-name="P71">reducir la exposición local de datos, </text:p>
        </text:list-item>
        <text:list-item>
          <text:p text:style-name="P71">mantener una arquitectura limpia, </text:p>
        </text:list-item>
        <text:list-item>
          <text:p text:style-name="P72">y preparar el proyecto para futuras ampliaciones funcionales. </text:p>
        </text:list-item>
      </text:list>
      <text:p text:style-name="Text_20_body">Este anexo debe considerarse una guía de implementación prioritaria dentro del endurecimiento técnico previsto para la evolución de Habitly hacia la línea <text:span text:style-name="Strong_20_Emphasis">v1.1</text:span>.</text:p>
      <text:p text:style-name="Text_20_body"><text:span text:style-name="Strong_20_Emphasis"/></text:p>
      <text:p text:style-name="P7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egrita" style:font-family-generic="swiss" style:font-pitch="variable"/>
  </office:font-face-decls>
  <office:styles>
    <draw:fill-image draw:name="Portada_5f_Anexo_5f_02_5f_Estrategia_5f_Privacidad_5f_y_5f_Encriptacion_5f_AES_5f_Habitly" draw:display-name="Portada_Anexo_02_Estrategia_Privacidad_y_Encriptacion_AES_Habitly" xlink:href="Pictures/10000000000009B200000DB58182EAB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75cm" style:auto-text-indent="false" style:page-number="auto">
        <style:tab-stops/>
      </style:paragraph-properties>
      <style:text-properties style:font-name="Arial3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6cm" fo:margin-right="0.3cm" fo:margin-top="0cm" fo:margin-bottom="0.247cm" style:contextual-spacing="false" fo:line-height="115%" style:page-number="auto"/>
      <style:text-properties fo:text-transform="uppercase" fo:color="#000080" loext:opacity="100%" style:font-name="Verdana" fo:font-family="Verdana" style:font-style-name="Negrita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349cm" fo:margin-right="0.15cm" fo:margin-top="0cm" fo:margin-bottom="0.247cm" style:contextual-spacing="false" fo:line-height="115%"/>
      <style:text-properties fo:color="#000080" loext:opacity="100%" style:font-name="Verdana" fo:font-family="Verdana" style:font-style-name="Negrita" style:font-family-generic="swiss" style:font-pitch="variable" fo:font-size="14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.349cm" fo:margin-right="0.15cm" fo:margin-top="0.247cm" fo:margin-bottom="0.212cm" style:contextual-spacing="false" style:page-number="auto"/>
      <style:text-properties fo:color="#000080" loext:opacity="100%" style:font-name="Verdana" fo:font-family="Verdana" style:font-style-name="Negrita" style:font-family-generic="swiss" style:font-pitch="variable" fo:font-size="13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ítulo_20_General" style:display-name="Título General" style:family="paragraph" style:parent-style-name="Heading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1_20_Cont." style:display-name="List 1 Cont." style:family="paragraph" style:parent-style-name="List" style:list-style-name="List_20_2" style:class="list" style:master-page-name="">
      <style:paragraph-properties fo:margin-top="0cm" fo:margin-bottom="0.212cm" style:contextual-spacing="false" style:page-number="auto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entrado_5f_Subrayado" style:display-name="Centrado_Subrayado" style:family="paragraph" style:parent-style-name="Text_20_body" style:master-page-name="">
      <loext:graphic-properties draw:fill="none" draw:fill-color="#ffffd7"/>
      <style:paragraph-properties fo:text-align="center" style:justify-single-word="false" style:page-number="auto" fo:background-color="transparent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a_5f_Guion_5f_Habitly" style:display-name="Lista_Guion_Habitly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officeooo:rsid="009b3bce" officeooo:paragraph-rsid="009b3bce"/>
    </style:style>
    <style:style style:name="MT1" style:family="text">
      <style:text-properties officeooo:rsid="00ba58fd"/>
    </style:style>
    <style:style style:name="MT2" style:family="text">
      <style:text-properties style:font-name="Arial1" officeooo:rsid="00285030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4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rtada_5f_Anexo_5f_02_5f_Estrategia_5f_Privacidad_5f_y_5f_Encriptacion_5f_AES_5f_Habitly" draw:fill-image-width="100%" draw:fill-image-height="100%" style:repeat="no-repeat" draw:fill-image-ref-point="center" style:footnote-max-height="0cm" loext:margin-gutter="0cm">
        <style:background-image xlink:href="Pictures/10000000000009B200000DB58182EAB5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a_5f_Anexo_5f_02_5f_Estrategia_5f_Privacidad_5f_y_5f_Encriptacion_5f_AES_5f_Habitly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Anexo 0<text:span text:style-name="MT1">2</text:span> – v1.0.<text:span text:style-name="MT1">1A</text:span></text:p>
      </style:header>
      <style:footer>
        <text:p text:style-name="Footer"><text:tab/><text:span text:style-name="MT2">Página </text:span><text:span text:style-name="MT2"><text:page-number text:select-page="current">28</text:page-number></text:span><text:span text:style-name="MT2"><text:s/>de </text:span><text:span text:style-name="MT2"><text:page-count>28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0:08:53.820272000</meta:creation-date>
    <dc:date>2026-04-03T11:53:20.600514700</dc:date>
    <meta:editing-duration>PT4H40M32S</meta:editing-duration>
    <meta:editing-cycles>207</meta:editing-cycles>
    <meta:generator>LibreOffice/25.8.5.2$Windows_X86_64 LibreOffice_project/9c8b85f387cc00a89945a79c9e6239f32e450ac2</meta:generator>
    <meta:print-date>2026-04-02T12:03:24.038836500</meta:print-date>
    <meta:printed-by>Archivos PDF</meta:printed-by>
    <meta:document-statistic meta:table-count="0" meta:image-count="0" meta:object-count="0" meta:page-count="28" meta:paragraph-count="330" meta:word-count="2551" meta:character-count="16088" meta:non-whitespace-character-count="13869"/>
  </office:meta>
</office:document-meta>
</file>