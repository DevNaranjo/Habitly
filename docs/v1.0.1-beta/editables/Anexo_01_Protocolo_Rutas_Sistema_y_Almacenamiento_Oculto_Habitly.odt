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9B200000DB562B551A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egrita" style:font-family-generic="swiss" style:font-pitch="variable"/>
  </office:font-face-decls>
  <office:automatic-styles>
    <style:style style:name="Tabla1" style:family="table">
      <style:table-properties style:width="15.095cm" fo:margin-left="0cm" table:align="left"/>
    </style:style>
    <style:style style:name="Tabla1.A" style:family="table-column">
      <style:table-column-properties style:column-width="15.095cm"/>
    </style:style>
    <style:style style:name="Tabla1.A1" style:family="table-cell">
      <style:table-cell-properties fo:background-color="#eeeeee" fo:padding="0cm" fo:border="none">
        <style:background-image/>
      </style:table-cell-properties>
    </style:style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3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3.99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 style:list-style-name="">
      <style:paragraph-properties fo:line-height="115%"/>
    </style:style>
    <style:style style:name="P9" style:family="paragraph" style:parent-style-name="Text_20_body">
      <style:paragraph-properties fo:text-align="center" style:justify-single-word="false"/>
      <style:text-properties fo:background-color="#ffffd7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2">
      <style:text-properties officeooo:paragraph-rsid="00c2ff83"/>
    </style:style>
    <style:style style:name="P14" style:family="paragraph" style:parent-style-name="Heading_20_2" style:list-style-name="">
      <style:paragraph-properties fo:line-height="150%" fo:text-align="justify" style:justify-single-word="false">
        <style:tab-stops/>
      </style:paragraph-properties>
      <style:text-properties style:font-name="Arial3" officeooo:paragraph-rsid="00c2ff83"/>
    </style:style>
    <style:style style:name="P15" style:family="paragraph" style:parent-style-name="Quotations">
      <style:paragraph-properties fo:margin-top="0cm" fo:margin-bottom="0.247cm" style:contextual-spacing="false" fo:line-height="150%" fo:text-align="justify" style:justify-single-word="false">
        <style:tab-stops/>
      </style:paragraph-properties>
      <style:text-properties style:font-name="Arial3"/>
    </style:style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3"/>
    <style:style style:name="P18" style:family="paragraph" style:parent-style-name="Text_20_body">
      <style:text-properties officeooo:paragraph-rsid="00c51aa5"/>
    </style:style>
    <style:style style:name="P19" style:family="paragraph" style:parent-style-name="Heading_20_2" style:list-style-name="">
      <style:paragraph-properties fo:line-height="150%" fo:text-align="justify" style:justify-single-word="false">
        <style:tab-stops/>
      </style:paragraph-properties>
      <style:text-properties style:font-name="Arial3" officeooo:paragraph-rsid="00c51aa5"/>
    </style:style>
    <style:style style:name="P20" style:family="paragraph" style:parent-style-name="Heading_20_4">
      <style:paragraph-properties fo:margin-top="0cm" fo:margin-bottom="0.247cm" style:contextual-spacing="false" fo:line-height="150%" fo:text-align="justify" style:justify-single-word="false">
        <style:tab-stops/>
      </style:paragraph-properties>
      <style:text-properties style:font-name="Arial3"/>
    </style:style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4"/>
    <style:style style:name="P23" style:family="paragraph" style:parent-style-name="Text_20_body">
      <style:text-properties officeooo:paragraph-rsid="00c6b289"/>
    </style:style>
    <style:style style:name="P24" style:family="paragraph" style:parent-style-name="Text_20_body">
      <style:paragraph-properties fo:text-align="center" style:justify-single-word="false"/>
      <style:text-properties officeooo:paragraph-rsid="00c6b289" fo:background-color="#ffffd7"/>
    </style:style>
    <style:style style:name="P25" style:family="paragraph" style:parent-style-name="Text_20_body">
      <style:paragraph-properties fo:text-align="start" style:justify-single-word="false"/>
      <style:text-properties officeooo:paragraph-rsid="00c6b289"/>
    </style:style>
    <style:style style:name="P26" style:family="paragraph" style:parent-style-name="Text_20_body" style:list-style-name="L5">
      <style:paragraph-properties fo:margin-top="0cm" fo:margin-bottom="0cm" style:contextual-spacing="false"/>
    </style:style>
    <style:style style:name="P27" style:family="paragraph" style:parent-style-name="Text_20_body" style:list-style-name="L5"/>
    <style:style style:name="P28" style:family="paragraph" style:parent-style-name="Heading_20_1" style:list-style-name="">
      <style:paragraph-properties fo:line-height="115%"/>
      <style:text-properties officeooo:paragraph-rsid="00cac290"/>
    </style:style>
    <style:style style:name="P29" style:family="paragraph" style:parent-style-name="Heading_20_1">
      <style:paragraph-properties fo:break-before="page"/>
      <style:text-properties officeooo:paragraph-rsid="00cac290"/>
    </style:style>
    <style:style style:name="P30" style:family="paragraph" style:parent-style-name="Text_20_body" style:list-style-name="L6">
      <style:paragraph-properties fo:margin-top="0cm" fo:margin-bottom="0cm" style:contextual-spacing="false"/>
    </style:style>
    <style:style style:name="P31" style:family="paragraph" style:parent-style-name="Text_20_body" style:list-style-name="L6"/>
    <style:style style:name="P32" style:family="paragraph" style:parent-style-name="Text_20_body" style:list-style-name="L7">
      <style:paragraph-properties fo:margin-top="0cm" fo:margin-bottom="0cm" style:contextual-spacing="false"/>
    </style:style>
    <style:style style:name="P33" style:family="paragraph" style:parent-style-name="Text_20_body" style:list-style-name="L7"/>
    <style:style style:name="P34" style:family="paragraph" style:parent-style-name="Heading_20_3" style:list-style-name="">
      <style:paragraph-properties fo:margin-top="0cm" fo:margin-bottom="0.247cm" style:contextual-spacing="false" fo:line-height="150%" fo:text-align="justify" style:justify-single-word="false">
        <style:tab-stops/>
      </style:paragraph-properties>
      <style:text-properties style:font-name="Arial3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Text_20_body" style:list-style-name="L8">
      <style:paragraph-properties fo:margin-top="0cm" fo:margin-bottom="0cm" style:contextual-spacing="false"/>
    </style:style>
    <style:style style:name="P37" style:family="paragraph" style:parent-style-name="Text_20_body" style:list-style-name="L8"/>
    <style:style style:name="P38" style:family="paragraph" style:parent-style-name="Heading_20_2" style:list-style-name="">
      <style:paragraph-properties fo:line-height="150%" fo:text-align="justify" style:justify-single-word="false">
        <style:tab-stops/>
      </style:paragraph-properties>
      <style:text-properties style:font-name="Arial3"/>
    </style:style>
    <style:style style:name="P39" style:family="paragraph" style:parent-style-name="Text_20_body">
      <style:paragraph-properties fo:text-align="start" style:justify-single-word="false"/>
      <style:text-properties fo:background-color="transparent"/>
    </style:style>
    <style:style style:name="P40" style:family="paragraph" style:parent-style-name="Heading_20_3">
      <style:paragraph-properties fo:margin-top="0cm" fo:margin-bottom="0.247cm" style:contextual-spacing="false" fo:line-height="150%" fo:text-align="justify" style:justify-single-word="false">
        <style:tab-stops/>
      </style:paragraph-properties>
      <style:text-properties style:font-name="Arial3"/>
    </style:style>
    <style:style style:name="P41" style:family="paragraph" style:parent-style-name="Text_20_body" style:list-style-name="L9">
      <style:paragraph-properties fo:margin-top="0cm" fo:margin-bottom="0cm" style:contextual-spacing="false"/>
    </style:style>
    <style:style style:name="P42" style:family="paragraph" style:parent-style-name="Text_20_body" style:list-style-name="L9"/>
    <style:style style:name="P43" style:family="paragraph" style:parent-style-name="Text_20_body" style:list-style-name="L10"/>
    <style:style style:name="P44" style:family="paragraph" style:parent-style-name="Text_20_body" style:list-style-name="L11">
      <style:text-properties officeooo:paragraph-rsid="00d35248"/>
    </style:style>
    <style:style style:name="P45" style:family="paragraph" style:parent-style-name="Text_20_body" style:list-style-name="L11"/>
    <style:style style:name="P46" style:family="paragraph" style:parent-style-name="Text_20_body" style:list-style-name="L12">
      <style:paragraph-properties fo:margin-top="0cm" fo:margin-bottom="0cm" style:contextual-spacing="false"/>
    </style:style>
    <style:style style:name="P47" style:family="paragraph" style:parent-style-name="Text_20_body" style:list-style-name="L12"/>
    <style:style style:name="P48" style:family="paragraph" style:parent-style-name="Heading_20_1" style:list-style-name="">
      <style:paragraph-properties fo:line-height="115%"/>
      <style:text-properties officeooo:paragraph-rsid="00d60710"/>
    </style:style>
    <style:style style:name="P49" style:family="paragraph" style:parent-style-name="Heading_20_1">
      <style:paragraph-properties fo:break-before="page"/>
      <style:text-properties officeooo:paragraph-rsid="00d60710"/>
    </style:style>
    <style:style style:name="P50" style:family="paragraph" style:parent-style-name="Text_20_body">
      <style:text-properties officeooo:paragraph-rsid="00d60710"/>
    </style:style>
    <style:style style:name="P5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52" style:family="paragraph" style:parent-style-name="Text_20_body" style:list-style-name="L13">
      <style:paragraph-properties fo:margin-top="0cm" fo:margin-bottom="0cm" style:contextual-spacing="false"/>
    </style:style>
    <style:style style:name="P53" style:family="paragraph" style:parent-style-name="Text_20_body" style:list-style-name="L13"/>
    <style:style style:name="P54" style:family="paragraph" style:parent-style-name="Text_20_body" style:list-style-name="L14">
      <style:paragraph-properties fo:margin-top="0cm" fo:margin-bottom="0cm" style:contextual-spacing="false"/>
    </style:style>
    <style:style style:name="P55" style:family="paragraph" style:parent-style-name="Text_20_body" style:list-style-name="L14">
      <style:text-properties officeooo:paragraph-rsid="00dd1983"/>
    </style:style>
    <style:style style:name="P56" style:family="paragraph" style:parent-style-name="Text_20_body" style:list-style-name="L15">
      <style:paragraph-properties fo:margin-top="0cm" fo:margin-bottom="0cm" style:contextual-spacing="false"/>
    </style:style>
    <style:style style:name="P57" style:family="paragraph" style:parent-style-name="Text_20_body" style:list-style-name="L15"/>
    <style:style style:name="P58" style:family="paragraph" style:parent-style-name="Text_20_body" style:list-style-name="L16">
      <style:paragraph-properties fo:margin-top="0cm" fo:margin-bottom="0cm" style:contextual-spacing="false"/>
    </style:style>
    <style:style style:name="P59" style:family="paragraph" style:parent-style-name="Text_20_body" style:list-style-name="L16"/>
    <style:style style:name="P60" style:family="paragraph" style:parent-style-name="Text_20_body" style:list-style-name="L17">
      <style:paragraph-properties fo:margin-top="0cm" fo:margin-bottom="0cm" style:contextual-spacing="false"/>
    </style:style>
    <style:style style:name="P61" style:family="paragraph" style:parent-style-name="Text_20_body" style:list-style-name="L17"/>
    <style:style style:name="P62" style:family="paragraph" style:parent-style-name="Text_20_body">
      <style:paragraph-properties fo:margin-left="0cm" fo:margin-top="0cm" fo:margin-bottom="0.247cm" style:contextual-spacing="false" fo:line-height="115%" fo:text-indent="0cm" style:auto-text-indent="false"/>
    </style:style>
    <style:style style:name="T1" style:family="text">
      <style:text-properties officeooo:rsid="00ca086e"/>
    </style:style>
    <style:style style:name="T2" style:family="text">
      <style:text-properties officeooo:rsid="00d31f4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-">
        <style:list-level-properties text:space-before="0.752cm" text:min-label-width="0.499cm"/>
        <style:text-properties fo:font-family="OpenSymbol" style:font-style-name="Regular"/>
      </text:list-level-style-bullet>
      <text:list-level-style-bullet text:level="2" text:style-name="Bullet_20_Symbols" loext:num-list-format="%2%" text:bullet-char="-">
        <style:list-level-properties text:space-before="2.002cm" text:min-label-width="0.499cm"/>
        <style:text-properties fo:font-family="OpenSymbol" style:font-style-name="Regular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P2">Índice</text:p>
          </text:index-title>
          <text:p text:style-name="P3"><text:a xlink:type="simple" xlink:href="#__RefHeading___Toc3968_3018432354" office:name="Introducción" text:style-name="Index_20_Link" text:visited-style-name="Index_20_Link">1. Introducción<text:tab/>4</text:a></text:p>
          <text:p text:style-name="P3"><text:a xlink:type="simple" xlink:href="#__RefHeading___Toc3970_3018432354" office:name="Problema Detectado" text:style-name="Index_20_Link" text:visited-style-name="Index_20_Link">2. Problema Detectado<text:tab/>5</text:a></text:p>
          <text:p text:style-name="P4"><text:a xlink:type="simple" xlink:href="#__RefHeading___Toc3972_3018432354" office:name="Riesgos principales del enfoque actual" text:style-name="Index_20_Link" text:visited-style-name="Index_20_Link">2.1 Riesgos principales del enfoque actual<text:tab/>5</text:a></text:p>
          <text:p text:style-name="P3"><text:a xlink:type="simple" xlink:href="#__RefHeading___Toc3974_3018432354" office:name="Objetivo del Anexo" text:style-name="Index_20_Link" text:visited-style-name="Index_20_Link">3. Objetivo del Anexo<text:tab/>6</text:a></text:p>
          <text:p text:style-name="P3"><text:a xlink:type="simple" xlink:href="#__RefHeading___Toc3976_3018432354" office:name="Principio de Diseño Aplicado" text:style-name="Index_20_Link" text:visited-style-name="Index_20_Link">4. Principio de Diseño Aplicado<text:tab/>7</text:a></text:p>
          <text:p text:style-name="P4"><text:a xlink:type="simple" xlink:href="#__RefHeading___Toc3978_3018432354" office:name="Código de aplicación" text:style-name="Index_20_Link" text:visited-style-name="Index_20_Link">4.1 Código de aplicación<text:tab/>7</text:a></text:p>
          <text:p text:style-name="P4"><text:a xlink:type="simple" xlink:href="#__RefHeading___Toc3980_3018432354" office:name="Datos de aplicación" text:style-name="Index_20_Link" text:visited-style-name="Index_20_Link">4.2 Datos de aplicación<text:tab/>7</text:a></text:p>
          <text:p text:style-name="P3"><text:a xlink:type="simple" xlink:href="#__RefHeading___Toc3982_3018432354" office:name="Rutas Recomendadas por Sistema Operativo" text:style-name="Index_20_Link" text:visited-style-name="Index_20_Link">5. Rutas Recomendadas por Sistema Operativo<text:tab/>8</text:a></text:p>
          <text:p text:style-name="P4"><text:a xlink:type="simple" xlink:href="#__RefHeading___Toc3984_3018432354" office:name="Windows" text:style-name="Index_20_Link" text:visited-style-name="Index_20_Link">5.1 Windows<text:tab/>8</text:a></text:p>
          <text:p text:style-name="P5"><text:a xlink:type="simple" xlink:href="#__RefHeading___Toc3986_3018432354" office:name="Ventajas en Windows" text:style-name="Index_20_Link" text:visited-style-name="Index_20_Link">Ventajas en Windows<text:tab/>8</text:a></text:p>
          <text:p text:style-name="P4"><text:a xlink:type="simple" xlink:href="#__RefHeading___Toc3988_3018432354" office:name="Linux / Unix" text:style-name="Index_20_Link" text:visited-style-name="Index_20_Link">5.2 Linux / Unix<text:tab/>8</text:a></text:p>
          <text:p text:style-name="P5"><text:a xlink:type="simple" xlink:href="#__RefHeading___Toc3990_3018432354" office:name="Ventajas en Linux" text:style-name="Index_20_Link" text:visited-style-name="Index_20_Link">Ventajas en Linux<text:tab/>9</text:a></text:p>
          <text:p text:style-name="P3"><text:a xlink:type="simple" xlink:href="#__RefHeading___Toc3994_3018432354" office:name="Justificación Técnica de Seguridad y Protección" text:style-name="Index_20_Link" text:visited-style-name="Index_20_Link">6. Justificación Técnica de Seguridad y Protección<text:tab/>10</text:a></text:p>
          <text:p text:style-name="P4"><text:a xlink:type="simple" xlink:href="#__RefHeading___Toc3996_3018432354" office:name="Beneficios principales" text:style-name="Index_20_Link" text:visited-style-name="Index_20_Link">6.1 Beneficios principales<text:tab/>10</text:a></text:p>
          <text:p text:style-name="P6"><text:a xlink:type="simple" xlink:href="#__RefHeading___Toc3998_3018432354" office:name="Protección frente a borrados accidentales" text:style-name="Index_20_Link" text:visited-style-name="Index_20_Link">6.1.1 Protección frente a borrados accidentales<text:tab/>10</text:a></text:p>
          <text:p text:style-name="P6"><text:a xlink:type="simple" xlink:href="#__RefHeading___Toc4000_3018432354" office:name="Independencia del proyecto fuente" text:style-name="Index_20_Link" text:visited-style-name="Index_20_Link">6.1.2 Independencia del proyecto fuente<text:tab/>10</text:a></text:p>
          <text:p text:style-name="P6"><text:a xlink:type="simple" xlink:href="#__RefHeading___Toc4002_3018432354" office:name="Mejor preparación para futuras funciones" text:style-name="Index_20_Link" text:visited-style-name="Index_20_Link">6.1.3 Mejor preparación para futuras funciones<text:tab/>11</text:a></text:p>
          <text:p text:style-name="P3"><text:a xlink:type="simple" xlink:href="#__RefHeading___Toc4004_3018432354" office:name="Estructura Recomendada de Datos de Aplicación" text:style-name="Index_20_Link" text:visited-style-name="Index_20_Link">7. Estructura Recomendada de Datos de Aplicación<text:tab/>12</text:a></text:p>
          <text:p text:style-name="P4"><text:a xlink:type="simple" xlink:href="#__RefHeading___Toc4006_3018432354" office:name="Explicación de esta estructura" text:style-name="Index_20_Link" text:visited-style-name="Index_20_Link">7.1 Explicación de esta estructura<text:tab/>12</text:a></text:p>
          <text:p text:style-name="P3"><text:a xlink:type="simple" xlink:href="#__RefHeading___Toc4008_3018432354" office:name="Lógica Técnica Requerida" text:style-name="Index_20_Link" text:visited-style-name="Index_20_Link">8. Lógica Técnica Requerida<text:tab/>14</text:a></text:p>
          <text:p text:style-name="P3"><text:a xlink:type="simple" xlink:href="#__RefHeading___Toc4016_3018432354" office:name="Flujo Lógico de Funcionamiento" text:style-name="Index_20_Link" text:visited-style-name="Index_20_Link">9. Flujo Lógico de Funcionamiento<text:tab/>15</text:a></text:p>
          <text:p text:style-name="P4"><text:a xlink:type="simple" xlink:href="#__RefHeading___Toc4018_3018432354" office:name="Paso 1" text:style-name="Index_20_Link" text:visited-style-name="Index_20_Link">9.1 Paso 1<text:tab/>15</text:a></text:p>
          <text:p text:style-name="P4"><text:a xlink:type="simple" xlink:href="#__RefHeading___Toc4020_3018432354" office:name="Paso 2" text:style-name="Index_20_Link" text:visited-style-name="Index_20_Link">9.2 Paso 2<text:tab/>15</text:a></text:p>
          <text:p text:style-name="P4"><text:a xlink:type="simple" xlink:href="#__RefHeading___Toc4022_3018432354" office:name="Paso 3" text:style-name="Index_20_Link" text:visited-style-name="Index_20_Link">9.3 Paso 3<text:tab/>15</text:a></text:p>
          <text:p text:style-name="P4"><text:a xlink:type="simple" xlink:href="#__RefHeading___Toc4024_3018432354" office:name="Paso 4" text:style-name="Index_20_Link" text:visited-style-name="Index_20_Link">9.4 Paso 4<text:tab/>15</text:a></text:p>
          <text:p text:style-name="P4"><text:a xlink:type="simple" xlink:href="#__RefHeading___Toc4026_3018432354" office:name="Paso 5" text:style-name="Index_20_Link" text:visited-style-name="Index_20_Link">9.5 Paso 5<text:tab/>15</text:a></text:p>
          <text:p text:style-name="P4"><text:a xlink:type="simple" xlink:href="#__RefHeading___Toc1025_3463809090" office:name="Paso 6" text:style-name="Index_20_Link" text:visited-style-name="Index_20_Link">9.6 Paso 6<text:tab/>15</text:a></text:p>
          <text:p text:style-name="P4"><text:a xlink:type="simple" xlink:href="#__RefHeading___Toc1027_3463809090" office:name="Paso 7" text:style-name="Index_20_Link" text:visited-style-name="Index_20_Link">9.7 Paso 7<text:tab/>15</text:a></text:p>
          <text:p text:style-name="P3"><text:a xlink:type="simple" xlink:href="#__RefHeading___Toc4032_3018432354" office:name="Lógica Técnica Esperada (Conceptual)" text:style-name="Index_20_Link" text:visited-style-name="Index_20_Link">10. Lógica Técnica Esperada (Conceptual)<text:tab/>16</text:a></text:p>
          <text:p text:style-name="P4"><text:a xlink:type="simple" xlink:href="#__RefHeading___Toc4034_3018432354" office:name=" Comportamiento esperado" text:style-name="Index_20_Link" text:visited-style-name="Index_20_Link">10.1 <text:s/>Comportamiento esperado<text:tab/>16</text:a></text:p>
          <text:p text:style-name="P3"><text:a xlink:type="simple" xlink:href="#__RefHeading___Toc4036_3018432354" office:name="Propuesta de Responsabilidad Técnica por Clase" text:style-name="Index_20_Link" text:visited-style-name="Index_20_Link">11. Propuesta de Responsabilidad Técnica por Clase<text:tab/>17</text:a></text:p>
          <text:p text:style-name="P4"><text:a xlink:type="simple" xlink:href="#__RefHeading___Toc4038_3018432354" office:name=" Opción recomendada" text:style-name="Index_20_Link" text:visited-style-name="Index_20_Link">11.1 <text:s/>Opción recomendada<text:tab/>17</text:a></text:p>
          <text:p text:style-name="P3"><text:a xlink:type="simple" xlink:href="#__RefHeading___Toc4042_3018432354" office:name="Requisitos Funcionales Asociados" text:style-name="Index_20_Link" text:visited-style-name="Index_20_Link">12. Requisitos Funcionales Asociados<text:tab/>18</text:a></text:p>
          <text:p text:style-name="P4"><text:a xlink:type="simple" xlink:href="#__RefHeading___Toc4044_3018432354" office:name=" RF-I.1" text:style-name="Index_20_Link" text:visited-style-name="Index_20_Link">12.1 <text:s/>RF-I.1<text:tab/>18</text:a></text:p>
          <text:p text:style-name="P4"><text:a xlink:type="simple" xlink:href="#__RefHeading___Toc4046_3018432354" office:name=" RF-I.2" text:style-name="Index_20_Link" text:visited-style-name="Index_20_Link">12.2 <text:s/>RF-I.2<text:tab/>18</text:a></text:p>
          <text:p text:style-name="P4"><text:a xlink:type="simple" xlink:href="#__RefHeading___Toc4048_3018432354" office:name=" RF-I.3" text:style-name="Index_20_Link" text:visited-style-name="Index_20_Link">12.3 <text:s/>RF-I.3<text:tab/>18</text:a></text:p>
          <text:p text:style-name="P4"><text:a xlink:type="simple" xlink:href="#__RefHeading___Toc4050_3018432354" office:name=" RF-I.4" text:style-name="Index_20_Link" text:visited-style-name="Index_20_Link">12.4 <text:s/>RF-I.4<text:tab/>18</text:a></text:p>
          <text:p text:style-name="P4"><text:a xlink:type="simple" xlink:href="#__RefHeading___Toc4052_3018432354" office:name=" RF-I.5" text:style-name="Index_20_Link" text:visited-style-name="Index_20_Link">12.5 <text:s/>RF-I.5<text:tab/>18</text:a></text:p>
          <text:p text:style-name="P3"><text:a xlink:type="simple" xlink:href="#__RefHeading___Toc4054_3018432354" office:name="Requisitos No Funcionales Asociados" text:style-name="Index_20_Link" text:visited-style-name="Index_20_Link">13. Requisitos No Funcionales Asociados<text:tab/>19</text:a></text:p>
          <text:p text:style-name="P4"><text:a xlink:type="simple" xlink:href="#__RefHeading___Toc4056_3018432354" office:name=" RNF-I.1 — Robustez" text:style-name="Index_20_Link" text:visited-style-name="Index_20_Link">13.1 <text:s/>RNF-I.1 — Robustez<text:tab/>19</text:a></text:p>
          <text:p text:style-name="P4"><text:a xlink:type="simple" xlink:href="#__RefHeading___Toc4058_3018432354" office:name=" RNF-I.2 — Portabilidad" text:style-name="Index_20_Link" text:visited-style-name="Index_20_Link">13.2 <text:s/>RNF-I.2 — Portabilidad<text:tab/>19</text:a></text:p>
          <text:p text:style-name="P4"><text:a xlink:type="simple" xlink:href="#__RefHeading___Toc4060_3018432354" office:name=" RNF-I.3 — Mantenibilidad" text:style-name="Index_20_Link" text:visited-style-name="Index_20_Link">13.3 <text:s/>RNF-I.3 — Mantenibilidad<text:tab/>19</text:a></text:p>
          <text:p text:style-name="P4"><text:a xlink:type="simple" xlink:href="#__RefHeading___Toc4062_3018432354" office:name=" RNF-I.4 — Seguridad Operativa" text:style-name="Index_20_Link" text:visited-style-name="Index_20_Link"><text:soft-page-break/>13.4 <text:s/>RNF-I.4 — Seguridad Operativa<text:tab/>19</text:a></text:p>
          <text:p text:style-name="P3"><text:a xlink:type="simple" xlink:href="#__RefHeading___Toc4064_3018432354" office:name="Consideraciones de Migración desde la BETA" text:style-name="Index_20_Link" text:visited-style-name="Index_20_Link">14. Consideraciones de Migración desde la BETA<text:tab/>20</text:a></text:p>
          <text:p text:style-name="P4"><text:a xlink:type="simple" xlink:href="#__RefHeading___Toc4066_3018432354" office:name="Recomendación de migración" text:style-name="Index_20_Link" text:visited-style-name="Index_20_Link">14.1 Recomendación de migración<text:tab/>20</text:a></text:p>
          <text:p text:style-name="P6"><text:a xlink:type="simple" xlink:href="#__RefHeading___Toc1029_3463809090" office:name="Beneficios" text:style-name="Index_20_Link" text:visited-style-name="Index_20_Link">14.1.1 Beneficios<text:tab/>20</text:a></text:p>
          <text:p text:style-name="P3"><text:a xlink:type="simple" xlink:href="#__RefHeading___Toc4070_3018432354" office:name="Riesgos si No se Implementa esta Mejora" text:style-name="Index_20_Link" text:visited-style-name="Index_20_Link">15. Riesgos si No se Implementa esta Mejora<text:tab/>21</text:a></text:p>
          <text:p text:style-name="P3"><text:a xlink:type="simple" xlink:href="#__RefHeading___Toc4072_3018432354" office:name="Conclusión" text:style-name="Index_20_Link" text:visited-style-name="Index_20_Link">16. Conclusión<text:tab/>22</text:a></text:p>
        </text:index-body>
      </text:table-of-content>
      <text:p text:style-name="Text_20_body"/>
      <text:h text:style-name="P7" text:outline-level="1"><text:bookmark-start text:name="__RefHeading___Toc3968_3018432354"/><text:span text:style-name="Strong_20_Emphasis">Introducción</text:span><text:bookmark-end text:name="__RefHeading___Toc3968_3018432354"/></text:h>
      <text:p text:style-name="Text_20_body">En la versión <text:span text:style-name="Strong_20_Emphasis">v1.0.1-BETA</text:span> de Habitly se implementó un sistema funcional de persistencia basado en <text:span text:style-name="Strong_20_Emphasis">serialización de objetos Java</text:span>, permitiendo guardar y recuperar el inventario de viviendas mediante un archivo binario con extensión <text:span text:style-name="Source_20_Text">.dat</text:span>.</text:p>
      <text:p text:style-name="Text_20_body">Actualmente, dicho archivo se almacena de forma visible y directa dentro del entorno de trabajo del proyecto, lo que supone una solución válida para la etapa beta, pero <text:span text:style-name="Strong_20_Emphasis">insuficiente desde una perspectiva de seguridad, mantenimiento y experiencia de usuario</text:span>.</text:p>
      <text:p text:style-name="Text_20_body">Por este motivo, de cara a la evolución técnica de <text:span text:style-name="Strong_20_Emphasis">Habitly v1.0.1A</text:span>, se plantea la incorporación de un <text:span text:style-name="Strong_20_Emphasis">protocolo de almacenamiento oculto y desacoplado del proyecto fuente</text:span>, trasladando el archivo <text:span text:style-name="Source_20_Text">inventario_habitly.dat</text:span> a una <text:span text:style-name="Strong_20_Emphasis">ruta de sistema específica del usuario</text:span>.</text:p>
      <text:p text:style-name="Text_20_body">Este anexo define la justificación, el diseño conceptual y la lógica técnica que deberá seguir esta mejora.</text:p>
      <text:h text:style-name="P8" text:outline-level="1"/>
      <text:h text:style-name="P7" text:outline-level="1"><text:bookmark-start text:name="__RefHeading___Toc3970_3018432354"/>Problema Detectado<text:bookmark-end text:name="__RefHeading___Toc3970_3018432354"/></text:h>
      <text:p text:style-name="Text_20_body">Durante la fase beta, el archivo de persistencia se encuentra en una ubicación fácilmente accesible y potencialmente expuesta, normalmente:</text:p>
      <text:p text:style-name="P9">/inventario_habitly.dat</text:p>
      <text:p text:style-name="Text_20_body">o dentro del directorio del proyecto Java.</text:p>
      <text:p text:style-name="Text_20_body">Aunque esto facilita el desarrollo inicial, también introduce varios riesgos técnicos y funcionales.</text:p>
      <text:h text:style-name="Heading_20_2" text:outline-level="2"><text:bookmark-start text:name="__RefHeading___Toc3972_3018432354"/>Riesgos principales del enfoque actual<text:bookmark-end text:name="__RefHeading___Toc3972_3018432354"/></text:h>
      <text:list text:style-name="L1">
        <text:list-item>
          <text:p text:style-name="P10"><text:span text:style-name="Strong_20_Emphasis">Borrado accidental del archivo</text:span> </text:p>
          <text:list>
            <text:list-item>
              <text:p text:style-name="P10">El usuario o desarrollador puede eliminar el archivo sin darse cuenta al limpiar carpetas del proyecto. </text:p>
            </text:list-item>
          </text:list>
        </text:list-item>
        <text:list-item>
          <text:p text:style-name="P10"><text:span text:style-name="Strong_20_Emphasis">Pérdida de datos por reorganización manual</text:span> </text:p>
          <text:list>
            <text:list-item>
              <text:p text:style-name="P10">Si se mueve la carpeta del proyecto, el archivo puede quedar fuera de contexto o desaparecer. </text:p>
            </text:list-item>
          </text:list>
        </text:list-item>
        <text:list-item>
          <text:p text:style-name="P10"><text:span text:style-name="Strong_20_Emphasis">Exposición innecesaria de datos</text:span> </text:p>
          <text:list>
            <text:list-item>
              <text:p text:style-name="P10">El archivo queda demasiado visible dentro del sistema de archivos. </text:p>
            </text:list-item>
          </text:list>
        </text:list-item>
        <text:list-item>
          <text:p text:style-name="P10"><text:span text:style-name="Strong_20_Emphasis">Dependencia del entorno de desarrollo</text:span> </text:p>
          <text:list>
            <text:list-item>
              <text:p text:style-name="P10">La persistencia queda ligada a la estructura de IntelliJ o del proyecto fuente, en lugar de comportarse como una aplicación independiente. </text:p>
            </text:list-item>
          </text:list>
        </text:list-item>
        <text:list-item>
          <text:p text:style-name="P10"><text:span text:style-name="Strong_20_Emphasis">Mala escalabilidad futura</text:span> </text:p>
          <text:list>
            <text:list-item>
              <text:p text:style-name="P11">Si más adelante se añaden configuraciones, caché, logs o preferencias, no habrá una ruta organizada para alojarlos. </text:p>
            </text:list-item>
          </text:list>
        </text:list-item>
      </text:list>
      <text:p text:style-name="Text_20_body">En resumen, <text:span text:style-name="Strong_20_Emphasis">la ubicación actual del archivo es funcional para pruebas, pero no adecuada para una aplicación en crecimiento</text:span>.</text:p>
      <text:h text:style-name="Heading_20_1" text:outline-level="1"><text:bookmark-start text:name="__RefHeading___Toc3974_3018432354"/><text:soft-page-break/>Objetivo del Anexo <text:bookmark-end text:name="__RefHeading___Toc3974_3018432354"/></text:h>
      <text:p text:style-name="Text_20_body">El objetivo de esta mejora es definir una política clara para que Habitly almacene sus datos persistentes en una <text:span text:style-name="Strong_20_Emphasis">ruta segura, estable y específica del usuario del sistema operativo</text:span>, evitando que la información crítica dependa directamente del directorio del proyecto.</text:p>
      <text:p text:style-name="Text_20_body">Esto permitirá que Habitly:</text:p>
      <text:list text:style-name="L2">
        <text:list-item>
          <text:p text:style-name="P12">sea más robusto ante errores humanos, </text:p>
        </text:list-item>
        <text:list-item>
          <text:p text:style-name="P12">desacople su almacenamiento del entorno de desarrollo, </text:p>
        </text:list-item>
        <text:list-item>
          <text:p text:style-name="P12">se comporte más como una aplicación real, </text:p>
        </text:list-item>
        <text:list-item>
          <text:p text:style-name="P13">y prepare una base más profesional para futuras versiones. </text:p>
        </text:list-item>
      </text:list>
      <text:h text:style-name="P14" text:outline-level="2"/>
      <text:h text:style-name="P7" text:outline-level="1"><text:bookmark-start text:name="__RefHeading___Toc3976_3018432354"/>Principio de Diseño Aplicado<text:bookmark-end text:name="__RefHeading___Toc3976_3018432354"/></text:h>
      <text:p text:style-name="Text_20_body">La mejora propuesta se basa en un principio fundamental de diseño de software:</text:p>
      <text:p text:style-name="P15"><text:span text:style-name="Strong_20_Emphasis">Los datos de aplicación no deben depender de la carpeta del código fuente.</text:span></text:p>
      <text:p text:style-name="Text_20_body">El código fuente puede:</text:p>
      <text:list text:style-name="L3">
        <text:list-item>
          <text:p text:style-name="P16">moverse, </text:p>
        </text:list-item>
        <text:list-item>
          <text:p text:style-name="P16">refactorizarse, </text:p>
        </text:list-item>
        <text:list-item>
          <text:p text:style-name="P16">clonarse, </text:p>
        </text:list-item>
        <text:list-item>
          <text:p text:style-name="P16">borrarse, </text:p>
        </text:list-item>
        <text:list-item>
          <text:p text:style-name="P16">exportarse, </text:p>
        </text:list-item>
        <text:list-item>
          <text:p text:style-name="P17">o incluso reconstruirse desde GitHub. </text:p>
        </text:list-item>
      </text:list>
      <text:p text:style-name="Text_20_body">Sin embargo, <text:span text:style-name="Strong_20_Emphasis">los datos del usuario deben mantenerse en una ubicación más estable y persistente</text:span>, propia del sistema operativo.</text:p>
      <text:p text:style-name="Text_20_body">Por tanto, Habitly debe empezar a separar:</text:p>
      <text:h text:style-name="Heading_20_2" text:outline-level="2"><text:bookmark-start text:name="__RefHeading___Toc3978_3018432354"/>Código de aplicación<text:bookmark-end text:name="__RefHeading___Toc3978_3018432354"/></text:h>
      <text:p text:style-name="Text_20_body">Archivos <text:span text:style-name="Source_20_Text">.java</text:span>, configuración de IntelliJ, estructura Git, etc.</text:p>
      <text:h text:style-name="Heading_20_2" text:outline-level="2"><text:bookmark-start text:name="__RefHeading___Toc3980_3018432354"/>Datos de aplicación<text:bookmark-end text:name="__RefHeading___Toc3980_3018432354"/></text:h>
      <text:p text:style-name="Text_20_body">Inventario, configuración interna, historial futuro, preferencias, etc.</text:p>
      <text:p text:style-name="P18">Esta separación mejora la mantenibilidad y profesionaliza la arquitectura del proyecto.</text:p>
      <text:h text:style-name="P19" text:outline-level="2"/>
      <text:h text:style-name="P7" text:outline-level="1"><text:bookmark-start text:name="__RefHeading___Toc3982_3018432354"/>Rutas Recomendadas por Sistema Operativo<text:bookmark-end text:name="__RefHeading___Toc3982_3018432354"/></text:h>
      <text:p text:style-name="Text_20_body">Habitly deberá guardar sus datos en una carpeta específica de usuario, según el sistema operativo detectado.</text:p>
      <text:h text:style-name="Heading_20_2" text:outline-level="2"><text:bookmark-start text:name="__RefHeading___Toc3984_3018432354"/>Windows<text:bookmark-end text:name="__RefHeading___Toc3984_3018432354"/></text:h>
      <text:p text:style-name="Text_20_body">En sistemas Windows, la ruta recomendada es:</text:p>
      <text:p text:style-name="P9"><text:bookmark text:name="code-block-viewer"/>%AppData%\Habitly\</text:p>
      <text:p text:style-name="Text_20_body">Ejemplo real:</text:p>
      <text:p text:style-name="P9"><text:bookmark text:name="code-block-viewer Copia 1"/>C:\Users\NombreUsuario\AppData\Roaming\Habitly\</text:p>
      <text:p text:style-name="Text_20_body">Archivo final:</text:p>
      <text:p text:style-name="P9"><text:bookmark text:name="code-block-viewer Copia 2"/>C:\Users\NombreUsuario\AppData\Roaming\Habitly\inventario_habitly.dat</text:p>
      <text:h text:style-name="P20" text:outline-level="4"><text:bookmark-start text:name="__RefHeading___Toc3986_3018432354"/>Ventajas en Windows<text:bookmark-end text:name="__RefHeading___Toc3986_3018432354"/></text:h>
      <text:list text:style-name="L4">
        <text:list-item>
          <text:p text:style-name="P21">Ruta estándar para datos de aplicación. </text:p>
        </text:list-item>
        <text:list-item>
          <text:p text:style-name="P21">Separación del escritorio o carpetas visibles. </text:p>
        </text:list-item>
        <text:list-item>
          <text:p text:style-name="P21">Menor probabilidad de borrado accidental. </text:p>
        </text:list-item>
        <text:list-item>
          <text:p text:style-name="P22">Mayor consistencia con el comportamiento esperado de una aplicación instalada. </text:p>
        </text:list-item>
      </text:list>
      <text:h text:style-name="Heading_20_2" text:outline-level="2"><text:bookmark-start text:name="__RefHeading___Toc3988_3018432354"/>Linux / Unix<text:bookmark-end text:name="__RefHeading___Toc3988_3018432354"/></text:h>
      <text:p text:style-name="P23">En sistemas Linux o Unix-like, la ruta recomendada es:</text:p>
      <text:p text:style-name="P24"><text:span text:style-name="T1">~</text:span>/.habitly/</text:p>
      <text:p text:style-name="P25">Ejemplo real:</text:p>
      <text:p text:style-name="P9"><text:bookmark text:name="code-block-viewer Copia 4"/>/home/usuario/.habitly/</text:p>
      <text:p text:style-name="Text_20_body">Archivo final:</text:p>
      <text:p text:style-name="P9"><text:bookmark text:name="code-block-viewer Copia 5"/>/home/usuario/.habitly/inventario_habitly.dat</text:p>
      <text:h text:style-name="P20" text:outline-level="4"><text:bookmark-start text:name="__RefHeading___Toc3990_3018432354"/><text:soft-page-break/>Ventajas en Linux<text:bookmark-end text:name="__RefHeading___Toc3990_3018432354"/></text:h>
      <text:list text:style-name="L5">
        <text:list-item>
          <text:p text:style-name="P26">Uso de carpeta oculta estándar. </text:p>
        </text:list-item>
        <text:list-item>
          <text:p text:style-name="P26">Aislamiento del almacenamiento del usuario. </text:p>
        </text:list-item>
        <text:list-item>
          <text:p text:style-name="P27">Compatibilidad con convenciones típicas del sistema.</text:p>
        </text:list-item>
      </text:list>
      <text:h text:style-name="P28" text:outline-level="1"/>
      <text:h text:style-name="P29" text:outline-level="1"><text:bookmark-start text:name="__RefHeading___Toc3994_3018432354"/>Justificación Técnica de Seguridad y Protección<text:bookmark-end text:name="__RefHeading___Toc3994_3018432354"/></text:h>
      <text:p text:style-name="Text_20_body">Mover el archivo <text:span text:style-name="Source_20_Text">inventario_habitly.dat</text:span> fuera de la raíz del proyecto no implica un cifrado por sí mismo, pero <text:span text:style-name="Strong_20_Emphasis">sí mejora significativamente la seguridad operativa y la resiliencia del sistema</text:span>.</text:p>
      <text:h text:style-name="Heading_20_2" text:outline-level="2"><text:bookmark-start text:name="__RefHeading___Toc3996_3018432354"/>Beneficios principales<text:bookmark-end text:name="__RefHeading___Toc3996_3018432354"/></text:h>
      <text:h text:style-name="Heading_20_3" text:outline-level="3"><text:bookmark-start text:name="__RefHeading___Toc3998_3018432354"/>Protección frente a borrados accidentales<text:bookmark-end text:name="__RefHeading___Toc3998_3018432354"/></text:h>
      <text:p text:style-name="Text_20_body">Cuando el archivo se encuentra en una carpeta de proyecto visible, el riesgo de borrado es alto por acciones como:</text:p>
      <text:list text:style-name="L6">
        <text:list-item>
          <text:p text:style-name="P30">limpiar archivos “innecesarios” </text:p>
        </text:list-item>
        <text:list-item>
          <text:p text:style-name="P30">eliminar carpetas antiguas </text:p>
        </text:list-item>
        <text:list-item>
          <text:p text:style-name="P30">reorganizar documentación </text:p>
        </text:list-item>
        <text:list-item>
          <text:p text:style-name="P31">mover backups o versiones beta </text:p>
        </text:list-item>
      </text:list>
      <text:p text:style-name="Text_20_body">Al situar el archivo en una ruta de sistema, se reduce drásticamente este riesgo.</text:p>
      <text:h text:style-name="Heading_20_3" text:outline-level="3"><text:bookmark-start text:name="__RefHeading___Toc4000_3018432354"/>Independencia del proyecto fuente<text:bookmark-end text:name="__RefHeading___Toc4000_3018432354"/></text:h>
      <text:p text:style-name="Text_20_body">El inventario de viviendas no debería perderse si el usuario:</text:p>
      <text:list text:style-name="L7">
        <text:list-item>
          <text:p text:style-name="P32">cambia de IDE, </text:p>
        </text:list-item>
        <text:list-item>
          <text:p text:style-name="P32">clona de nuevo el repositorio, </text:p>
        </text:list-item>
        <text:list-item>
          <text:p text:style-name="P32">borra una versión antigua, </text:p>
        </text:list-item>
        <text:list-item>
          <text:p text:style-name="P33">o reorganiza el código fuente. </text:p>
        </text:list-item>
      </text:list>
      <text:p text:style-name="Text_20_body">Con una ruta de usuario persistente, Habitly deja de depender del directorio de desarrollo.</text:p>
      <text:h text:style-name="P34" text:outline-level="3"/>
      <text:h text:style-name="P35" text:outline-level="3"><text:bookmark-start text:name="__RefHeading___Toc4002_3018432354"/>Mejor preparación para futuras funciones<text:bookmark-end text:name="__RefHeading___Toc4002_3018432354"/></text:h>
      <text:p text:style-name="Text_20_body">Esta decisión también prepara el sistema para alojar más adelante otros elementos como:</text:p>
      <text:list text:style-name="L8">
        <text:list-item>
          <text:p text:style-name="P36">archivos de configuración </text:p>
        </text:list-item>
        <text:list-item>
          <text:p text:style-name="P36">logs internos </text:p>
        </text:list-item>
        <text:list-item>
          <text:p text:style-name="P36">caché temporal </text:p>
        </text:list-item>
        <text:list-item>
          <text:p text:style-name="P36">backups automáticos </text:p>
        </text:list-item>
        <text:list-item>
          <text:p text:style-name="P36">historial de operaciones </text:p>
        </text:list-item>
        <text:list-item>
          <text:p text:style-name="P37">preferencias de usuario </text:p>
        </text:list-item>
      </text:list>
      <text:p text:style-name="Text_20_body">Por tanto, no se trata solo de mover un <text:span text:style-name="Source_20_Text">.dat</text:span>, sino de empezar a construir una <text:span text:style-name="Strong_20_Emphasis">estructura de almacenamiento interna escalable</text:span>.</text:p>
      <text:h text:style-name="P38" text:outline-level="2"/>
      <text:h text:style-name="P7" text:outline-level="1"><text:bookmark-start text:name="__RefHeading___Toc4004_3018432354"/>Estructura Recomendada de Datos de Aplicación<text:bookmark-end text:name="__RefHeading___Toc4004_3018432354"/></text:h>
      <text:p text:style-name="Text_20_body">A medio plazo, Habitly debería trabajar con una estructura interna similar a esta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9"/>
            <text:p text:style-name="P39"><text:span text:style-name="T2">H</text:span>abitly/</text:p>
            <text:p text:style-name="P39">├── inventario_habitly.dat</text:p>
            <text:p text:style-name="P39">├── config.properties</text:p>
            <text:p text:style-name="P39">├── logs/</text:p>
            <text:p text:style-name="P39">│ <text:s text:c="2"/>└── habitly.log</text:p>
            <text:p text:style-name="P39">├── cache/</text:p>
            <text:p text:style-name="P39">│ <text:s text:c="2"/>└── temp_cache.dat</text:p>
            <text:p text:style-name="P39">└── backups/</text:p>
            <text:p text:style-name="P39"><text:s text:c="4"/>└── inventario_backup.dat</text:p>
          </table:table-cell>
        </table:table-row>
      </table:table>
      <text:h text:style-name="P40" text:outline-level="3" text:is-list-header="true"/>
      <text:h text:style-name="Heading_20_2" text:outline-level="2"><text:bookmark-start text:name="__RefHeading___Toc4006_3018432354"/>Explicación de esta estructura<text:bookmark-end text:name="__RefHeading___Toc4006_3018432354"/></text:h>
      <text:list text:style-name="L9">
        <text:list-item>
          <text:p text:style-name="P41"><text:span text:style-name="Source_20_Text">inventario_habitly.dat</text:span> </text:p>
          <text:list>
            <text:list-item>
              <text:p text:style-name="P41">Archivo principal de persistencia del inventario. </text:p>
            </text:list-item>
          </text:list>
        </text:list-item>
        <text:list-item>
          <text:p text:style-name="P41"><text:span text:style-name="Source_20_Text">config.properties</text:span> </text:p>
          <text:list>
            <text:list-item>
              <text:p text:style-name="P41">Configuración futura del sistema. </text:p>
            </text:list-item>
          </text:list>
        </text:list-item>
        <text:list-item>
          <text:p text:style-name="P41"><text:span text:style-name="Source_20_Text">logs/</text:span> </text:p>
          <text:list>
            <text:list-item>
              <text:p text:style-name="P41">Registros técnicos para depuración o auditoría. </text:p>
            </text:list-item>
          </text:list>
        </text:list-item>
        <text:list-item>
          <text:p text:style-name="P41"><text:span text:style-name="Source_20_Text">cache/</text:span> </text:p>
          <text:list>
            <text:list-item>
              <text:p text:style-name="P41">Archivos temporales o estructuras de apoyo. </text:p>
            </text:list-item>
          </text:list>
        </text:list-item>
        <text:list-item>
          <text:p text:style-name="P41"><text:span text:style-name="Source_20_Text">backups/</text:span> </text:p>
          <text:list>
            <text:list-item>
              <text:p text:style-name="P42"><text:soft-page-break/>Copias de seguridad automáticas o manuales. </text:p>
            </text:list-item>
          </text:list>
        </text:list-item>
      </text:list>
      <text:p text:style-name="Text_20_body">En <text:span text:style-name="Strong_20_Emphasis">v1.0.1A</text:span> no es necesario implementar todo esto todavía, pero sí es importante que la ruta elegida ya permita crecer en esa dirección.</text:p>
      <text:h text:style-name="P38" text:outline-level="2"/>
      <text:h text:style-name="P7" text:outline-level="1"><text:bookmark-start text:name="__RefHeading___Toc4008_3018432354"/>Lógica Técnica Requerida<text:bookmark-end text:name="__RefHeading___Toc4008_3018432354"/></text:h>
      <text:p text:style-name="Text_20_body">Habitly deberá implementar una lógica de inicialización que garantice que la carpeta de datos exista antes de intentar guardar o leer el archivo.</text:p>
      <text:p text:style-name="Text_20_body">Esto implica tres responsabilidades técnicas:</text:p>
      <text:list text:style-name="L10">
        <text:list-item>
          <text:p text:style-name="P43"><text:bookmark-start text:name="__RefHeading___Toc4010_3018432354"/>Detectar la ruta correcta según el sistema<text:bookmark-end text:name="__RefHeading___Toc4010_3018432354"/></text:p>
        </text:list-item>
        <text:list-item>
          <text:p text:style-name="P43"><text:bookmark-start text:name="__RefHeading___Toc4012_3018432354"/>Verificar si el directorio existe<text:bookmark-end text:name="__RefHeading___Toc4012_3018432354"/></text:p>
        </text:list-item>
        <text:list-item>
          <text:p text:style-name="P43"><text:bookmark-start text:name="__RefHeading___Toc4014_3018432354"/>Crearlo automáticamente si no existe<text:bookmark-end text:name="__RefHeading___Toc4014_3018432354"/></text:p>
        </text:list-item>
      </text:list>
      <text:h text:style-name="P38" text:outline-level="2"/>
      <text:h text:style-name="P7" text:outline-level="1"><text:bookmark-start text:name="__RefHeading___Toc4016_3018432354"/>Flujo Lógico de Funcionamiento<text:bookmark-end text:name="__RefHeading___Toc4016_3018432354"/></text:h>
      <text:p text:style-name="Text_20_body">El comportamiento esperado del sistema debe ser el siguiente:</text:p>
      <text:h text:style-name="Heading_20_2" text:outline-level="2"><text:bookmark-start text:name="__RefHeading___Toc4018_3018432354"/>Paso 1<text:bookmark-end text:name="__RefHeading___Toc4018_3018432354"/></text:h>
      <text:p text:style-name="Text_20_body">Al iniciar Habitly, el programa determina la ruta de almacenamiento de datos según el sistema operativo.</text:p>
      <text:h text:style-name="Heading_20_2" text:outline-level="2"><text:bookmark-start text:name="__RefHeading___Toc4020_3018432354"/>Paso 2<text:bookmark-end text:name="__RefHeading___Toc4020_3018432354"/></text:h>
      <text:p text:style-name="Text_20_body">El sistema verifica si la carpeta base de Habitly ya existe.</text:p>
      <text:h text:style-name="Heading_20_2" text:outline-level="2"><text:bookmark-start text:name="__RefHeading___Toc4022_3018432354"/>Paso 3<text:bookmark-end text:name="__RefHeading___Toc4022_3018432354"/></text:h>
      <text:p text:style-name="Text_20_body">Si no existe, el programa debe crearla automáticamente.</text:p>
      <text:h text:style-name="Heading_20_2" text:outline-level="2"><text:bookmark-start text:name="__RefHeading___Toc4024_3018432354"/>Paso 4<text:bookmark-end text:name="__RefHeading___Toc4024_3018432354"/></text:h>
      <text:p text:style-name="Text_20_body">Una vez asegurado el directorio, el sistema busca el archivo:</text:p>
      <text:p text:style-name="P9"><text:bookmark text:name="code-block-viewer Copia 8"/>inventario_habitly.dat</text:p>
      <text:h text:style-name="Heading_20_2" text:outline-level="2"><text:bookmark-start text:name="__RefHeading___Toc4026_3018432354"/>Paso 5<text:bookmark-end text:name="__RefHeading___Toc4026_3018432354"/></text:h>
      <text:p text:style-name="Text_20_body">Si el archivo existe:</text:p>
      <text:list xml:id="list3571817204" text:style-name="L11">
        <text:list-item>
          <text:p text:style-name="P44">se intenta cargar el inventario serializado. </text:p>
        </text:list-item>
      </text:list>
      <text:h text:style-name="Heading_20_2" text:outline-level="2"><text:bookmark-start text:name="__RefHeading___Toc1025_3463809090"/>Paso 6<text:bookmark-end text:name="__RefHeading___Toc1025_3463809090"/></text:h>
      <text:p text:style-name="Text_20_body">Si el archivo no existe:</text:p>
      <text:list xml:id="list113755276799491" text:continue-numbering="true" text:style-name="L11">
        <text:list-item>
          <text:p text:style-name="P44">se crea una estructura de inventario vacía en memoria. </text:p>
        </text:list-item>
      </text:list>
      <text:h text:style-name="Heading_20_2" text:outline-level="2"><text:bookmark-start text:name="__RefHeading___Toc1027_3463809090"/>Paso 7<text:bookmark-end text:name="__RefHeading___Toc1027_3463809090"/></text:h>
      <text:p text:style-name="Text_20_body">Cada vez que se guarde el inventario:</text:p>
      <text:list text:continue-numbering="true" text:style-name="L11">
        <text:list-item>
          <text:p text:style-name="P45">se utilizará siempre esta ruta fija de aplicación. </text:p>
        </text:list-item>
      </text:list>
      <text:h text:style-name="Heading_20_1" text:outline-level="1"><text:bookmark-start text:name="__RefHeading___Toc4032_3018432354"/><text:soft-page-break/>Lógica Técnica Esperada (Conceptual)<text:bookmark-end text:name="__RefHeading___Toc4032_3018432354"/></text:h>
      <text:p text:style-name="Text_20_body">A nivel de diseño, el sistema deberá incorporar una utilidad o módulo responsable de construir la ruta persistente.</text:p>
      <text:h text:style-name="Heading_20_2" text:outline-level="2"><text:bookmark-start text:name="__RefHeading___Toc4034_3018432354"/><text:s/>Comportamiento esperado<text:bookmark-end text:name="__RefHeading___Toc4034_3018432354"/></text:h>
      <text:list text:style-name="L12">
        <text:list-item>
          <text:p text:style-name="P46">Leer la propiedad del sistema que indica el sistema operativo o el directorio del usuario. </text:p>
        </text:list-item>
        <text:list-item>
          <text:p text:style-name="P46">Resolver la ruta adecuada para Habitly. </text:p>
        </text:list-item>
        <text:list-item>
          <text:p text:style-name="P46">Crear la carpeta si no existe. </text:p>
        </text:list-item>
        <text:list-item>
          <text:p text:style-name="P47">Devolver una referencia reutilizable al archivo de inventario. </text:p>
        </text:list-item>
      </text:list>
      <text:h text:style-name="P48" text:outline-level="1"/>
      <text:h text:style-name="P49" text:outline-level="1"><text:bookmark-start text:name="__RefHeading___Toc4036_3018432354"/>Propuesta de Responsabilidad Técnica por Clase <text:bookmark-end text:name="__RefHeading___Toc4036_3018432354"/></text:h>
      <text:p text:style-name="P50">Para mantener una arquitectura limpia, esta lógica <text:span text:style-name="Strong_20_Emphasis">no debería quedar incrustada directamente en el </text:span><text:span text:style-name="Strong_20_Emphasis"><text:span text:style-name="Source_20_Text">main</text:span></text:span>.</text:p>
      <text:p text:style-name="Text_20_body">Lo recomendable es separar responsabilidades.</text:p>
      <text:h text:style-name="Heading_20_2" text:outline-level="2"><text:bookmark-start text:name="__RefHeading___Toc4038_3018432354"/><text:s/>Opción recomendada<text:bookmark-end text:name="__RefHeading___Toc4038_3018432354"/></text:h>
      <text:p text:style-name="Text_20_body">Crear una futura clase auxiliar, por ejemplo:</text:p>
      <text:p text:style-name="P9"><text:bookmark text:name="code-block-viewer Copia 9"/>RutaSistema</text:p>
      <text:p text:style-name="Text_20_body">o</text:p>
      <text:p text:style-name="P9"><text:bookmark text:name="code-block-viewer Copia 10"/>GestorPersistencia</text:p>
      <text:p text:style-name="P51"><text:bookmark-start text:name="__RefHeading___Toc4040_3018432354"/>Posibles responsabilidades de esta clase<text:bookmark-end text:name="__RefHeading___Toc4040_3018432354"/></text:p>
      <text:list text:style-name="L13">
        <text:list-item>
          <text:p text:style-name="P52">obtener la ruta de almacenamiento </text:p>
        </text:list-item>
        <text:list-item>
          <text:p text:style-name="P52">construir la carpeta de datos </text:p>
        </text:list-item>
        <text:list-item>
          <text:p text:style-name="P52">devolver la ruta del archivo <text:span text:style-name="Source_20_Text">.dat</text:span> </text:p>
        </text:list-item>
        <text:list-item>
          <text:p text:style-name="P53">centralizar la persistencia futura </text:p>
        </text:list-item>
      </text:list>
      <text:p text:style-name="Text_20_body">Esto ayuda a que <text:span text:style-name="Source_20_Text">GestionInmobiliaria</text:span> no acumule demasiadas tareas técnicas ajenas al flujo de negocio.</text:p>
      <text:h text:style-name="P38" text:outline-level="2"/>
      <text:h text:style-name="P7" text:outline-level="1"><text:bookmark-start text:name="__RefHeading___Toc4042_3018432354"/>Requisitos Funcionales Asociados<text:bookmark-end text:name="__RefHeading___Toc4042_3018432354"/></text:h>
      <text:p text:style-name="Text_20_body">Para considerar esta mejora correctamente implementada en futuras versiones, el sistema deberá cumplir los siguientes requisitos:</text:p>
      <text:h text:style-name="Heading_20_2" text:outline-level="2"><text:bookmark-start text:name="__RefHeading___Toc4044_3018432354"/><text:s/>RF-I.1<text:bookmark-end text:name="__RefHeading___Toc4044_3018432354"/></text:h>
      <text:p text:style-name="Text_20_body">Habitly deberá guardar el archivo <text:span text:style-name="Source_20_Text">inventario_habitly.dat</text:span> fuera de la carpeta raíz del proyecto.</text:p>
      <text:h text:style-name="Heading_20_2" text:outline-level="2"><text:bookmark-start text:name="__RefHeading___Toc4046_3018432354"/><text:s/>RF-I.2<text:bookmark-end text:name="__RefHeading___Toc4046_3018432354"/></text:h>
      <text:p text:style-name="Text_20_body">La ruta utilizada deberá ser específica del usuario del sistema operativo.</text:p>
      <text:h text:style-name="Heading_20_2" text:outline-level="2"><text:bookmark-start text:name="__RefHeading___Toc4048_3018432354"/><text:s/>RF-I.3<text:bookmark-end text:name="__RefHeading___Toc4048_3018432354"/></text:h>
      <text:p text:style-name="Text_20_body">El sistema deberá crear automáticamente el directorio de datos si no existe.</text:p>
      <text:h text:style-name="Heading_20_2" text:outline-level="2"><text:bookmark-start text:name="__RefHeading___Toc4050_3018432354"/><text:s/>RF-I.4<text:bookmark-end text:name="__RefHeading___Toc4050_3018432354"/></text:h>
      <text:p text:style-name="Text_20_body">La carga y guardado del inventario deberán funcionar de forma transparente para el usuario.</text:p>
      <text:h text:style-name="Heading_20_2" text:outline-level="2"><text:bookmark-start text:name="__RefHeading___Toc4052_3018432354"/><text:s/>RF-I.5<text:bookmark-end text:name="__RefHeading___Toc4052_3018432354"/></text:h>
      <text:p text:style-name="Text_20_body">La migración no deberá romper el comportamiento funcional ya existente de persistencia.</text:p>
      <text:h text:style-name="P38" text:outline-level="2"/>
      <text:h text:style-name="P7" text:outline-level="1"><text:bookmark-start text:name="__RefHeading___Toc4054_3018432354"/>Requisitos No Funcionales Asociados<text:bookmark-end text:name="__RefHeading___Toc4054_3018432354"/></text:h>
      <text:h text:style-name="Heading_20_2" text:outline-level="2"><text:bookmark-start text:name="__RefHeading___Toc4056_3018432354"/><text:s/>RNF-I.1 — Robustez<text:bookmark-end text:name="__RefHeading___Toc4056_3018432354"/></text:h>
      <text:p text:style-name="Text_20_body">La aplicación no deberá fallar si la carpeta de datos aún no existe.</text:p>
      <text:h text:style-name="Heading_20_2" text:outline-level="2"><text:bookmark-start text:name="__RefHeading___Toc4058_3018432354"/><text:s/>RNF-I.2 — Portabilidad<text:bookmark-end text:name="__RefHeading___Toc4058_3018432354"/></text:h>
      <text:p text:style-name="Text_20_body">La solución deberá ser adaptable a distintos sistemas operativos.</text:p>
      <text:h text:style-name="Heading_20_2" text:outline-level="2"><text:bookmark-start text:name="__RefHeading___Toc4060_3018432354"/><text:s/>RNF-I.3 — Mantenibilidad<text:bookmark-end text:name="__RefHeading___Toc4060_3018432354"/></text:h>
      <text:p text:style-name="Text_20_body">La lógica de rutas deberá estar desacoplada del flujo principal del menú.</text:p>
      <text:h text:style-name="Heading_20_2" text:outline-level="2"><text:bookmark-start text:name="__RefHeading___Toc4062_3018432354"/><text:s/>RNF-I.4 — Seguridad Operativa<text:bookmark-end text:name="__RefHeading___Toc4062_3018432354"/></text:h>
      <text:p text:style-name="Text_20_body">El archivo no deberá permanecer en una ubicación expuesta o fácilmente manipulable por error.</text:p>
      <text:h text:style-name="P38" text:outline-level="2"/>
      <text:h text:style-name="P7" text:outline-level="1"><text:bookmark-start text:name="__RefHeading___Toc4064_3018432354"/>Consideraciones de Migración desde la BETA<text:bookmark-end text:name="__RefHeading___Toc4064_3018432354"/></text:h>
      <text:p text:style-name="Text_20_body">Dado que la versión beta guardaba el archivo en una ubicación más simple, será necesario contemplar una transición ordenada.</text:p>
      <text:h text:style-name="Heading_20_2" text:outline-level="2"><text:bookmark-start text:name="__RefHeading___Toc4066_3018432354"/>Recomendación de migración<text:bookmark-end text:name="__RefHeading___Toc4066_3018432354"/></text:h>
      <text:p text:style-name="Text_20_body">En una primera implementación de esta mejora, Habitly podrá:</text:p>
      <text:list text:style-name="L14">
        <text:list-item>
          <text:p text:style-name="P54">comprobar si existe un archivo antiguo en la ruta vieja, </text:p>
        </text:list-item>
        <text:list-item>
          <text:p text:style-name="P55">y si existe, ofrecer migrarlo automáticamente a la nueva ruta. </text:p>
        </text:list-item>
      </text:list>
      <text:h text:style-name="Heading_20_3" text:outline-level="3"><text:bookmark-start text:name="__RefHeading___Toc1029_3463809090"/>Beneficios<text:bookmark-end text:name="__RefHeading___Toc1029_3463809090"/></text:h>
      <text:list text:style-name="L15">
        <text:list-item>
          <text:p text:style-name="P56">evita pérdida de datos de usuarios beta </text:p>
        </text:list-item>
        <text:list-item>
          <text:p text:style-name="P56">mantiene compatibilidad con el trabajo ya realizado </text:p>
        </text:list-item>
        <text:list-item>
          <text:p text:style-name="P57">facilita una transición limpia entre versiones </text:p>
        </text:list-item>
      </text:list>
      <text:p text:style-name="Text_20_body">Esta funcionalidad no es estrictamente obligatoria para la primera iteración, pero sí muy recomendable.</text:p>
      <text:h text:style-name="P38" text:outline-level="2"/>
      <text:h text:style-name="P7" text:outline-level="1"><text:bookmark-start text:name="__RefHeading___Toc4070_3018432354"/>Riesgos si No se Implementa esta Mejora<text:bookmark-end text:name="__RefHeading___Toc4070_3018432354"/></text:h>
      <text:p text:style-name="Text_20_body">Si Habitly continúa guardando sus datos en la raíz del proyecto o en rutas visibles de desarrollo, se mantendrán los siguientes riesgos:</text:p>
      <text:list text:style-name="L16">
        <text:list-item>
          <text:p text:style-name="P58">pérdida accidental del inventario </text:p>
        </text:list-item>
        <text:list-item>
          <text:p text:style-name="P58">dependencia excesiva del IDE o del entorno local </text:p>
        </text:list-item>
        <text:list-item>
          <text:p text:style-name="P58">dificultad para escalar el almacenamiento </text:p>
        </text:list-item>
        <text:list-item>
          <text:p text:style-name="P58">mala práctica de separación entre aplicación y datos </text:p>
        </text:list-item>
        <text:list-item>
          <text:p text:style-name="P59">menor profesionalidad del sistema </text:p>
        </text:list-item>
      </text:list>
      <text:p text:style-name="Text_20_body">Por tanto, esta mejora no debe considerarse “cosmética”, sino una <text:span text:style-name="Strong_20_Emphasis">mejora estructural importante</text:span>.</text:p>
      <text:h text:style-name="P38" text:outline-level="2"/>
      <text:h text:style-name="P7" text:outline-level="1"><text:bookmark-start text:name="__RefHeading___Toc4072_3018432354"/>Conclusión<text:bookmark-end text:name="__RefHeading___Toc4072_3018432354"/></text:h>
      <text:p text:style-name="Text_20_body">La migración del archivo <text:span text:style-name="Source_20_Text">inventario_habitly.dat</text:span> a una ruta de almacenamiento específica del sistema operativo representa una evolución técnica lógica y necesaria para Habitly.</text:p>
      <text:p text:style-name="Text_20_body">Aunque durante la fase beta resultó razonable mantener una persistencia sencilla dentro del entorno de desarrollo, la madurez creciente del proyecto exige una solución más robusta y coherente con el comportamiento esperado de una aplicación real.</text:p>
      <text:p text:style-name="Text_20_body">La adopción de una ruta oculta o desacoplada del proyecto permitirá:</text:p>
      <text:list text:style-name="L17">
        <text:list-item>
          <text:p text:style-name="P60">proteger mejor la información, </text:p>
        </text:list-item>
        <text:list-item>
          <text:p text:style-name="P60">reducir el riesgo de pérdida accidental, </text:p>
        </text:list-item>
        <text:list-item>
          <text:p text:style-name="P60">profesionalizar la persistencia, </text:p>
        </text:list-item>
        <text:list-item>
          <text:p text:style-name="P61">y preparar el terreno para futuras mejoras de seguridad y mantenimiento. </text:p>
        </text:list-item>
      </text:list>
      <text:p text:style-name="Text_20_body">Este anexo servirá como referencia de implementación para la evolución de Habitly en versiones posteriores, especialmente en el contexto de las mejoras previstas para la línea <text:span text:style-name="Strong_20_Emphasis">v1.1</text:span>.</text:p>
      <text:p text:style-name="Text_20_body"><text:span text:style-name="Strong_20_Emphasis"/></text:p>
      <text:p text:style-name="P62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egrita" style:font-family-generic="swiss" style:font-pitch="variable"/>
  </office:font-face-decls>
  <office:styles>
    <draw:fill-image draw:name="Portada_5f_Anexo_5f_01_5f_Protocolo_5f_Rutas_5f_Sistema_5f_y_5f_Almacenamiento_5f_Oculto_5f_Habitly_5f_Habitly" draw:display-name="Portada_Anexo_01_Protocolo_Rutas_Sistema_y_Almacenamiento_Oculto_Habitly_Habitly" xlink:href="Pictures/10000000000009B200000DB562B551AE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0.75cm" style:auto-text-indent="false" style:page-number="auto">
        <style:tab-stops/>
      </style:paragraph-properties>
      <style:text-properties style:font-name="Arial3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.6cm" fo:margin-right="0.3cm" fo:margin-top="0cm" fo:margin-bottom="0.247cm" style:contextual-spacing="false" fo:line-height="115%" style:page-number="auto"/>
      <style:text-properties fo:text-transform="uppercase" fo:color="#000080" loext:opacity="100%" style:font-name="Verdana" fo:font-family="Verdana" style:font-style-name="Negrita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.349cm" fo:margin-right="0.15cm" fo:margin-top="0cm" fo:margin-bottom="0.247cm" style:contextual-spacing="false" fo:line-height="115%"/>
      <style:text-properties fo:color="#000080" loext:opacity="100%" style:font-name="Verdana" fo:font-family="Verdana" style:font-style-name="Negrita" style:font-family-generic="swiss" style:font-pitch="variable" fo:font-size="14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left="0.349cm" fo:margin-right="0.15cm" fo:margin-top="0.247cm" fo:margin-bottom="0.212cm" style:contextual-spacing="false" style:page-number="auto"/>
      <style:text-properties fo:color="#000080" loext:opacity="100%" style:font-name="Verdana" fo:font-family="Verdana" style:font-style-name="Negrita" style:font-family-generic="swiss" style:font-pitch="variable" fo:font-size="13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ítulo_20_General" style:display-name="Título General" style:family="paragraph" style:parent-style-name="Heading"/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1_20_Cont." style:display-name="List 1 Cont." style:family="paragraph" style:parent-style-name="List" style:list-style-name="List_20_2" style:class="list" style:master-page-name="">
      <style:paragraph-properties fo:margin-top="0cm" fo:margin-bottom="0.212cm" style:contextual-spacing="false" style:page-number="auto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-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style-name="Regular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a_5f_Guion_5f_Habitly" style:display-name="Lista_Guion_Habitly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1" officeooo:rsid="009b3bce" officeooo:paragraph-rsid="009b3bce"/>
    </style:style>
    <style:style style:name="MT1" style:family="text">
      <style:text-properties officeooo:rsid="00b96c4e"/>
    </style:style>
    <style:style style:name="MT2" style:family="text">
      <style:text-properties style:font-name="Arial1" officeooo:rsid="00285030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249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ortada_5f_Anexo_5f_01_5f_Protocolo_5f_Rutas_5f_Sistema_5f_y_5f_Almacenamiento_5f_Oculto_5f_Habitly_5f_Habitly" draw:fill-image-width="100%" draw:fill-image-height="100%" style:repeat="no-repeat" draw:fill-image-ref-point="center" style:footnote-max-height="0cm" loext:margin-gutter="0cm">
        <style:background-image xlink:href="Pictures/10000000000009B200000DB562B551AE.jp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Portada_5f_Anexo_5f_01_5f_Protocolo_5f_Rutas_5f_Sistema_5f_y_5f_Almacenamiento_5f_Oculto_5f_Habitly_5f_Habitly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MP1">Anexo 01 – v1.0.<text:span text:style-name="MT1">01A</text:span></text:p>
      </style:header>
      <style:footer>
        <text:p text:style-name="Footer"><text:tab/><text:span text:style-name="MT2">Página </text:span><text:span text:style-name="MT2"><text:page-number text:select-page="current">22</text:page-number></text:span><text:span text:style-name="MT2"><text:s/>de </text:span><text:span text:style-name="MT2"><text:page-count>22</text:page-count></text:span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0:08:53.820272000</meta:creation-date>
    <dc:date>2026-04-03T11:37:54.366823800</dc:date>
    <meta:editing-duration>PT4H54M40S</meta:editing-duration>
    <meta:editing-cycles>211</meta:editing-cycles>
    <meta:generator>LibreOffice/25.8.5.2$Windows_X86_64 LibreOffice_project/9c8b85f387cc00a89945a79c9e6239f32e450ac2</meta:generator>
    <meta:print-date>2026-04-02T12:03:24.038836500</meta:print-date>
    <meta:printed-by>Archivos PDF</meta:printed-by>
    <meta:document-statistic meta:table-count="1" meta:image-count="0" meta:object-count="0" meta:page-count="22" meta:paragraph-count="267" meta:word-count="1964" meta:character-count="12819" meta:non-whitespace-character-count="11130"/>
  </office:meta>
</office:document-meta>
</file>