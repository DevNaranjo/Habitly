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9B200000DB55497D8F5.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Negrita" style:font-family-generic="swiss"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4.998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1" style:list-style-name="">
      <style:paragraph-properties fo:line-height="150%" fo:text-align="justify" style:justify-single-word="false">
        <style:tab-stops/>
      </style:paragraph-properties>
      <style:text-properties style:font-name="Arial3"/>
    </style:style>
    <style:style style:name="P6" style:family="paragraph" style:parent-style-name="Heading_20_1">
      <style:paragraph-properties fo:line-height="150%" fo:text-align="justify" style:justify-single-word="false" fo:break-before="page">
        <style:tab-stops/>
      </style:paragraph-properties>
      <style:text-properties style:font-name="Arial3"/>
    </style:style>
    <style:style style:name="P7" style:family="paragraph" style:parent-style-name="Text_20_body" style:list-style-name="List_20_2">
      <style:paragraph-properties fo:margin-top="0cm" fo:margin-bottom="0cm" style:contextual-spacing="false"/>
    </style:style>
    <style:style style:name="P8" style:family="paragraph" style:parent-style-name="Text_20_body" style:list-style-name="List_20_2"/>
    <style:style style:name="P9" style:family="paragraph" style:parent-style-name="Text_20_body">
      <style:text-properties officeooo:paragraph-rsid="00aee408"/>
    </style:style>
    <style:style style:name="P10" style:family="paragraph" style:parent-style-name="Heading_20_1" style:list-style-name="">
      <style:paragraph-properties fo:line-height="150%" fo:text-align="justify" style:justify-single-word="false">
        <style:tab-stops/>
      </style:paragraph-properties>
      <style:text-properties style:font-name="Arial3" officeooo:paragraph-rsid="00aee408"/>
    </style:style>
    <style:style style:name="P11" style:family="paragraph" style:parent-style-name="Heading_20_1" style:list-style-name="">
      <style:paragraph-properties fo:line-height="150%" fo:text-align="justify" style:justify-single-word="false">
        <style:tab-stops/>
      </style:paragraph-properties>
      <style:text-properties style:font-name="Arial3" officeooo:paragraph-rsid="00b6958c"/>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text-properties officeooo:paragraph-rsid="00be051c"/>
    </style:style>
    <style:style style:name="P15" style:family="paragraph" style:parent-style-name="Heading_20_1" style:list-style-name="">
      <style:paragraph-properties fo:line-height="115%"/>
      <style:text-properties officeooo:paragraph-rsid="00be051c"/>
    </style:style>
    <style:style style:name="P16" style:family="paragraph" style:parent-style-name="Heading_20_1">
      <style:paragraph-properties fo:break-before="page"/>
      <style:text-properties officeooo:paragraph-rsid="00be051c"/>
    </style:style>
    <style:style style:name="P17" style:family="paragraph" style:parent-style-name="Heading_20_1" style:list-style-name="">
      <style:paragraph-properties fo:text-align="justify" style:justify-single-word="false">
        <style:tab-stops/>
      </style:paragraph-properties>
      <style:text-properties style:font-name="Arial3" officeooo:paragraph-rsid="00a1fbe3"/>
    </style:style>
    <style:style style:name="P18" style:family="paragraph" style:parent-style-name="Heading_20_1">
      <style:paragraph-properties fo:text-align="justify" style:justify-single-word="false" fo:break-before="page">
        <style:tab-stops/>
      </style:paragraph-properties>
      <style:text-properties style:font-name="Arial3" officeooo:paragraph-rsid="00a1fbe3"/>
    </style:style>
    <style:style style:name="P19" style:family="paragraph" style:parent-style-name="Text_20_body">
      <style:paragraph-properties fo:line-height="115%"/>
    </style:style>
    <style:style style:name="P20" style:family="paragraph" style:parent-style-name="Text_20_body">
      <style:paragraph-properties fo:text-align="center" style:justify-single-word="false"/>
    </style:style>
    <style:style style:name="P21" style:family="paragraph" style:parent-style-name="Text_20_body">
      <style:paragraph-properties fo:margin-left="0cm" fo:margin-top="0cm" fo:margin-bottom="0.247cm" style:contextual-spacing="false" fo:line-height="115%" fo:text-indent="0cm" style:auto-text-indent="false"/>
    </style:style>
    <style:style style:name="T1" style:family="text">
      <style:text-properties fo:font-size="15pt" fo:background-color="#ffffd7" loext:char-shading-value="0" style:font-size-asian="15pt" style:font-size-complex="15pt"/>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2">Índice</text:p>
          </text:index-title>
          <text:p text:style-name="P3"><text:a xlink:type="simple" xlink:href="#__RefHeading___Toc742_2109552313" office:name="Introducción" text:style-name="Index_20_Link" text:visited-style-name="Index_20_Link">1. Introducción<text:tab/>3</text:a></text:p>
          <text:p text:style-name="P3"><text:a xlink:type="simple" xlink:href="#__RefHeading___Toc744_2109552313" office:name="Situación actual del proyecto" text:style-name="Index_20_Link" text:visited-style-name="Index_20_Link">2. Situación actual del proyecto<text:tab/>4</text:a></text:p>
          <text:p text:style-name="P3"><text:a xlink:type="simple" xlink:href="#__RefHeading___Toc746_2109552313" office:name="Objetivo general del roadmap" text:style-name="Index_20_Link" text:visited-style-name="Index_20_Link">3. Objetivo general del roadmap<text:tab/>5</text:a></text:p>
          <text:p text:style-name="P3"><text:a xlink:type="simple" xlink:href="#__RefHeading___Toc748_2109552313" office:name="Principios de planificación adoptados" text:style-name="Index_20_Link" text:visited-style-name="Index_20_Link">4. Principios de planificación adoptados<text:tab/>6</text:a></text:p>
          <text:p text:style-name="P3"><text:a xlink:type="simple" xlink:href="#__RefHeading___Toc750_2109552313" office:name="Estructura general del roadmap" text:style-name="Index_20_Link" text:visited-style-name="Index_20_Link">5. Estructura general del roadmap<text:tab/>7</text:a></text:p>
          <text:p text:style-name="P3"><text:a xlink:type="simple" xlink:href="#__RefHeading___Toc752_2109552313" office:name="Etapa 0 — Migración y consolidación técnica" text:style-name="Index_20_Link" text:visited-style-name="Index_20_Link">6. Etapa 0 — Migración y consolidación técnica<text:tab/>8</text:a></text:p>
          <text:p text:style-name="P3"><text:a xlink:type="simple" xlink:href="#__RefHeading___Toc754_2109552313" office:name="Etapa 1 — Revisión y mejora de la arquitectura" text:style-name="Index_20_Link" text:visited-style-name="Index_20_Link">7. Etapa 1 — Revisión y mejora de la arquitectura<text:tab/>9</text:a></text:p>
          <text:p text:style-name="P3"><text:a xlink:type="simple" xlink:href="#__RefHeading___Toc756_2109552313" office:name="Etapa 2 — Ampliación del modelo de vivienda" text:style-name="Index_20_Link" text:visited-style-name="Index_20_Link">8. Etapa 2 — Ampliación del modelo de vivienda<text:tab/>10</text:a></text:p>
          <text:p text:style-name="P3"><text:a xlink:type="simple" xlink:href="#__RefHeading___Toc758_2109552313" office:name="Etapa 3 — Incorporación de perfiles de usuario" text:style-name="Index_20_Link" text:visited-style-name="Index_20_Link">9. Etapa 3 — Incorporación de perfiles de usuario<text:tab/>11</text:a></text:p>
          <text:p text:style-name="P3"><text:a xlink:type="simple" xlink:href="#__RefHeading___Toc760_2109552313" office:name="Etapa 4 — Incorporación de gastos y mejora económica" text:style-name="Index_20_Link" text:visited-style-name="Index_20_Link">10. Etapa 4 — Incorporación de gastos y mejora económica<text:tab/>12</text:a></text:p>
          <text:p text:style-name="P3"><text:a xlink:type="simple" xlink:href="#__RefHeading___Toc762_2109552313" office:name="Etapa 5 — Evolución del flujo de uso por consola" text:style-name="Index_20_Link" text:visited-style-name="Index_20_Link">11. Etapa 5 — Evolución del flujo de uso por consola<text:tab/>13</text:a></text:p>
          <text:p text:style-name="P3"><text:a xlink:type="simple" xlink:href="#__RefHeading___Toc764_2109552313" office:name="Etapa 6 — Incorporación de operaciones de gestión ampliada" text:style-name="Index_20_Link" text:visited-style-name="Index_20_Link">12. Etapa 6 — Incorporación de operaciones de gestión ampliada<text:tab/>14</text:a></text:p>
          <text:p text:style-name="P3"><text:a xlink:type="simple" xlink:href="#__RefHeading___Toc766_2109552313" office:name="Etapa 7 — Revisión final y cierre de la v1.0" text:style-name="Index_20_Link" text:visited-style-name="Index_20_Link">13. Etapa 7 — Revisión final y cierre de la v1.0<text:tab/>15</text:a></text:p>
          <text:p text:style-name="P3"><text:a xlink:type="simple" xlink:href="#__RefHeading___Toc768_2109552313" office:name="Elementos expresamente fuera del alcance de la v1.0" text:style-name="Index_20_Link" text:visited-style-name="Index_20_Link">14. Elementos expresamente fuera del alcance de la v1.0<text:tab/>16</text:a></text:p>
          <text:p text:style-name="P3"><text:a xlink:type="simple" xlink:href="#__RefHeading___Toc770_2109552313" office:name="Continuidad futura del proyecto" text:style-name="Index_20_Link" text:visited-style-name="Index_20_Link">15. Continuidad futura del proyecto<text:tab/>17</text:a></text:p>
          <text:p text:style-name="P3"><text:a xlink:type="simple" xlink:href="#__RefHeading___Toc772_2109552313" office:name="Conclusión" text:style-name="Index_20_Link" text:visited-style-name="Index_20_Link">16. Conclusión<text:tab/>18</text:a></text:p>
          <text:p text:style-name="P3"><text:a xlink:type="simple" xlink:href="#__RefHeading___Toc774_2109552313" office:name="CIERRE DOCUMENTAL" text:style-name="Index_20_Link" text:visited-style-name="Index_20_Link">17. CIERRE DOCUMENTAL<text:tab/>19</text:a></text:p>
        </text:index-body>
      </text:table-of-content>
      <text:p text:style-name="Text_20_body"/>
      <text:h text:style-name="P4" text:outline-level="1"><text:bookmark-start text:name="__RefHeading___Toc742_2109552313"/><text:span text:style-name="Strong_20_Emphasis">Introducción</text:span><text:bookmark-end text:name="__RefHeading___Toc742_2109552313"/></text:h>
      <text:p text:style-name="Text_20_body">El presente roadmap establece la planificación general del desarrollo de Habitly durante su <text:span text:style-name="Strong_20_Emphasis">versión 1.0</text:span>, una vez finalizada la fase BETA del proyecto.</text:p>
      <text:p text:style-name="Text_20_body">Su objetivo es servir como hoja de ruta estructurada para organizar la evolución del sistema de manera progresiva, coherente y técnicamente sostenible.</text:p>
      <text:p text:style-name="Text_20_body">A diferencia de la fase BETA, donde el foco principal estuvo en construir una primera base funcional, la versión 1.0 requiere una planificación más clara, ya que en esta etapa el proyecto comienza a crecer tanto en complejidad funcional como en madurez estructural.</text:p>
      <text:p text:style-name="Text_20_body">Por ello, este documento no debe entenderse únicamente como una lista de tareas, sino como una guía de desarrollo pensada para orientar el crecimiento real del proyecto Habitly.</text:p>
      <text:h text:style-name="P5" text:outline-level="1"><text:span text:style-name="Strong_20_Emphasis"/></text:h>
      <text:h text:style-name="P6" text:outline-level="1"><text:bookmark-start text:name="__RefHeading___Toc744_2109552313"/><text:span text:style-name="Strong_20_Emphasis">Situación actual del proyecto</text:span><text:bookmark-end text:name="__RefHeading___Toc744_2109552313"/></text:h>
      <text:p text:style-name="Text_20_body">En el momento de elaboración del presente roadmap, Habitly ha completado satisfactoriamente su fase BETA.</text:p>
      <text:p text:style-name="Text_20_body">Durante dicha fase se ha desarrollado una base funcional mínima que incluye:</text:p>
      <text:list xml:id="list840722869" text:style-name="List_20_2">
        <text:list-item>
          <text:p text:style-name="P7">una primera arquitectura orientada a objetos, </text:p>
        </text:list-item>
        <text:list-item>
          <text:p text:style-name="P7">una estructura de clases para representar inmuebles, </text:p>
        </text:list-item>
        <text:list-item>
          <text:p text:style-name="P7">una lógica de gestión por consola, </text:p>
        </text:list-item>
        <text:list-item>
          <text:p text:style-name="P7">validación de entradas del usuario, </text:p>
        </text:list-item>
        <text:list-item>
          <text:p text:style-name="P7">registro y listado de propiedades, </text:p>
        </text:list-item>
        <text:list-item>
          <text:p text:style-name="P7">registro de pagos, </text:p>
        </text:list-item>
        <text:list-item>
          <text:p text:style-name="P8">y aplicación de incrementos sobre el precio de las viviendas. </text:p>
        </text:list-item>
      </text:list>
      <text:p text:style-name="P9">Con la finalización de esta etapa, la <text:span text:style-name="Strong_20_Emphasis">versión 1.0 pasa a ser la fase activa de desarrollo del proyecto</text:span>, convirtiéndose en la base principal del trabajo técnico a partir de este momento.</text:p>
      <text:h text:style-name="P10" text:outline-level="1"><text:span text:style-name="Strong_20_Emphasis"/></text:h>
      <text:h text:style-name="P4" text:outline-level="1"><text:bookmark-start text:name="__RefHeading___Toc746_2109552313"/><text:span text:style-name="Strong_20_Emphasis">Objetivo general del roadma</text:span>p<text:bookmark-end text:name="__RefHeading___Toc746_2109552313"/></text:h>
      <text:p text:style-name="Text_20_body">El objetivo principal del roadmap de la versión 1.0 es organizar el crecimiento de Habitly de forma lógica y controlada, evitando una expansión desordenada del sistema y asegurando que cada nueva incorporación tenga sentido dentro del proyecto.</text:p>
      <text:p text:style-name="Text_20_body">En términos generales, esta planificación busca:</text:p>
      <text:list xml:id="list161101470660740" text:continue-numbering="true" text:style-name="List_20_2">
        <text:list-item>
          <text:p text:style-name="P7">consolidar la base heredada de la fase BETA, </text:p>
        </text:list-item>
        <text:list-item>
          <text:p text:style-name="P7">reorganizar el proyecto en un entorno de trabajo más profesional, </text:p>
        </text:list-item>
        <text:list-item>
          <text:p text:style-name="P7">ampliar el modelo funcional del sistema, </text:p>
        </text:list-item>
        <text:list-item>
          <text:p text:style-name="P7">introducir nuevas perspectivas de usuario, </text:p>
        </text:list-item>
        <text:list-item>
          <text:p text:style-name="P7">enriquecer la lógica económica del software, </text:p>
        </text:list-item>
        <text:list-item>
          <text:p text:style-name="P8">y preparar Habitly para futuras versiones. </text:p>
        </text:list-item>
      </text:list>
      <text:h text:style-name="P5" text:outline-level="1"><text:span text:style-name="Strong_20_Emphasis"/></text:h>
      <text:h text:style-name="P4" text:outline-level="1"><text:bookmark-start text:name="__RefHeading___Toc748_2109552313"/><text:span text:style-name="Strong_20_Emphasis">Principios de planificación adoptado</text:span>s<text:bookmark-end text:name="__RefHeading___Toc748_2109552313"/></text:h>
      <text:p text:style-name="Text_20_body">El desarrollo de la versión 1.0 se apoyará en una serie de principios de planificación que servirán como criterio de decisión durante todo el proceso.</text:p>
      <text:p text:style-name="Text_20_body">Estos principios son los siguientes:</text:p>
      <text:list xml:id="list161101128047201" text:continue-numbering="true" text:style-name="List_20_2">
        <text:list-item>
          <text:p text:style-name="P7">construir sobre una base técnica estable, </text:p>
        </text:list-item>
        <text:list-item>
          <text:p text:style-name="P7">ampliar la funcionalidad de forma progresiva, </text:p>
        </text:list-item>
        <text:list-item>
          <text:p text:style-name="P7">evitar introducir complejidad innecesaria demasiado pronto, </text:p>
        </text:list-item>
        <text:list-item>
          <text:p text:style-name="P7">mantener una arquitectura clara y mantenible, </text:p>
        </text:list-item>
        <text:list-item>
          <text:p text:style-name="P8">y priorizar siempre la coherencia entre lo documentado y lo realmente implementado. </text:p>
        </text:list-item>
      </text:list>
      <text:p text:style-name="Text_20_body">Esto resulta especialmente importante para que el proyecto pueda evolucionar con orden y sin perder el control de su propia estructura.</text:p>
      <text:h text:style-name="P5" text:outline-level="1"><text:span text:style-name="Strong_20_Emphasis"/></text:h>
      <text:h text:style-name="P4" text:outline-level="1"><text:bookmark-start text:name="__RefHeading___Toc750_2109552313"/><text:span text:style-name="Strong_20_Emphasis">Estructura general del roadmap</text:span><text:bookmark-end text:name="__RefHeading___Toc750_2109552313"/></text:h>
      <text:p text:style-name="Text_20_body">El desarrollo de Habitly v1.0 se organizará en varias etapas progresivas, cada una de ellas centrada en un bloque concreto de evolución técnica o funcional.</text:p>
      <text:p text:style-name="Text_20_body">Estas etapas no deben entenderse como compartimentos completamente rígidos, pero sí como un orden recomendado para garantizar que el proyecto crezca sobre una base coherente y bien organizada.</text:p>
      <text:h text:style-name="P11" text:outline-level="1"><text:span text:style-name="Strong_20_Emphasis"/></text:h>
      <text:h text:style-name="P4" text:outline-level="1"><text:bookmark-start text:name="__RefHeading___Toc752_2109552313"/><text:span text:style-name="Strong_20_Emphasis">Etapa 0 — Migración y consolidación técnic</text:span>a<text:bookmark-end text:name="__RefHeading___Toc752_2109552313"/></text:h>
      <text:p text:style-name="Text_20_body">La primera etapa de la versión 1.0 estará centrada en la consolidación técnica del proyecto y en la preparación del nuevo entorno de trabajo.</text:p>
      <text:p text:style-name="Text_20_body">Esta fase no tiene como prioridad añadir nuevas funcionalidades, sino garantizar que la base heredada de la BETA quede correctamente trasladada, organizada y lista para evolucionar.</text:p>
      <text:p text:style-name="Text_20_body">Las tareas principales de esta etapa son las siguientes:</text:p>
      <text:list xml:id="list161101397292115" text:continue-numbering="true" text:style-name="List_20_2">
        <text:list-item>
          <text:p text:style-name="P7">migrar el proyecto desde BlueJ a IntelliJ IDEA, </text:p>
        </text:list-item>
        <text:list-item>
          <text:p text:style-name="P7">comprobar el correcto funcionamiento del código en el nuevo entorno, </text:p>
        </text:list-item>
        <text:list-item>
          <text:p text:style-name="P7">reorganizar la estructura de archivos y clases, </text:p>
        </text:list-item>
        <text:list-item>
          <text:p text:style-name="P7">preparar una base más limpia y mantenible, </text:p>
        </text:list-item>
        <text:list-item>
          <text:p text:style-name="P7">iniciar la gestión del proyecto con Git, </text:p>
        </text:list-item>
        <text:list-item>
          <text:p text:style-name="P8">y preparar el repositorio para su trabajo y seguimiento en GitHub. </text:p>
        </text:list-item>
      </text:list>
      <text:p text:style-name="Text_20_body">Esta etapa es fundamental porque marca el paso de una fase académica inicial a una etapa de desarrollo más seria y mejor organizada.</text:p>
      <text:h text:style-name="P5" text:outline-level="1"><text:span text:style-name="Strong_20_Emphasis"/></text:h>
      <text:h text:style-name="P4" text:outline-level="1"><text:bookmark-start text:name="__RefHeading___Toc754_2109552313"/><text:span text:style-name="Strong_20_Emphasis">Etapa 1 — Revisión y mejora de la arquitectura</text:span><text:bookmark-end text:name="__RefHeading___Toc754_2109552313"/></text:h>
      <text:p text:style-name="Text_20_body">Una vez consolidado el entorno técnico del proyecto, la siguiente etapa consistirá en revisar la arquitectura interna del sistema.</text:p>
      <text:p text:style-name="Text_20_body">Durante la fase BETA, gran parte de la lógica se encontraba centralizada en una estructura funcional sencilla, adecuada para una primera implementación, pero todavía limitada para soportar una evolución más rica.</text:p>
      <text:p text:style-name="Text_20_body">Por ello, esta etapa se orientará a:</text:p>
      <text:list xml:id="list161102619328636" text:continue-numbering="true" text:style-name="List_20_2">
        <text:list-item>
          <text:p text:style-name="P7">revisar la distribución actual de responsabilidades, </text:p>
        </text:list-item>
        <text:list-item>
          <text:p text:style-name="P7">detectar posibles concentraciones excesivas de lógica, </text:p>
        </text:list-item>
        <text:list-item>
          <text:p text:style-name="P7">reorganizar mejor la estructura del programa, </text:p>
        </text:list-item>
        <text:list-item>
          <text:p text:style-name="P7">mejorar la claridad del diseño, </text:p>
        </text:list-item>
        <text:list-item>
          <text:p text:style-name="P8">y preparar una base más modular y mantenible. </text:p>
        </text:list-item>
      </text:list>
      <text:p text:style-name="Text_20_body">Esta etapa será especialmente importante para evitar que la v1.0 crezca sobre una estructura poco flexible o difícil de mantener a medida que se incorporen nuevas funcionalidades.</text:p>
      <text:h text:style-name="P5" text:outline-level="1"><text:span text:style-name="Strong_20_Emphasis"/></text:h>
      <text:h text:style-name="P4" text:outline-level="1"><text:bookmark-start text:name="__RefHeading___Toc756_2109552313"/><text:span text:style-name="Strong_20_Emphasis">Etapa 2 — Ampliación del modelo de vivienda</text:span><text:bookmark-end text:name="__RefHeading___Toc756_2109552313"/></text:h>
      <text:p text:style-name="Text_20_body">La siguiente gran etapa del roadmap se centrará en ampliar la representación de los inmuebles dentro del sistema.</text:p>
      <text:p text:style-name="Text_20_body">El objetivo de esta fase es enriquecer el modelo actual de <text:span text:style-name="Source_20_Text">Vivienda</text:span> para que Habitly comience a representar propiedades de una forma más realista y funcional.</text:p>
      <text:p text:style-name="Text_20_body">Dentro de esta etapa se contempla trabajar progresivamente en la incorporación de atributos como:</text:p>
      <text:list xml:id="list161101305390574" text:continue-numbering="true" text:style-name="List_20_2">
        <text:list-item>
          <text:p text:style-name="P7">superficie útil o total, </text:p>
        </text:list-item>
        <text:list-item>
          <text:p text:style-name="P7">precio por metro cuadrado, </text:p>
        </text:list-item>
        <text:list-item>
          <text:p text:style-name="P7">estado de conservación, </text:p>
        </text:list-item>
        <text:list-item>
          <text:p text:style-name="P7">existencia de piscina, </text:p>
        </text:list-item>
        <text:list-item>
          <text:p text:style-name="P7">disponibilidad de garaje, </text:p>
        </text:list-item>
        <text:list-item>
          <text:p text:style-name="P7">estado de amueblado, </text:p>
        </text:list-item>
        <text:list-item>
          <text:p text:style-name="P8">y otros elementos relevantes para la clasificación o administración del inmueble. </text:p>
        </text:list-item>
      </text:list>
      <text:p text:style-name="Text_20_body">Esta ampliación permitirá que el sistema deje atrás una representación excesivamente básica de las propiedades y gane profundidad funcional.</text:p>
      <text:h text:style-name="P5" text:outline-level="1"><text:span text:style-name="Strong_20_Emphasis"/></text:h>
      <text:h text:style-name="P4" text:outline-level="1"><text:bookmark-start text:name="__RefHeading___Toc758_2109552313"/><text:span text:style-name="Strong_20_Emphasis">Etapa 3 — Incorporación de perfiles de usuario</text:span><text:bookmark-end text:name="__RefHeading___Toc758_2109552313"/></text:h>
      <text:p text:style-name="Text_20_body">Una de las evoluciones más importantes de la versión 1.0 será la incorporación progresiva de perfiles de usuario dentro del sistema.</text:p>
      <text:p text:style-name="Text_20_body">Hasta la fase BETA, el proyecto estaba centrado casi exclusivamente en las viviendas. Sin embargo, para que Habitly pueda evolucionar hacia una herramienta más útil, resulta necesario comenzar a representar también a las personas que interactúan con ellas.</text:p>
      <text:p text:style-name="Text_20_body">Durante esta etapa se trabajará principalmente en:</text:p>
      <text:list text:style-name="L1">
        <text:list-item>
          <text:p text:style-name="P12">la incorporación del perfil de usuario arrendatario o residente, </text:p>
        </text:list-item>
        <text:list-item>
          <text:p text:style-name="P12">la incorporación del perfil de usuario arrendador o propietario-gestor, </text:p>
        </text:list-item>
        <text:list-item>
          <text:p text:style-name="P12">la relación funcional entre usuarios y viviendas, </text:p>
        </text:list-item>
        <text:list-item>
          <text:p text:style-name="P13">y la preparación de estructuras que permitan ampliar esta lógica más adelante. </text:p>
        </text:list-item>
      </text:list>
      <text:p text:style-name="Text_20_body">Esta fase será clave para dar más profundidad al sistema y permitir una gestión más rica y más cercana a un caso real de uso.</text:p>
      <text:h text:style-name="P5" text:outline-level="1"><text:span text:style-name="Strong_20_Emphasis"/></text:h>
      <text:h text:style-name="P4" text:outline-level="1"><text:bookmark-start text:name="__RefHeading___Toc760_2109552313"/><text:span text:style-name="Strong_20_Emphasis">Etapa 4 — Incorporación de gastos y mejora económica</text:span><text:bookmark-end text:name="__RefHeading___Toc760_2109552313"/></text:h>
      <text:p text:style-name="Text_20_body">La cuarta gran etapa de desarrollo de la versión 1.0 estará orientada a reforzar la lógica económica del sistema.</text:p>
      <text:p text:style-name="Text_20_body">Aunque la fase BETA ya incorporó una base financiera inicial, esta nueva etapa buscará ampliar esa lógica para que el sistema pueda ofrecer una visión más útil desde el punto de vista de la administración inmobiliaria.</text:p>
      <text:p text:style-name="Text_20_body">En esta fase se contempla trabajar en:</text:p>
      <text:list xml:id="list161102345197668" text:continue-list="list161101305390574" text:style-name="List_20_2">
        <text:list-item>
          <text:p text:style-name="P7">la mejora del sistema de pagos, </text:p>
        </text:list-item>
        <text:list-item>
          <text:p text:style-name="P7">una representación más clara de mensualidades y pendientes, </text:p>
        </text:list-item>
        <text:list-item>
          <text:p text:style-name="P7">la incorporación de gastos asociados a la vivienda, </text:p>
        </text:list-item>
        <text:list-item>
          <text:p text:style-name="P7">la gestión de conceptos como agua, luz o comunidad, </text:p>
        </text:list-item>
        <text:list-item>
          <text:p text:style-name="P7">el refuerzo de la lógica económica general del sistema, </text:p>
        </text:list-item>
        <text:list-item>
          <text:p text:style-name="P8">y la preparación de futuras operaciones orientadas al análisis de beneficio o rendimiento. </text:p>
        </text:list-item>
      </text:list>
      <text:p text:style-name="P14">Esta etapa tendrá especial importancia dentro de la lógica del usuario arrendador, ya que permitirá comenzar a valorar mejor el comportamiento económico real de cada propiedad.</text:p>
      <text:h text:style-name="P15" text:outline-level="1"><text:span text:style-name="Strong_20_Emphasis"/></text:h>
      <text:h text:style-name="P16" text:outline-level="1"><text:bookmark-start text:name="__RefHeading___Toc762_2109552313"/><text:span text:style-name="Strong_20_Emphasis">Etapa 5 — Evolución del flujo de uso por consola</text:span><text:bookmark-end text:name="__RefHeading___Toc762_2109552313"/></text:h>
      <text:p text:style-name="Text_20_body">A medida que Habitly incorpore nuevas funcionalidades, será necesario mejorar también la forma en la que el usuario interactúa con el programa.</text:p>
      <text:p text:style-name="Text_20_body">Por ello, la versión 1.0 contempla una etapa específica orientada a revisar y mejorar el flujo de uso por consola.</text:p>
      <text:p text:style-name="Text_20_body">Durante esta fase se buscará:</text:p>
      <text:list xml:id="list161101975703272" text:continue-numbering="true" text:style-name="List_20_2">
        <text:list-item>
          <text:p text:style-name="P7">reorganizar el menú principal, </text:p>
        </text:list-item>
        <text:list-item>
          <text:p text:style-name="P7">mejorar la navegación entre opciones, </text:p>
        </text:list-item>
        <text:list-item>
          <text:p text:style-name="P7">hacer el sistema más claro para el usuario, </text:p>
        </text:list-item>
        <text:list-item>
          <text:p text:style-name="P7">distribuir mejor las operaciones del programa, </text:p>
        </text:list-item>
        <text:list-item>
          <text:p text:style-name="P8">y preparar una estructura de interacción más limpia y escalable. </text:p>
        </text:list-item>
      </text:list>
      <text:p text:style-name="Text_20_body">Aunque el sistema continuará funcionando por consola en esta versión, se pretende que la experiencia de uso sea progresivamente más ordenada y cómoda.</text:p>
      <text:h text:style-name="P5" text:outline-level="1"><text:span text:style-name="Strong_20_Emphasis"/></text:h>
      <text:h text:style-name="P6" text:outline-level="1"><text:bookmark-start text:name="__RefHeading___Toc764_2109552313"/><text:span text:style-name="Strong_20_Emphasis">Etapa 6 — Incorporación de operaciones de gestión ampliada</text:span><text:bookmark-end text:name="__RefHeading___Toc764_2109552313"/></text:h>
      <text:p text:style-name="Text_20_body">Una vez consolidada la base funcional principal, la versión 1.0 podrá incorporar de forma progresiva algunas operaciones adicionales de valor para la gestión del sistema.</text:p>
      <text:p text:style-name="Text_20_body">Estas operaciones no deben considerarse prioritarias frente a la arquitectura o la lógica base, pero sí pueden aportar una mejora importante a la utilidad real del programa si se integran con criterio.</text:p>
      <text:p text:style-name="Text_20_body">Entre las posibles líneas de trabajo de esta etapa se encuentran:</text:p>
      <text:list xml:id="list161102437086337" text:continue-numbering="true" text:style-name="List_20_2">
        <text:list-item>
          <text:p text:style-name="P7">consultas de estado económico por vivienda, </text:p>
        </text:list-item>
        <text:list-item>
          <text:p text:style-name="P7">operaciones de control general para arrendadores, </text:p>
        </text:list-item>
        <text:list-item>
          <text:p text:style-name="P7">funciones de resumen de ingresos o gastos, </text:p>
        </text:list-item>
        <text:list-item>
          <text:p text:style-name="P7">posibles cálculos de beneficio total, </text:p>
        </text:list-item>
        <text:list-item>
          <text:p text:style-name="P8">y otras utilidades de apoyo a la gestión. </text:p>
        </text:list-item>
      </text:list>
      <text:p text:style-name="Text_20_body">La incorporación de estas operaciones deberá realizarse únicamente si la estructura general del sistema ya se encuentra suficientemente consolidada.</text:p>
      <text:h text:style-name="P5" text:outline-level="1"><text:span text:style-name="Strong_20_Emphasis"/></text:h>
      <text:h text:style-name="P4" text:outline-level="1"><text:bookmark-start text:name="__RefHeading___Toc766_2109552313"/><text:span text:style-name="Strong_20_Emphasis">Etapa 7 — Revisión final y cierre de la v1.0</text:span><text:bookmark-end text:name="__RefHeading___Toc766_2109552313"/></text:h>
      <text:p text:style-name="Text_20_body">La última etapa del roadmap corresponderá a la revisión general del sistema y al cierre técnico de la versión 1.0.</text:p>
      <text:p text:style-name="Text_20_body">Una vez desarrolladas las líneas principales del proyecto, será necesario realizar una fase final de validación orientada a comprobar la consistencia, estabilidad y coherencia general del software.</text:p>
      <text:p text:style-name="Text_20_body">En esta fase se contempla:</text:p>
      <text:list xml:id="list161102452526378" text:continue-numbering="true" text:style-name="List_20_2">
        <text:list-item>
          <text:p text:style-name="P7">revisar la arquitectura final resultante, </text:p>
        </text:list-item>
        <text:list-item>
          <text:p text:style-name="P7">limpiar y reorganizar el código, </text:p>
        </text:list-item>
        <text:list-item>
          <text:p text:style-name="P7">validar el correcto funcionamiento del sistema, </text:p>
        </text:list-item>
        <text:list-item>
          <text:p text:style-name="P7">comprobar la coherencia de las funcionalidades implementadas, </text:p>
        </text:list-item>
        <text:list-item>
          <text:p text:style-name="P8">y dejar Habitly en un estado suficientemente sólido para su evolución futura. </text:p>
        </text:list-item>
      </text:list>
      <text:p text:style-name="Text_20_body">Esta etapa será importante para asegurar que la versión 1.0 no termine simplemente “funcionando”, sino quedando bien construida y correctamente cerrada como versión.</text:p>
      <text:h text:style-name="P5" text:outline-level="1"><text:span text:style-name="Strong_20_Emphasis"/></text:h>
      <text:h text:style-name="P4" text:outline-level="1"><text:bookmark-start text:name="__RefHeading___Toc768_2109552313"/><text:span text:style-name="Strong_20_Emphasis">Elementos expresamente fuera del alcance de la v1.0</text:span><text:bookmark-end text:name="__RefHeading___Toc768_2109552313"/></text:h>
      <text:p text:style-name="Text_20_body">Con el objetivo de mantener una evolución realista, ordenada y sostenible, se ha decidido dejar fuera del alcance de la versión 1.0 una serie de elementos que, aunque pueden resultar interesantes para el futuro del proyecto, todavía no se consideran prioritarios.</text:p>
      <text:p text:style-name="Text_20_body">Entre ellos se encuentran:</text:p>
      <text:list xml:id="list161101481343982" text:continue-numbering="true" text:style-name="List_20_2">
        <text:list-item>
          <text:p text:style-name="P7">la implementación de una interfaz gráfica, </text:p>
        </text:list-item>
        <text:list-item>
          <text:p text:style-name="P7">la incorporación de una base de datos real, </text:p>
        </text:list-item>
        <text:list-item>
          <text:p text:style-name="P7">la persistencia avanzada de información, </text:p>
        </text:list-item>
        <text:list-item>
          <text:p text:style-name="P7">la autenticación compleja, </text:p>
        </text:list-item>
        <text:list-item>
          <text:p text:style-name="P8">y otras capas técnicas o visuales más sofisticadas. </text:p>
        </text:list-item>
      </text:list>
      <text:p text:style-name="Text_20_body">Estas líneas de trabajo no se descartan, pero se consideran propias de futuras versiones del sistema.</text:p>
      <text:p text:style-name="Text_20_body">La prioridad actual sigue siendo consolidar la base lógica, estructural y funcional del proyecto.</text:p>
      <text:h text:style-name="P5" text:outline-level="1"><text:span text:style-name="Strong_20_Emphasis"/></text:h>
      <text:h text:style-name="P4" text:outline-level="1"><text:bookmark-start text:name="__RefHeading___Toc770_2109552313"/><text:span text:style-name="Strong_20_Emphasis">Continuidad futura del proyecto</text:span><text:bookmark-end text:name="__RefHeading___Toc770_2109552313"/></text:h>
      <text:p text:style-name="Text_20_body">La finalización de la versión 1.0 no supondrá el cierre del proyecto Habitly, sino el punto de partida de futuras ampliaciones.</text:p>
      <text:p text:style-name="Text_20_body">A partir de esta etapa, el proyecto podrá seguir evolucionando mediante nuevos anexos de versión, donde se documentarán de forma independiente las siguientes fases de desarrollo.</text:p>
      <text:p text:style-name="Text_20_body">Entre las líneas futuras ya previstas se encuentran:</text:p>
      <text:list text:continue-numbering="true" text:style-name="List_20_2">
        <text:list-item>
          <text:p text:style-name="P7">la adaptación del sistema al IVA, </text:p>
        </text:list-item>
        <text:list-item>
          <text:p text:style-name="P7">la ampliación al resto del territorio nacional, </text:p>
        </text:list-item>
        <text:list-item>
          <text:p text:style-name="P7">la incorporación de persistencia de datos, </text:p>
        </text:list-item>
        <text:list-item>
          <text:p text:style-name="P7">la evolución del modelo de usuario, </text:p>
        </text:list-item>
        <text:list-item>
          <text:p text:style-name="P8">y la posible mejora de la experiencia general del sistema. </text:p>
        </text:list-item>
      </text:list>
      <text:p text:style-name="Text_20_body">En este sentido, la versión 1.0 debe entenderse como la primera gran base sólida sobre la que se apoyará la evolución futura de Habitly.</text:p>
      <text:h text:style-name="P5" text:outline-level="1"><text:span text:style-name="Strong_20_Emphasis"/></text:h>
      <text:h text:style-name="P4" text:outline-level="1"><text:bookmark-start text:name="__RefHeading___Toc772_2109552313"/><text:span text:style-name="Strong_20_Emphasis">Conclusión</text:span><text:bookmark-end text:name="__RefHeading___Toc772_2109552313"/></text:h>
      <text:p text:style-name="Text_20_body">El roadmap de Habitly v1.0 establece una planificación clara, gradual y coherente para la evolución del proyecto tras la finalización de su fase BETA.</text:p>
      <text:p text:style-name="Text_20_body">La migración a IntelliJ IDEA, la integración con Git y GitHub, la revisión arquitectónica, la ampliación del modelo de vivienda, la incorporación de perfiles de usuario y la mejora de la lógica económica configuran una hoja de ruta sólida y realista para el desarrollo de esta nueva etapa.</text:p>
      <text:p text:style-name="Text_20_body">Por ello, este documento debe servir como referencia organizativa principal durante el proceso de construcción de la versión 1.0 del sistema.</text:p>
      <text:p text:style-name="Text_20_body"><text:span text:style-name="Strong_20_Emphasis"/></text:p>
      <text:h text:style-name="P17" text:outline-level="1"><text:span text:style-name="Strong_20_Emphasis"/></text:h>
      <text:h text:style-name="P18" text:outline-level="1"><text:bookmark-start text:name="__RefHeading___Toc774_2109552313"/><text:span text:style-name="Strong_20_Emphasis">CIERRE DOCUMENTAL</text:span><text:bookmark-end text:name="__RefHeading___Toc774_2109552313"/></text:h>
      <text:p text:style-name="P19">El presente documento queda establecido como:</text:p>
      <text:p text:style-name="P20"><text:span text:style-name="Strong_20_Emphasis"><text:span text:style-name="T1">Anexo_02_Roadmap_Habitly_v1.0</text:span></text:span></text:p>
      <text:p text:style-name="P19">y actúa como referencia organizativa y técnica para la planificación del desarrollo correspondiente a la versión 1.0 del proyecto Habitly.</text:p>
      <text:p text:style-name="P21"><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Negrita" style:font-family-generic="swiss" style:font-pitch="variable"/>
  </office:font-face-decls>
  <office:styles>
    <draw:fill-image draw:name="PORTADA_5f_ANEXO_5f_02_5f_ROADMAP_5f_HABITLY_5f_V1" draw:display-name="PORTADA_ANEXO_02_ROADMAP_HABITLY_V1" xlink:href="Pictures/10000000000009B200000DB55497D8F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fo:text-indent="0.75cm" style:auto-text-indent="false" style:page-number="auto">
        <style:tab-stops/>
      </style:paragraph-properties>
      <style:text-properties style:font-name="Arial3" fo:font-family="Arial"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left="0.6cm" fo:margin-right="0.3cm" fo:margin-top="0cm" fo:margin-bottom="0.247cm" style:contextual-spacing="false" fo:line-height="115%" style:page-number="auto"/>
      <style:text-properties fo:text-transform="uppercase" fo:color="#000080" loext:opacity="100%" style:font-name="Verdana" fo:font-family="Verdana" style:font-style-name="Negrita" style:font-family-generic="swiss"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chapter">
      <style:paragraph-properties fo:margin-left="0.349cm" fo:margin-right="0.15cm" fo:margin-top="0cm" fo:margin-bottom="0.247cm" style:contextual-spacing="false" fo:line-height="115%"/>
      <style:text-properties fo:color="#000080" loext:opacity="100%" style:font-name="Verdana" fo:font-family="Verdana" style:font-style-name="Negrita" style:font-family-generic="swiss" style:font-pitch="variable" fo:font-size="14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chapter" style:master-page-name="">
      <style:paragraph-properties fo:margin-left="0.349cm" fo:margin-right="0.15cm" fo:margin-top="0.247cm" fo:margin-bottom="0.212cm" style:contextual-spacing="false" style:page-number="auto"/>
      <style:text-properties fo:color="#000080" loext:opacity="100%" style:font-name="Verdana" fo:font-family="Verdana" style:font-style-name="Negrita" style:font-family-generic="swiss" style:font-pitch="variable" fo:font-size="13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ítulo_20_General" style:display-name="Título General" style:family="paragraph" style:parent-style-name="Heading"/>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1" officeooo:rsid="009b3bce" officeooo:paragraph-rsid="009dbed1"/>
    </style:style>
    <style:style style:name="MT1" style:family="text">
      <style:text-properties officeooo:rsid="009d0c69"/>
    </style:style>
    <style:style style:name="MT2" style:family="text">
      <style:text-properties style:font-name="Arial1" officeooo:rsid="00285030"/>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0.499cm" fo:background-color="transparent" style:dynamic-spacing="false" draw:fill="none" draw:fill-color="#729fcf"/>
      </style:header-style>
      <style:footer-style>
        <style:header-footer-properties fo:min-height="1.24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ORTADA_5f_ANEXO_5f_02_5f_ROADMAP_5f_HABITLY_5f_V1" draw:fill-image-width="100%" draw:fill-image-height="100%" style:repeat="no-repeat" draw:fill-image-ref-point="center" style:footnote-max-height="0cm" loext:margin-gutter="0cm">
        <style:background-image xlink:href="Pictures/10000000000009B200000DB55497D8F5.jp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ORTADA_5f_ANEXO_5f_02_5f_ROADMAP_5f_HABITLY_5f_V1" draw:fill-image-width="100%" draw:fill-image-height="100%" style:repeat="no-repeat" draw:fill-image-ref-point="center"/>
    </style:style>
  </office:automatic-styles>
  <office:master-styles>
    <style:master-page style:name="Standard" style:page-layout-name="Mpm1" draw:style-name="Mdp1">
      <style:header>
        <text:p text:style-name="MP1">Anexo 0<text:span text:style-name="MT1">2</text:span> – <text:span text:style-name="MT1">Roadmap </text:span>– v1.0</text:p>
      </style:header>
      <style:footer>
        <text:p text:style-name="Footer"><text:tab/><text:span text:style-name="MT2">Página </text:span><text:span text:style-name="MT2"><text:page-number text:select-page="current">19</text:page-number></text:span><text:span text:style-name="MT2"><text:s/>de </text:span><text:span text:style-name="MT2"><text:page-count>19</text:page-count></text:span></text:p>
      </style:footer>
    </style:master-page>
    <style:master-page style:name="First_20_Page" style:display-name="First Page" style:page-layout-name="Mpm2" draw:style-name="Mdp2" style:next-style-name="Standard"/>
    <style:master-page style:name="Index" style:page-layout-name="Mpm3"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1T10:08:53.820272000</meta:creation-date>
    <dc:date>2026-04-01T16:11:00.608852500</dc:date>
    <meta:editing-duration>PT2H21M29S</meta:editing-duration>
    <meta:editing-cycles>185</meta:editing-cycles>
    <meta:generator>LibreOffice/25.8.5.2$Windows_X86_64 LibreOffice_project/9c8b85f387cc00a89945a79c9e6239f32e450ac2</meta:generator>
    <meta:print-date>2026-04-01T12:07:59.779842500</meta:print-date>
    <meta:printed-by>Archivos PDF</meta:printed-by>
    <meta:document-statistic meta:table-count="0" meta:image-count="0" meta:object-count="0" meta:page-count="19" meta:paragraph-count="168" meta:word-count="2055" meta:character-count="12924" meta:non-whitespace-character-count="11035"/>
  </office:meta>
</office:document-meta>
</file>