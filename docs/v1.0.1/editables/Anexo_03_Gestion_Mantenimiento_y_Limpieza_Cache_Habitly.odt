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9B200000DB53330D3AC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Heading_20_1" style:list-style-name="">
      <style:paragraph-properties fo:line-height="115%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Quotations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>
      <style:text-properties officeooo:paragraph-rsid="00bb0ba4"/>
    </style:style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Heading_20_2" style:list-style-name="">
      <style:paragraph-properties fo:line-height="115%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3">
      <style:paragraph-properties fo:margin-top="0cm" fo:margin-bottom="0cm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>
      <style:text-properties officeooo:paragraph-rsid="00c079d7"/>
    </style:style>
    <style:style style:name="P39" style:family="paragraph" style:parent-style-name="Heading_20_1" style:list-style-name="">
      <style:paragraph-properties fo:line-height="115%"/>
      <style:text-properties officeooo:paragraph-rsid="00c079d7"/>
    </style:style>
    <style:style style:name="P40" style:family="paragraph" style:parent-style-name="Heading_20_1">
      <style:paragraph-properties fo:break-before="page"/>
      <style:text-properties officeooo:paragraph-rsid="00c079d7"/>
    </style:style>
    <style:style style:name="P41" style:family="paragraph" style:parent-style-name="Text_20_body" style:list-style-name="L14">
      <style:paragraph-properties fo:margin-top="0cm" fo:margin-bottom="0cm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>
      <style:paragraph-properties fo:text-align="center" style:justify-single-word="false"/>
      <style:text-properties fo:background-color="#ffffd7"/>
    </style:style>
    <style:style style:name="P44" style:family="paragraph" style:parent-style-name="Text_20_body">
      <style:paragraph-properties fo:text-align="center" style:justify-single-word="false"/>
      <style:text-properties officeooo:paragraph-rsid="00c18043" fo:background-color="#ffffd7"/>
    </style:style>
    <style:style style:name="P45" style:family="paragraph" style:parent-style-name="Text_20_body">
      <style:paragraph-properties fo:text-align="center" style:justify-single-word="false"/>
      <style:text-properties officeooo:paragraph-rsid="00c2ec58" fo:background-color="#ffffd7"/>
    </style:style>
    <style:style style:name="P46" style:family="paragraph" style:parent-style-name="Text_20_body" style:list-style-name="L15">
      <style:paragraph-properties fo:margin-top="0cm" fo:margin-bottom="0cm" style:contextual-spacing="false"/>
    </style:style>
    <style:style style:name="P47" style:family="paragraph" style:parent-style-name="Text_20_body" style:list-style-name="L15"/>
    <style:style style:name="P48" style:family="paragraph" style:parent-style-name="Text_20_body" style:list-style-name="L16">
      <style:paragraph-properties fo:margin-top="0cm" fo:margin-bottom="0cm" style:contextual-spacing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>
      <style:paragraph-properties fo:margin-top="0cm" fo:margin-bottom="0cm" style:contextual-spacing="false"/>
    </style:style>
    <style:style style:name="P51" style:family="paragraph" style:parent-style-name="Text_20_body" style:list-style-name="L17"/>
    <style:style style:name="P52" style:family="paragraph" style:parent-style-name="Text_20_body" style:list-style-name="L18">
      <style:paragraph-properties fo:margin-top="0cm" fo:margin-bottom="0cm" style:contextual-spacing="false"/>
    </style:style>
    <style:style style:name="P53" style:family="paragraph" style:parent-style-name="Text_20_body" style:list-style-name="L18"/>
    <style:style style:name="P54" style:family="paragraph" style:parent-style-name="Text_20_body" style:list-style-name="L19">
      <style:paragraph-properties fo:margin-top="0cm" fo:margin-bottom="0cm" style:contextual-spacing="false"/>
    </style:style>
    <style:style style:name="P55" style:family="paragraph" style:parent-style-name="Text_20_body" style:list-style-name="L19"/>
    <style:style style:name="P56" style:family="paragraph" style:parent-style-name="Text_20_body" style:list-style-name="L20">
      <style:paragraph-properties fo:margin-top="0cm" fo:margin-bottom="0cm" style:contextual-spacing="false"/>
    </style:style>
    <style:style style:name="P57" style:family="paragraph" style:parent-style-name="Text_20_body" style:list-style-name="L20"/>
    <style:style style:name="P58" style:family="paragraph" style:parent-style-name="Text_20_body" style:list-style-name="L21">
      <style:paragraph-properties fo:margin-top="0cm" fo:margin-bottom="0cm" style:contextual-spacing="false"/>
    </style:style>
    <style:style style:name="P59" style:family="paragraph" style:parent-style-name="Text_20_body" style:list-style-name="L21"/>
    <style:style style:name="P60" style:family="paragraph" style:parent-style-name="Text_20_body" style:list-style-name="L22">
      <style:paragraph-properties fo:margin-top="0cm" fo:margin-bottom="0cm" style:contextual-spacing="false"/>
    </style:style>
    <style:style style:name="P61" style:family="paragraph" style:parent-style-name="Text_20_body" style:list-style-name="L22"/>
    <style:style style:name="P62" style:family="paragraph" style:parent-style-name="Text_20_body" style:list-style-name="L23">
      <style:paragraph-properties fo:margin-top="0cm" fo:margin-bottom="0cm" style:contextual-spacing="false"/>
    </style:style>
    <style:style style:name="P63" style:family="paragraph" style:parent-style-name="Text_20_body" style:list-style-name="L23"/>
    <style:style style:name="P64" style:family="paragraph" style:parent-style-name="Text_20_body" style:list-style-name="L24">
      <style:paragraph-properties fo:margin-top="0cm" fo:margin-bottom="0cm" style:contextual-spacing="false"/>
    </style:style>
    <style:style style:name="P65" style:family="paragraph" style:parent-style-name="Text_20_body" style:list-style-name="L24"/>
    <style:style style:name="P66" style:family="paragraph" style:parent-style-name="Text_20_body">
      <style:text-properties officeooo:paragraph-rsid="00d00f26"/>
    </style:style>
    <style:style style:name="P67" style:family="paragraph" style:parent-style-name="Text_20_body" style:list-style-name="L25">
      <style:paragraph-properties fo:margin-top="0cm" fo:margin-bottom="0cm" style:contextual-spacing="false"/>
    </style:style>
    <style:style style:name="P68" style:family="paragraph" style:parent-style-name="Text_20_body" style:list-style-name="L25"/>
    <style:style style:name="P69" style:family="paragraph" style:parent-style-name="Text_20_body" style:list-style-name="L26">
      <style:paragraph-properties fo:margin-top="0cm" fo:margin-bottom="0cm" style:contextual-spacing="false"/>
    </style:style>
    <style:style style:name="P70" style:family="paragraph" style:parent-style-name="Text_20_body" style:list-style-name="L26"/>
    <style:style style:name="P71" style:family="paragraph" style:parent-style-name="Text_20_body" style:list-style-name="L27">
      <style:paragraph-properties fo:margin-top="0cm" fo:margin-bottom="0cm" style:contextual-spacing="false"/>
    </style:style>
    <style:style style:name="P72" style:family="paragraph" style:parent-style-name="Text_20_body" style:list-style-name="L27"/>
    <style:style style:name="P73" style:family="paragraph" style:parent-style-name="Text_20_body" style:list-style-name="L28">
      <style:paragraph-properties fo:margin-top="0cm" fo:margin-bottom="0cm" style:contextual-spacing="false"/>
    </style:style>
    <style:style style:name="P74" style:family="paragraph" style:parent-style-name="Text_20_body" style:list-style-name="L28"/>
    <style:style style:name="P75" style:family="paragraph" style:parent-style-name="Text_20_body" style:list-style-name="L29">
      <style:paragraph-properties fo:margin-top="0cm" fo:margin-bottom="0cm" style:contextual-spacing="false"/>
    </style:style>
    <style:style style:name="P76" style:family="paragraph" style:parent-style-name="Text_20_body" style:list-style-name="L29"/>
    <style:style style:name="P77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</style:style>
    <style:style style:name="T1" style:family="text">
      <style:text-properties officeooo:rsid="00ca8d02"/>
    </style:style>
    <style:style style:name="T2" style:family="text">
      <style:text-properties officeooo:rsid="00bd065e"/>
    </style:style>
    <style:style style:name="T3" style:family="text">
      <style:text-properties officeooo:rsid="00ced5ae"/>
    </style:style>
    <style:style style:name="T4" style:family="text">
      <style:text-properties officeooo:rsid="00d00f2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bd6334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2">Índice</text:p>
          </text:index-title>
          <text:p text:style-name="P3"><text:a xlink:type="simple" xlink:href="#__RefHeading___Toc903_2796764550" office:name="Introducción" text:style-name="Index_20_Link" text:visited-style-name="Index_20_Link">1. Introducción<text:tab/>4</text:a></text:p>
          <text:p text:style-name="P4"><text:a xlink:type="simple" xlink:href="#__RefHeading___Toc905_2796764550" office:name="“Borrar Datos de Aplicación”" text:style-name="Index_20_Link" text:visited-style-name="Index_20_Link">1.1 “Borrar Datos de Aplicación”<text:tab/>4</text:a></text:p>
          <text:p text:style-name="P3"><text:a xlink:type="simple" xlink:href="#__RefHeading___Toc907_2796764550" office:name="Problema Detectado" text:style-name="Index_20_Link" text:visited-style-name="Index_20_Link">2. Problema Detectado<text:tab/>5</text:a></text:p>
          <text:p text:style-name="P4"><text:a xlink:type="simple" xlink:href="#__RefHeading___Toc909_2796764550" office:name="Consecuencia directa" text:style-name="Index_20_Link" text:visited-style-name="Index_20_Link">2.1 Consecuencia directa<text:tab/>5</text:a></text:p>
          <text:p text:style-name="P3"><text:a xlink:type="simple" xlink:href="#__RefHeading___Toc911_2796764550" office:name="Objetivo del Anexo" text:style-name="Index_20_Link" text:visited-style-name="Index_20_Link">3. Objetivo del Anexo<text:tab/>6</text:a></text:p>
          <text:p text:style-name="P3"><text:a xlink:type="simple" xlink:href="#__RefHeading___Toc913_2796764550" office:name="Principio de Diseño Aplicado" text:style-name="Index_20_Link" text:visited-style-name="Index_20_Link">4. Principio de Diseño Aplicado<text:tab/>7</text:a></text:p>
          <text:p text:style-name="P3"><text:a xlink:type="simple" xlink:href="#__RefHeading___Toc915_2796764550" office:name="¿Qué significa “Borrar Datos de Aplicación”?" text:style-name="Index_20_Link" text:visited-style-name="Index_20_Link">5. ¿Qué significa “Borrar Datos de Aplicación”?<text:tab/>8</text:a></text:p>
          <text:p text:style-name="P4"><text:a xlink:type="simple" xlink:href="#__RefHeading___Toc917_2796764550" office:name="Afectaría, principalmente, a elementos como:" text:style-name="Index_20_Link" text:visited-style-name="Index_20_Link">5.1 Afectaría, principalmente, a elementos como:<text:tab/>8</text:a></text:p>
          <text:p text:style-name="P3"><text:a xlink:type="simple" xlink:href="#__RefHeading___Toc919_2796764550" office:name="Diferencia entre “Datos de Usuario” y “Datos de Sistema”" text:style-name="Index_20_Link" text:visited-style-name="Index_20_Link">6. Diferencia entre “Datos de Usuario” y “Datos de Sistema”<text:tab/>9</text:a></text:p>
          <text:p text:style-name="P4"><text:a xlink:type="simple" xlink:href="#__RefHeading___Toc921_2796764550" office:name="Datos de usuario" text:style-name="Index_20_Link" text:visited-style-name="Index_20_Link">6.1 Datos de usuario<text:tab/>9</text:a></text:p>
          <text:p text:style-name="P4"><text:a xlink:type="simple" xlink:href="#__RefHeading___Toc1205_2796764550" office:name="Datos de sistema" text:style-name="Index_20_Link" text:visited-style-name="Index_20_Link">6.2 Datos de sistema<text:tab/>9</text:a></text:p>
          <text:p text:style-name="P3"><text:a xlink:type="simple" xlink:href="#__RefHeading___Toc927_2796764550" office:name="Justificación Funcional de la Mejora" text:style-name="Index_20_Link" text:visited-style-name="Index_20_Link">7. Justificación Funcional de la Mejora<text:tab/>11</text:a></text:p>
          <text:p text:style-name="P4"><text:a xlink:type="simple" xlink:href="#__RefHeading___Toc929_2796764550" office:name="Reinicio controlado del sistema" text:style-name="Index_20_Link" text:visited-style-name="Index_20_Link">7.1 Reinicio controlado del sistema<text:tab/>11</text:a></text:p>
          <text:p text:style-name="P4"><text:a xlink:type="simple" xlink:href="#__RefHeading___Toc931_2796764550" office:name="Limpieza de residuos técnicos" text:style-name="Index_20_Link" text:visited-style-name="Index_20_Link">7.2 Limpieza de residuos técnicos<text:tab/>11</text:a></text:p>
          <text:p text:style-name="P4"><text:a xlink:type="simple" xlink:href="#__RefHeading___Toc933_2796764550" office:name="Mejora de mantenibilidad y soporte" text:style-name="Index_20_Link" text:visited-style-name="Index_20_Link">7.3 Mejora de mantenibilidad y soporte<text:tab/>12</text:a></text:p>
          <text:p text:style-name="P3"><text:a xlink:type="simple" xlink:href="#__RefHeading___Toc935_2796764550" office:name="Escenario de Uso Esperado" text:style-name="Index_20_Link" text:visited-style-name="Index_20_Link">8. Escenario de Uso Esperado<text:tab/>13</text:a></text:p>
          <text:p text:style-name="P4"><text:a xlink:type="simple" xlink:href="#__RefHeading___Toc937_2796764550" office:name="Caso típico" text:style-name="Index_20_Link" text:visited-style-name="Index_20_Link">8.1 Caso típico<text:tab/>13</text:a></text:p>
          <text:p text:style-name="P3"><text:a xlink:type="simple" xlink:href="#__RefHeading___Toc939_2796764550" office:name="Ubicación Recomendada de la Funcionalidad" text:style-name="Index_20_Link" text:visited-style-name="Index_20_Link">9. Ubicación Recomendada de la Funcionalidad<text:tab/>14</text:a></text:p>
          <text:p text:style-name="P4"><text:a xlink:type="simple" xlink:href="#__RefHeading___Toc941_2796764550" office:name="Ubicación recomendada" text:style-name="Index_20_Link" text:visited-style-name="Index_20_Link">9.1 Ubicación recomendada<text:tab/>14</text:a></text:p>
          <text:p text:style-name="P3"><text:a xlink:type="simple" xlink:href="#__RefHeading___Toc943_2796764550" office:name="Flujo de Confirmación Recomendado" text:style-name="Index_20_Link" text:visited-style-name="Index_20_Link">10. Flujo de Confirmación Recomendado<text:tab/>15</text:a></text:p>
          <text:p text:style-name="P3"><text:a xlink:type="simple" xlink:href="#__RefHeading___Toc945_2796764550" office:name="Flujo Funcional Propuesto" text:style-name="Index_20_Link" text:visited-style-name="Index_20_Link">11. Flujo Funcional Propuesto<text:tab/>16</text:a></text:p>
          <text:p text:style-name="P4"><text:a xlink:type="simple" xlink:href="#__RefHeading___Toc947_2796764550" office:name=" Paso 1" text:style-name="Index_20_Link" text:visited-style-name="Index_20_Link">11.1 <text:s/>Paso 1<text:tab/>16</text:a></text:p>
          <text:p text:style-name="P4"><text:a xlink:type="simple" xlink:href="#__RefHeading___Toc949_2796764550" office:name=" Paso 2" text:style-name="Index_20_Link" text:visited-style-name="Index_20_Link">11.2 <text:s/>Paso 2<text:tab/>16</text:a></text:p>
          <text:p text:style-name="P4"><text:a xlink:type="simple" xlink:href="#__RefHeading___Toc951_2796764550" office:name=" Paso 3" text:style-name="Index_20_Link" text:visited-style-name="Index_20_Link">11.3 <text:s/>Paso 3<text:tab/>16</text:a></text:p>
          <text:p text:style-name="P4"><text:a xlink:type="simple" xlink:href="#__RefHeading___Toc953_2796764550" office:name=" Paso 4" text:style-name="Index_20_Link" text:visited-style-name="Index_20_Link">11.4 <text:s/>Paso 4<text:tab/>16</text:a></text:p>
          <text:p text:style-name="P4"><text:a xlink:type="simple" xlink:href="#__RefHeading___Toc955_2796764550" office:name=" Paso 5" text:style-name="Index_20_Link" text:visited-style-name="Index_20_Link">11.5 <text:s/>Paso 5<text:tab/>16</text:a></text:p>
          <text:p text:style-name="P4"><text:a xlink:type="simple" xlink:href="#__RefHeading___Toc957_2796764550" office:name=" Paso 6" text:style-name="Index_20_Link" text:visited-style-name="Index_20_Link">11.6 <text:s/>Paso 6<text:tab/>16</text:a></text:p>
          <text:p text:style-name="P4"><text:a xlink:type="simple" xlink:href="#__RefHeading___Toc959_2796764550" office:name=" Paso 7" text:style-name="Index_20_Link" text:visited-style-name="Index_20_Link">11.7 <text:s/>Paso 7<text:tab/>16</text:a></text:p>
          <text:p text:style-name="P4"><text:a xlink:type="simple" xlink:href="#__RefHeading___Toc961_2796764550" office:name=" Paso 8" text:style-name="Index_20_Link" text:visited-style-name="Index_20_Link">11.8 <text:s/>Paso 8<text:tab/>16</text:a></text:p>
          <text:p text:style-name="P3"><text:a xlink:type="simple" xlink:href="#__RefHeading___Toc963_2796764550" office:name="Ejemplo de Comportamiento Esperado en UX" text:style-name="Index_20_Link" text:visited-style-name="Index_20_Link">12. Ejemplo de Comportamiento Esperado en UX<text:tab/>17</text:a></text:p>
          <text:p text:style-name="P4"><text:a xlink:type="simple" xlink:href="#__RefHeading___Toc965_2796764550" office:name=" Primer mensaje" text:style-name="Index_20_Link" text:visited-style-name="Index_20_Link">12.1 <text:s/>Primer mensaje<text:tab/>17</text:a></text:p>
          <text:p text:style-name="P4"><text:a xlink:type="simple" xlink:href="#__RefHeading___Toc967_2796764550" office:name=" Segunda validación" text:style-name="Index_20_Link" text:visited-style-name="Index_20_Link">12.2 <text:s/>Segunda validación<text:tab/>17</text:a></text:p>
          <text:p text:style-name="P4"><text:a xlink:type="simple" xlink:href="#__RefHeading___Toc969_2796764550" office:name=" Mensaje final" text:style-name="Index_20_Link" text:visited-style-name="Index_20_Link">12.3 <text:s/>Mensaje final<text:tab/>17</text:a></text:p>
          <text:p text:style-name="P4"><text:a xlink:type="simple" xlink:href="#__RefHeading___Toc971_2796764550" office:name=" Importancia de esto" text:style-name="Index_20_Link" text:visited-style-name="Index_20_Link">12.4 <text:s/>Importancia de esto<text:tab/>17</text:a></text:p>
          <text:p text:style-name="P3"><text:a xlink:type="simple" xlink:href="#__RefHeading___Toc973_2796764550" office:name="Qué debería eliminar esta funcionalidad" text:style-name="Index_20_Link" text:visited-style-name="Index_20_Link">13. Qué debería eliminar esta funcionalidad<text:tab/>18</text:a></text:p>
          <text:p text:style-name="P3"><text:a xlink:type="simple" xlink:href="#__RefHeading___Toc977_2796764550" office:name="Qué NO debería hacer esta funcionalidad" text:style-name="Index_20_Link" text:visited-style-name="Index_20_Link">14. Qué NO debería hacer esta funcionalidad<text:tab/>19</text:a></text:p>
          <text:p text:style-name="P4"><text:a xlink:type="simple" xlink:href="#__RefHeading___Toc979_2796764550" office:name=" Principio clave" text:style-name="Index_20_Link" text:visited-style-name="Index_20_Link">14.1 <text:s/>Principio clave<text:tab/>19</text:a></text:p>
          <text:p text:style-name="P3"><text:a xlink:type="simple" xlink:href="#__RefHeading___Toc981_2796764550" office:name="Relación con el Protocolo de Rutas (Anexo 01)" text:style-name="Index_20_Link" text:visited-style-name="Index_20_Link">15. Relación con el Protocolo de Rutas (Anexo 01)<text:tab/>20</text:a></text:p>
          <text:p text:style-name="P4"><text:a xlink:type="simple" xlink:href="#__RefHeading___Toc983_2796764550" office:name=" Razón" text:style-name="Index_20_Link" text:visited-style-name="Index_20_Link">15.1 <text:s/>Razón<text:tab/>20</text:a></text:p>
          <text:p text:style-name="P4"><text:a xlink:type="simple" xlink:href="#__RefHeading___Toc985_2796764550" office:name=" Conclusión" text:style-name="Index_20_Link" text:visited-style-name="Index_20_Link">15.2 <text:s/>Conclusión<text:tab/>20</text:a></text:p>
          <text:p text:style-name="P3"><text:a xlink:type="simple" xlink:href="#__RefHeading___Toc987_2796764550" office:name="Relación con la Privacidad y Seguridad (Anexo 02)" text:style-name="Index_20_Link" text:visited-style-name="Index_20_Link">16. Relación con la Privacidad y Seguridad (Anexo 02)<text:tab/>21</text:a></text:p>
          <text:p text:style-name="P3"><text:a xlink:type="simple" xlink:href="#__RefHeading___Toc989_2796764550" office:name="Consideración sobre Crecimiento del Inventario" text:style-name="Index_20_Link" text:visited-style-name="Index_20_Link">17. Consideración sobre Crecimiento del Inventario<text:tab/>22</text:a></text:p>
          <text:p text:style-name="P4"><text:a xlink:type="simple" xlink:href="#__RefHeading___Toc991_2796764550" office:name=" Implicación técnica" text:style-name="Index_20_Link" text:visited-style-name="Index_20_Link"><text:soft-page-break/>17.1 <text:s/>Implicación técnica<text:tab/>22</text:a></text:p>
          <text:p text:style-name="P3"><text:a xlink:type="simple" xlink:href="#__RefHeading___Toc993_2796764550" office:name="Recomendación de Arquitectura Técnica" text:style-name="Index_20_Link" text:visited-style-name="Index_20_Link">18. Recomendación de Arquitectura Técnica<text:tab/>23</text:a></text:p>
          <text:p text:style-name="P4"><text:a xlink:type="simple" xlink:href="#__RefHeading___Toc995_2796764550" office:name=" Posibles nombres recomendados" text:style-name="Index_20_Link" text:visited-style-name="Index_20_Link">18.1 <text:s/>Posibles nombres recomendados<text:tab/>23</text:a></text:p>
          <text:p text:style-name="P3"><text:a xlink:type="simple" xlink:href="#__RefHeading___Toc999_2796764550" office:name="Flujo Técnico Esperado" text:style-name="Index_20_Link" text:visited-style-name="Index_20_Link">19. Flujo Técnico Esperado<text:tab/>24</text:a></text:p>
          <text:p text:style-name="P4"><text:a xlink:type="simple" xlink:href="#__RefHeading___Toc1001_2796764550" office:name=" Fase 1 — Verificación" text:style-name="Index_20_Link" text:visited-style-name="Index_20_Link">19.1 <text:s/>Fase 1 — Verificación<text:tab/>24</text:a></text:p>
          <text:p text:style-name="P4"><text:a xlink:type="simple" xlink:href="#__RefHeading___Toc1003_2796764550" office:name=" Fase 2 — Confirmación" text:style-name="Index_20_Link" text:visited-style-name="Index_20_Link">19.2 <text:s/>Fase 2 — Confirmación<text:tab/>24</text:a></text:p>
          <text:p text:style-name="P4"><text:a xlink:type="simple" xlink:href="#__RefHeading___Toc1207_2796764550" office:name=" Fase 3 — Ejecución" text:style-name="Index_20_Link" text:visited-style-name="Index_20_Link">19.3 <text:s/>Fase 3 — Ejecución<text:tab/>24</text:a></text:p>
          <text:p text:style-name="P4"><text:a xlink:type="simple" xlink:href="#__RefHeading___Toc1209_2796764550" office:name=" Fase 4 — Reconstrucción controlada" text:style-name="Index_20_Link" text:visited-style-name="Index_20_Link">19.4 <text:s/>Fase 4 — Reconstrucción controlada<text:tab/>24</text:a></text:p>
          <text:p text:style-name="P4"><text:a xlink:type="simple" xlink:href="#__RefHeading___Toc1009_2796764550" office:name=" Fase 5 — Feedback" text:style-name="Index_20_Link" text:visited-style-name="Index_20_Link">19.5 <text:s/>Fase 5 — Feedback<text:tab/>24</text:a></text:p>
          <text:p text:style-name="P3"><text:a xlink:type="simple" xlink:href="#__RefHeading___Toc1011_2796764550" office:name="Posible Evolución Futura de la Funcionalidad" text:style-name="Index_20_Link" text:visited-style-name="Index_20_Link">20. Posible Evolución Futura de la Funcionalidad<text:tab/>25</text:a></text:p>
          <text:p text:style-name="P4"><text:a xlink:type="simple" xlink:href="#__RefHeading___Toc1013_2796764550" office:name="Evoluciones recomendables a medio plazo" text:style-name="Index_20_Link" text:visited-style-name="Index_20_Link">20.1 Evoluciones recomendables a medio plazo<text:tab/>25</text:a></text:p>
          <text:p text:style-name="P3"><text:a xlink:type="simple" xlink:href="#__RefHeading___Toc1015_2796764550" office:name="Requisitos Funcionales Asociados" text:style-name="Index_20_Link" text:visited-style-name="Index_20_Link">21. Requisitos Funcionales Asociados<text:tab/>26</text:a></text:p>
          <text:p text:style-name="P4"><text:a xlink:type="simple" xlink:href="#__RefHeading___Toc1017_2796764550" office:name=" RF-III.1" text:style-name="Index_20_Link" text:visited-style-name="Index_20_Link">21.1 <text:s/>RF-III.1<text:tab/>26</text:a></text:p>
          <text:p text:style-name="P4"><text:a xlink:type="simple" xlink:href="#__RefHeading___Toc1019_2796764550" office:name=" RF-III.2" text:style-name="Index_20_Link" text:visited-style-name="Index_20_Link">21.2 <text:s/>RF-III.2<text:tab/>26</text:a></text:p>
          <text:p text:style-name="P4"><text:a xlink:type="simple" xlink:href="#__RefHeading___Toc1021_2796764550" office:name=" RF-III.3" text:style-name="Index_20_Link" text:visited-style-name="Index_20_Link">21.3 <text:s/>RF-III.3<text:tab/>26</text:a></text:p>
          <text:p text:style-name="P4"><text:a xlink:type="simple" xlink:href="#__RefHeading___Toc1023_2796764550" office:name=" RF-III.4" text:style-name="Index_20_Link" text:visited-style-name="Index_20_Link">21.4 <text:s/>RF-III.4<text:tab/>26</text:a></text:p>
          <text:p text:style-name="P4"><text:a xlink:type="simple" xlink:href="#__RefHeading___Toc1025_2796764550" office:name=" RF-III.5" text:style-name="Index_20_Link" text:visited-style-name="Index_20_Link">21.5 <text:s/>RF-III.5<text:tab/>26</text:a></text:p>
          <text:p text:style-name="P3"><text:a xlink:type="simple" xlink:href="#__RefHeading___Toc1027_2796764550" office:name="Requisitos No Funcionales Asociados" text:style-name="Index_20_Link" text:visited-style-name="Index_20_Link">22. Requisitos No Funcionales Asociados<text:tab/>27</text:a></text:p>
          <text:p text:style-name="P4"><text:a xlink:type="simple" xlink:href="#__RefHeading___Toc1029_2796764550" office:name=" RNF-III.1 — Seguridad Operativa" text:style-name="Index_20_Link" text:visited-style-name="Index_20_Link">22.1 <text:s/>RNF-III.1 — Seguridad Operativa<text:tab/>27</text:a></text:p>
          <text:p text:style-name="P4"><text:a xlink:type="simple" xlink:href="#__RefHeading___Toc1031_2796764550" office:name=" RNF-III.2 — Robustez" text:style-name="Index_20_Link" text:visited-style-name="Index_20_Link">22.2 <text:s/>RNF-III.2 — Robustez<text:tab/>27</text:a></text:p>
          <text:p text:style-name="P4"><text:a xlink:type="simple" xlink:href="#__RefHeading___Toc1033_2796764550" office:name=" RNF-III.3 — Usabilidad" text:style-name="Index_20_Link" text:visited-style-name="Index_20_Link">22.3 <text:s/>RNF-III.3 — Usabilidad<text:tab/>27</text:a></text:p>
          <text:p text:style-name="P4"><text:a xlink:type="simple" xlink:href="#__RefHeading___Toc1035_2796764550" office:name=" RNF-III.4 — Mantenibilidad" text:style-name="Index_20_Link" text:visited-style-name="Index_20_Link">22.4 <text:s/>RNF-III.4 — Mantenibilidad<text:tab/>27</text:a></text:p>
          <text:p text:style-name="P4"><text:a xlink:type="simple" xlink:href="#__RefHeading___Toc1037_2796764550" office:name=" RNF-III.5 — Escalabilidad" text:style-name="Index_20_Link" text:visited-style-name="Index_20_Link">22.5 <text:s/>RNF-III.5 — Escalabilidad<text:tab/>27</text:a></text:p>
          <text:p text:style-name="P3"><text:a xlink:type="simple" xlink:href="#__RefHeading___Toc1039_2796764550" office:name="Riesgos si No se Implementa esta Mejora" text:style-name="Index_20_Link" text:visited-style-name="Index_20_Link">23. Riesgos si No se Implementa esta Mejora<text:tab/>28</text:a></text:p>
          <text:p text:style-name="P3"><text:a xlink:type="simple" xlink:href="#__RefHeading___Toc1041_2796764550" office:name="Conclusión" text:style-name="Index_20_Link" text:visited-style-name="Index_20_Link">24. Conclusión<text:tab/>29</text:a></text:p>
        </text:index-body>
      </text:table-of-content>
      <text:p text:style-name="Text_20_body"/>
      <text:h text:style-name="P5" text:outline-level="1"><text:bookmark-start text:name="__RefHeading___Toc903_2796764550"/><text:span text:style-name="Strong_20_Emphasis">Introducción</text:span><text:bookmark-end text:name="__RefHeading___Toc903_2796764550"/></text:h>
      <text:p text:style-name="Text_20_body">A medida que Habitly evoluciona desde una aplicación académica funcional hacia un sistema más sólido y mantenible, no solo debe preocuparse por <text:span text:style-name="Strong_20_Emphasis">guardar datos correctamente</text:span> y <text:span text:style-name="Strong_20_Emphasis">protegerlos</text:span>, sino también por ofrecer mecanismos de <text:span text:style-name="Strong_20_Emphasis">mantenimiento interno</text:span> que permitan conservar el sistema limpio, controlado y sostenible a lo largo del tiempo.</text:p>
      <text:p text:style-name="Text_20_body">En la versión <text:span text:style-name="Strong_20_Emphasis">v1.0.1-BETA</text:span>, el sistema ya dispone de:</text:p>
      <text:list text:style-name="L1">
        <text:list-item>
          <text:p text:style-name="P6">persistencia local mediante <text:span text:style-name="Source_20_Text">.dat</text:span>, </text:p>
        </text:list-item>
        <text:list-item>
          <text:p text:style-name="P6">lógica financiera funcional, </text:p>
        </text:list-item>
        <text:list-item>
          <text:p text:style-name="P6">control de estados automáticos, </text:p>
        </text:list-item>
        <text:list-item>
          <text:p text:style-name="P7">y validación reforzada de entrada de datos. </text:p>
        </text:list-item>
      </text:list>
      <text:p text:style-name="Text_20_body">Sin embargo, todavía no existe una funcionalidad específica que permita al usuario <text:span text:style-name="Strong_20_Emphasis">eliminar de forma segura los datos locales de la aplicación</text:span> cuando así lo desee.</text:p>
      <text:p text:style-name="Text_20_body">Este anexo define el diseño funcional y técnico de una futura opción de mantenimiento denominada:</text:p>
      <text:h text:style-name="Heading_20_2" text:outline-level="2"><text:bookmark-start text:name="__RefHeading___Toc905_2796764550"/><text:span text:style-name="Strong_20_Emphasis">“Borrar Datos de Aplicación”</text:span><text:bookmark-end text:name="__RefHeading___Toc905_2796764550"/></text:h>
      <text:p text:style-name="Text_20_body">Su objetivo será permitir la <text:span text:style-name="Strong_20_Emphasis">limpieza controlada del almacenamiento local de Habitly</text:span>, evitando acumulación innecesaria de datos, facilitando pruebas, reinicios o mantenimiento, y mejorando la sostenibilidad general del sistema.</text:p>
      <text:h text:style-name="P8" text:outline-level="1"/>
      <text:h text:style-name="P5" text:outline-level="1"><text:bookmark-start text:name="__RefHeading___Toc907_2796764550"/>Problema Detectado<text:bookmark-end text:name="__RefHeading___Toc907_2796764550"/></text:h>
      <text:p text:style-name="Text_20_body">En un sistema con persistencia local, el almacenamiento no desaparece al cerrar el programa.<text:line-break/>Eso es una ventaja, pero también implica una responsabilidad técnica.</text:p>
      <text:p text:style-name="Text_20_body">Si Habitly sigue creciendo, el entorno local del usuario puede empezar a acumular:</text:p>
      <text:list text:style-name="L2">
        <text:list-item>
          <text:p text:style-name="P9">inventarios antiguos, </text:p>
        </text:list-item>
        <text:list-item>
          <text:p text:style-name="P9">archivos temporales, </text:p>
        </text:list-item>
        <text:list-item>
          <text:p text:style-name="P9">registros obsoletos, </text:p>
        </text:list-item>
        <text:list-item>
          <text:p text:style-name="P9">futuras cachés, </text:p>
        </text:list-item>
        <text:list-item>
          <text:p text:style-name="P9">backups, </text:p>
        </text:list-item>
        <text:list-item>
          <text:p text:style-name="P10">o configuraciones ya innecesarias. </text:p>
        </text:list-item>
      </text:list>
      <text:p text:style-name="Text_20_body">Actualmente, el sistema no dispone de ninguna herramienta interna para gestionar este escenario.</text:p>
      <text:h text:style-name="Heading_20_2" text:outline-level="2"><text:bookmark-start text:name="__RefHeading___Toc909_2796764550"/>Consecuencia directa<text:bookmark-end text:name="__RefHeading___Toc909_2796764550"/></text:h>
      <text:p text:style-name="Text_20_body">Si el usuario desea “resetear” la aplicación, liberar espacio o empezar de cero, la única opción sería <text:span text:style-name="Strong_20_Emphasis">borrar archivos manualmente desde el sistema de carpetas</text:span>, lo cual:</text:p>
      <text:list text:style-name="L3">
        <text:list-item>
          <text:p text:style-name="P11">no es intuitivo, </text:p>
        </text:list-item>
        <text:list-item>
          <text:p text:style-name="P11">no es seguro, </text:p>
        </text:list-item>
        <text:list-item>
          <text:p text:style-name="P12">y rompe la experiencia de uso. </text:p>
        </text:list-item>
      </text:list>
      <text:p text:style-name="Text_20_body">Por ello, Habitly necesita incorporar una funcionalidad oficial de limpieza interna.</text:p>
      <text:h text:style-name="P8" text:outline-level="1"/>
      <text:h text:style-name="P5" text:outline-level="1"><text:bookmark-start text:name="__RefHeading___Toc911_2796764550"/>Objetivo del Anexo<text:bookmark-end text:name="__RefHeading___Toc911_2796764550"/></text:h>
      <text:p text:style-name="Text_20_body">El objetivo de esta mejora es diseñar una funcionalidad de mantenimiento que permita al usuario:</text:p>
      <text:list text:style-name="L4">
        <text:list-item>
          <text:p text:style-name="P13">borrar de forma intencionada los datos persistentes de la aplicación, </text:p>
        </text:list-item>
        <text:list-item>
          <text:p text:style-name="P13">liberar espacio en almacenamiento local, </text:p>
        </text:list-item>
        <text:list-item>
          <text:p text:style-name="P13">reiniciar el sistema si lo necesita, </text:p>
        </text:list-item>
        <text:list-item>
          <text:p text:style-name="P14">y mantener el entorno interno de Habitly limpio y controlado. </text:p>
        </text:list-item>
      </text:list>
      <text:p text:style-name="Text_20_body">Esta funcionalidad no debe entenderse como una operación casual, sino como una <text:span text:style-name="Strong_20_Emphasis">herramienta de mantenimiento avanzada</text:span>, diseñada para actuar con seguridad y confirmación explícita.</text:p>
      <text:h text:style-name="P8" text:outline-level="1"/>
      <text:h text:style-name="P5" text:outline-level="1"><text:bookmark-start text:name="__RefHeading___Toc913_2796764550"/>Principio de Diseño Aplicado<text:bookmark-end text:name="__RefHeading___Toc913_2796764550"/></text:h>
      <text:p text:style-name="Text_20_body">La propuesta se apoya en un principio muy importante de diseño de software:</text:p>
      <text:p text:style-name="P15"><text:span text:style-name="Strong_20_Emphasis">Toda aplicación que genera almacenamiento persistente debería ofrecer mecanismos internos de limpieza o reinicio controlado.</text:span></text:p>
      <text:p text:style-name="Text_20_body">Esto evita que el usuario dependa de acciones externas o manipulaciones manuales sobre el sistema de archivos.</text:p>
      <text:p text:style-name="Text_20_body">En otras palabras:</text:p>
      <text:list text:style-name="L5">
        <text:list-item>
          <text:p text:style-name="P16">Habitly debe ser capaz de <text:span text:style-name="Strong_20_Emphasis">crear sus propios datos</text:span>, </text:p>
        </text:list-item>
        <text:list-item>
          <text:p text:style-name="P17">pero también de <text:span text:style-name="Strong_20_Emphasis">gestionarlos y eliminarlos correctamente</text:span> cuando sea necesario. </text:p>
        </text:list-item>
      </text:list>
      <text:h text:style-name="P8" text:outline-level="1"/>
      <text:h text:style-name="P5" text:outline-level="1"><text:bookmark-start text:name="__RefHeading___Toc915_2796764550"/>¿Qué significa “Borrar Datos de Aplicación”?<text:bookmark-end text:name="__RefHeading___Toc915_2796764550"/></text:h>
      <text:p text:style-name="Text_20_body">Dentro del contexto de Habitly, esta funcionalidad no se refiere únicamente a “borrar un archivo”.</text:p>
      <text:p text:style-name="Text_20_body">Se refiere a la eliminación controlada de los elementos locales que la aplicación haya generado y que formen parte de su entorno persistente.</text:p>
      <text:h text:style-name="Heading_20_2" text:outline-level="2"><text:bookmark-start text:name="__RefHeading___Toc917_2796764550"/>Afectaría, principalmente, a elementos como:<text:bookmark-end text:name="__RefHeading___Toc917_2796764550"/></text:h>
      <text:list text:style-name="L6">
        <text:list-item>
          <text:p text:style-name="P18">archivo de inventario principal </text:p>
        </text:list-item>
        <text:list-item>
          <text:p text:style-name="P18">posibles archivos de caché futura </text:p>
        </text:list-item>
        <text:list-item>
          <text:p text:style-name="P18">backups internos </text:p>
        </text:list-item>
        <text:list-item>
          <text:p text:style-name="P18">logs locales </text:p>
        </text:list-item>
        <text:list-item>
          <text:p text:style-name="P18">configuraciones temporales </text:p>
        </text:list-item>
        <text:list-item>
          <text:p text:style-name="P19">otros residuos operativos de la aplicación </text:p>
        </text:list-item>
      </text:list>
      <text:h text:style-name="P8" text:outline-level="1"/>
      <text:h text:style-name="P5" text:outline-level="1"><text:bookmark-start text:name="__RefHeading___Toc919_2796764550"/>Diferencia entre “Datos de Usuario” y “Datos de Sistema”<text:bookmark-end text:name="__RefHeading___Toc919_2796764550"/></text:h>
      <text:p text:style-name="Text_20_body">Para diseñar correctamente esta funcionalidad, es importante distinguir dos tipos de información:</text:p>
      <text:h text:style-name="Heading_20_2" text:outline-level="2"><text:bookmark-start text:name="__RefHeading___Toc921_2796764550"/>Datos de usuario<text:bookmark-end text:name="__RefHeading___Toc921_2796764550"/></text:h>
      <text:p text:style-name="Text_20_body">Son los datos funcionales que tienen valor directo para el uso de Habitly.</text:p>
      <text:p text:style-name="Text_20_body">Ejemplos:</text:p>
      <text:list text:style-name="L7">
        <text:list-item>
          <text:p text:style-name="P20">viviendas registradas </text:p>
        </text:list-item>
        <text:list-item>
          <text:p text:style-name="P20">estados de alquiler </text:p>
        </text:list-item>
        <text:list-item>
          <text:p text:style-name="P20">pagos </text:p>
        </text:list-item>
        <text:list-item>
          <text:p text:style-name="P20">historial financiero </text:p>
        </text:list-item>
        <text:list-item>
          <text:p text:style-name="P21">datos de propietarios o arrendatarios </text:p>
        </text:list-item>
      </text:list>
      <text:h text:style-name="Heading_20_2" text:outline-level="2"><text:bookmark-start text:name="__RefHeading___Toc1205_2796764550"/>Datos de sistema<text:bookmark-end text:name="__RefHeading___Toc1205_2796764550"/></text:h>
      <text:p text:style-name="Text_20_body">Son datos auxiliares necesarios para el funcionamiento técnico del programa.</text:p>
      <text:p text:style-name="Text_20_body">Ejemplos:</text:p>
      <text:list text:style-name="L8">
        <text:list-item>
          <text:p text:style-name="P22">caché </text:p>
        </text:list-item>
        <text:list-item>
          <text:p text:style-name="P22">archivos temporales </text:p>
        </text:list-item>
        <text:list-item>
          <text:p text:style-name="P22">logs </text:p>
        </text:list-item>
        <text:list-item>
          <text:p text:style-name="P22">backups </text:p>
        </text:list-item>
        <text:list-item>
          <text:p text:style-name="P23">configuración interna </text:p>
        </text:list-item>
      </text:list>
      <text:p text:style-name="P24"/>
      <text:p text:style-name="P25"><text:bookmark-start text:name="__RefHeading___Toc925_2796764550"/>Importancia de esta distinción<text:bookmark-end text:name="__RefHeading___Toc925_2796764550"/></text:p>
      <text:p text:style-name="Text_20_body">En una primera implementación, la opción <text:span text:style-name="Strong_20_Emphasis">“Borrar Datos de Aplicación”</text:span> puede plantearse de forma global.<text:line-break/>Pero a medio plazo, Habitly podría evolucionar hacia una gestión más fina, por ejemplo:</text:p>
      <text:list text:style-name="L9">
        <text:list-item>
          <text:p text:style-name="P26">borrar solo caché </text:p>
        </text:list-item>
        <text:list-item>
          <text:p text:style-name="P26">borrar solo backups </text:p>
        </text:list-item>
        <text:list-item>
          <text:p text:style-name="P27">reiniciar completamente la aplicación </text:p>
        </text:list-item>
      </text:list>
      <text:p text:style-name="Text_20_body">Esto hace que la arquitectura de limpieza deba pensarse ya con visión escalable.</text:p>
      <text:h text:style-name="P8" text:outline-level="1"/>
      <text:h text:style-name="P5" text:outline-level="1"><text:bookmark-start text:name="__RefHeading___Toc927_2796764550"/>Justificación Funcional de la Mejora<text:bookmark-end text:name="__RefHeading___Toc927_2796764550"/></text:h>
      <text:p text:style-name="Text_20_body">Esta funcionalidad es útil por varios motivos reales.</text:p>
      <text:h text:style-name="Heading_20_2" text:outline-level="2"><text:bookmark-start text:name="__RefHeading___Toc929_2796764550"/>Reinicio controlado del sistema<text:bookmark-end text:name="__RefHeading___Toc929_2796764550"/></text:h>
      <text:p text:style-name="Text_20_body">Habrá situaciones en las que el usuario quiera:</text:p>
      <text:list text:style-name="L10">
        <text:list-item>
          <text:p text:style-name="P28">empezar desde cero, </text:p>
        </text:list-item>
        <text:list-item>
          <text:p text:style-name="P28">rehacer el inventario, </text:p>
        </text:list-item>
        <text:list-item>
          <text:p text:style-name="P28">eliminar pruebas anteriores, </text:p>
        </text:list-item>
        <text:list-item>
          <text:p text:style-name="P29">o resetear Habitly tras un uso de prueba. </text:p>
        </text:list-item>
      </text:list>
      <text:p text:style-name="Text_20_body">Sin una función oficial, esto obligaría a intervenir manualmente en carpetas internas.</text:p>
      <text:h text:style-name="Heading_20_2" text:outline-level="2"><text:bookmark-start text:name="__RefHeading___Toc931_2796764550"/>Limpieza de residuos técnicos<text:bookmark-end text:name="__RefHeading___Toc931_2796764550"/></text:h>
      <text:p text:style-name="Text_20_body">Con futuras versiones, Habitly puede llegar a generar más contenido local del necesario.</text:p>
      <text:p text:style-name="Text_20_body">Por ejemplo:</text:p>
      <text:list text:style-name="L11">
        <text:list-item>
          <text:p text:style-name="P30">caché temporal, </text:p>
        </text:list-item>
        <text:list-item>
          <text:p text:style-name="P30">archivos intermedios, </text:p>
        </text:list-item>
        <text:list-item>
          <text:p text:style-name="P30">backups duplicados, </text:p>
        </text:list-item>
        <text:list-item>
          <text:p text:style-name="P31">logs acumulados. </text:p>
        </text:list-item>
      </text:list>
      <text:p text:style-name="Text_20_body">Si no existe una estrategia de limpieza, el almacenamiento puede crecer sin control.</text:p>
      <text:h text:style-name="P32" text:outline-level="2"/>
      <text:h text:style-name="P33" text:outline-level="2"><text:bookmark-start text:name="__RefHeading___Toc933_2796764550"/>Mejora de mantenibilidad y soporte<text:bookmark-end text:name="__RefHeading___Toc933_2796764550"/></text:h>
      <text:p text:style-name="Text_20_body">Una función de limpieza también resulta útil desde el punto de vista técnico, porque:</text:p>
      <text:list text:style-name="L12">
        <text:list-item>
          <text:p text:style-name="P34">facilita pruebas, </text:p>
        </text:list-item>
        <text:list-item>
          <text:p text:style-name="P34">simplifica soporte, </text:p>
        </text:list-item>
        <text:list-item>
          <text:p text:style-name="P34">reduce incidencias por datos corruptos o antiguos, </text:p>
        </text:list-item>
        <text:list-item>
          <text:p text:style-name="P35">y permite restaurar el sistema a un estado limpio sin reinstalaciones manuales. </text:p>
        </text:list-item>
      </text:list>
      <text:h text:style-name="P8" text:outline-level="1"/>
      <text:h text:style-name="P5" text:outline-level="1"><text:bookmark-start text:name="__RefHeading___Toc935_2796764550"/>Escenario de Uso Esperado<text:bookmark-end text:name="__RefHeading___Toc935_2796764550"/></text:h>
      <text:p text:style-name="Text_20_body">El uso esperado de esta funcionalidad sería el siguiente:</text:p>
      <text:h text:style-name="Heading_20_2" text:outline-level="2"><text:bookmark-start text:name="__RefHeading___Toc937_2796764550"/>Caso típico<text:bookmark-end text:name="__RefHeading___Toc937_2796764550"/></text:h>
      <text:p text:style-name="Text_20_body">Un usuario ha trabajado durante un tiempo con Habitly, ha hecho pruebas o ha generado inventarios que ya no necesita.</text:p>
      <text:p text:style-name="Text_20_body">Desea:</text:p>
      <text:list text:style-name="L13">
        <text:list-item>
          <text:p text:style-name="P36">liberar espacio, </text:p>
        </text:list-item>
        <text:list-item>
          <text:p text:style-name="P36">reiniciar la aplicación, </text:p>
        </text:list-item>
        <text:list-item>
          <text:p text:style-name="P37">o limpiar el sistema antes de comenzar una nueva fase de uso. </text:p>
        </text:list-item>
      </text:list>
      <text:p text:style-name="P38">En ese momento, Habitly debería ofrecer una opción específica para ello.</text:p>
      <text:h text:style-name="P39" text:outline-level="1"/>
      <text:h text:style-name="P40" text:outline-level="1"><text:bookmark-start text:name="__RefHeading___Toc939_2796764550"/>Ubicación Recomendada de la Funcionalidad<text:bookmark-end text:name="__RefHeading___Toc939_2796764550"/></text:h>
      <text:p text:style-name="Text_20_body">Desde el punto de vista de experiencia de usuario, esta opción <text:span text:style-name="Strong_20_Emphasis">no debería colocarse entre las acciones normales de negocio</text:span> como:</text:p>
      <text:list text:style-name="L14">
        <text:list-item>
          <text:p text:style-name="P41">registrar vivienda, </text:p>
        </text:list-item>
        <text:list-item>
          <text:p text:style-name="P41">registrar pago, </text:p>
        </text:list-item>
        <text:list-item>
          <text:p text:style-name="P41">listar inventario, </text:p>
        </text:list-item>
        <text:list-item>
          <text:p text:style-name="P42">etc. </text:p>
        </text:list-item>
      </text:list>
      <text:p text:style-name="Text_20_body">Eso sería peligroso.</text:p>
      <text:h text:style-name="Heading_20_2" text:outline-level="2"><text:bookmark-start text:name="__RefHeading___Toc941_2796764550"/>Ubicación recomendada<text:bookmark-end text:name="__RefHeading___Toc941_2796764550"/></text:h>
      <text:p text:style-name="Text_20_body">Debe ubicarse dentro de un apartado específico como:</text:p>
      <text:p text:style-name="P43">Mantenimiento</text:p>
      <text:p text:style-name="Text_20_body">o</text:p>
      <text:p text:style-name="P44"><text:bookmark text:name="code-block-viewer"/>Configuración avanzada</text:p>
      <text:p text:style-name="Text_20_body">Esto reduce el riesgo de uso accidental y refuerza el carácter técnico de la operación.</text:p>
      <text:h text:style-name="P8" text:outline-level="1"/>
      <text:h text:style-name="P5" text:outline-level="1"><text:bookmark-start text:name="__RefHeading___Toc943_2796764550"/>Flujo de Confirmación Recomendado<text:bookmark-end text:name="__RefHeading___Toc943_2796764550"/></text:h>
      <text:p text:style-name="Text_20_body">Debido a que esta operación puede implicar pérdida irreversible de datos locales, el sistema <text:span text:style-name="Strong_20_Emphasis">no debe ejecutarla con una sola acción directa</text:span>.</text:p>
      <text:p text:style-name="Text_20_body">Debe existir un <text:span text:style-name="Strong_20_Emphasis">flujo de confirmación reforzado</text:span>.</text:p>
      <text:h text:style-name="P8" text:outline-level="1"/>
      <text:h text:style-name="P5" text:outline-level="1"><text:bookmark-start text:name="__RefHeading___Toc945_2796764550"/>Flujo Funcional Propuesto<text:bookmark-end text:name="__RefHeading___Toc945_2796764550"/></text:h>
      <text:p text:style-name="Text_20_body">El comportamiento recomendado para la opción <text:span text:style-name="Strong_20_Emphasis">“Borrar Datos de Aplicación”</text:span> debe ser el siguiente:</text:p>
      <text:h text:style-name="Heading_20_2" text:outline-level="2"><text:bookmark-start text:name="__RefHeading___Toc947_2796764550"/><text:s/>Paso 1<text:bookmark-end text:name="__RefHeading___Toc947_2796764550"/></text:h>
      <text:p text:style-name="Text_20_body">El usuario accede al menú de mantenimiento o configuración avanzada.</text:p>
      <text:h text:style-name="Heading_20_2" text:outline-level="2"><text:bookmark-start text:name="__RefHeading___Toc949_2796764550"/><text:s/>Paso 2<text:bookmark-end text:name="__RefHeading___Toc949_2796764550"/></text:h>
      <text:p text:style-name="Text_20_body">Selecciona la opción:</text:p>
      <text:p text:style-name="P45"><text:bookmark text:name="code-block-viewer Copia 1"/>Borrar Datos de Aplicación</text:p>
      <text:h text:style-name="Heading_20_2" text:outline-level="2"><text:bookmark-start text:name="__RefHeading___Toc951_2796764550"/><text:s/>Paso 3<text:bookmark-end text:name="__RefHeading___Toc951_2796764550"/></text:h>
      <text:p text:style-name="Text_20_body">Habitly muestra una advertencia clara explicando que esta operación eliminará los datos locales persistentes.</text:p>
      <text:h text:style-name="Heading_20_2" text:outline-level="2"><text:bookmark-start text:name="__RefHeading___Toc953_2796764550"/><text:s/>Paso 4<text:bookmark-end text:name="__RefHeading___Toc953_2796764550"/></text:h>
      <text:p text:style-name="Text_20_body">El sistema solicita una primera confirmación explícita.</text:p>
      <text:h text:style-name="Heading_20_2" text:outline-level="2"><text:bookmark-start text:name="__RefHeading___Toc955_2796764550"/><text:s/>Paso 5<text:bookmark-end text:name="__RefHeading___Toc955_2796764550"/></text:h>
      <text:p text:style-name="Text_20_body">Si el usuario confirma, el sistema muestra una segunda validación de seguridad.</text:p>
      <text:h text:style-name="Heading_20_2" text:outline-level="2"><text:bookmark-start text:name="__RefHeading___Toc957_2796764550"/><text:s/>Paso 6<text:bookmark-end text:name="__RefHeading___Toc957_2796764550"/></text:h>
      <text:p text:style-name="Text_20_body">Solo tras la segunda confirmación se ejecuta el proceso de limpieza.</text:p>
      <text:h text:style-name="Heading_20_2" text:outline-level="2"><text:bookmark-start text:name="__RefHeading___Toc959_2796764550"/><text:s/>Paso 7<text:bookmark-end text:name="__RefHeading___Toc959_2796764550"/></text:h>
      <text:p text:style-name="Text_20_body">El programa informa al usuario del resultado de la operación.</text:p>
      <text:h text:style-name="Heading_20_2" text:outline-level="2"><text:bookmark-start text:name="__RefHeading___Toc961_2796764550"/><text:s/>Paso 8<text:bookmark-end text:name="__RefHeading___Toc961_2796764550"/></text:h>
      <text:p text:style-name="Text_20_body">Habitly queda preparado para reiniciarse con almacenamiento limpio o reconstruir su estructura base automáticamente.</text:p>
      <text:h text:style-name="Heading_20_1" text:outline-level="1"><text:bookmark-start text:name="__RefHeading___Toc963_2796764550"/><text:soft-page-break/>Ejemplo de Comportamiento Esperado en UX<text:bookmark-end text:name="__RefHeading___Toc963_2796764550"/></text:h>
      <text:p text:style-name="Text_20_body">Aunque el diseño final podrá variar, la filosofía de interacción debería seguir este patrón:</text:p>
      <text:h text:style-name="Heading_20_2" text:outline-level="2"><text:bookmark-start text:name="__RefHeading___Toc965_2796764550"/><text:s/>Primer mensaje<text:bookmark-end text:name="__RefHeading___Toc965_2796764550"/></text:h>
      <text:list text:style-name="L15">
        <text:list-item>
          <text:p text:style-name="P46">advertencia clara </text:p>
        </text:list-item>
        <text:list-item>
          <text:p text:style-name="P46">lenguaje directo </text:p>
        </text:list-item>
        <text:list-item>
          <text:p text:style-name="P47">explicación de consecuencias </text:p>
        </text:list-item>
      </text:list>
      <text:h text:style-name="Heading_20_2" text:outline-level="2"><text:bookmark-start text:name="__RefHeading___Toc967_2796764550"/><text:s/>Segunda validación<text:bookmark-end text:name="__RefHeading___Toc967_2796764550"/></text:h>
      <text:list text:style-name="L16">
        <text:list-item>
          <text:p text:style-name="P48">confirmación reforzada </text:p>
        </text:list-item>
        <text:list-item>
          <text:p text:style-name="P49">evita pulsaciones o elecciones impulsivas </text:p>
        </text:list-item>
      </text:list>
      <text:h text:style-name="Heading_20_2" text:outline-level="2"><text:bookmark-start text:name="__RefHeading___Toc969_2796764550"/><text:s/>Mensaje final<text:bookmark-end text:name="__RefHeading___Toc969_2796764550"/></text:h>
      <text:list text:style-name="L17">
        <text:list-item>
          <text:p text:style-name="P50">resultado confirmado </text:p>
        </text:list-item>
        <text:list-item>
          <text:p text:style-name="P51">feedback claro de éxito o fallo </text:p>
        </text:list-item>
      </text:list>
      <text:h text:style-name="Heading_20_2" text:outline-level="2"><text:bookmark-start text:name="__RefHeading___Toc971_2796764550"/><text:s/>Importancia de esto<text:bookmark-end text:name="__RefHeading___Toc971_2796764550"/></text:h>
      <text:p text:style-name="Text_20_body">La experiencia debe dejar claro al usuario que:</text:p>
      <text:p text:style-name="P15">no está “limpiando una pantalla”, sino <text:span text:style-name="Strong_20_Emphasis">borrando datos reales almacenados por la aplicación</text:span>.</text:p>
      <text:h text:style-name="P8" text:outline-level="1"/>
      <text:h text:style-name="P5" text:outline-level="1"><text:bookmark-start text:name="__RefHeading___Toc973_2796764550"/>Qué debería eliminar esta funcionalidad<text:bookmark-end text:name="__RefHeading___Toc973_2796764550"/></text:h>
      <text:p text:style-name="Text_20_body">En una primera implementación razonable, Habitly debería poder eliminar al menos:</text:p>
      <text:list text:style-name="L18">
        <text:list-item>
          <text:p text:style-name="P52">archivo principal de persistencia </text:p>
        </text:list-item>
        <text:list-item>
          <text:p text:style-name="P52">futuros archivos temporales </text:p>
        </text:list-item>
        <text:list-item>
          <text:p text:style-name="P52">posibles cachés </text:p>
        </text:list-item>
        <text:list-item>
          <text:p text:style-name="P53">estructuras de apoyo internas </text:p>
        </text:list-item>
      </text:list>
      <text:p text:style-name="P24"><text:bookmark-start text:name="__RefHeading___Toc975_2796764550"/>Elemento mínimo prioritario<text:bookmark-end text:name="__RefHeading___Toc975_2796764550"/></text:p>
      <text:p text:style-name="Text_20_body">El primer objetivo práctico debe ser el archivo:</text:p>
      <text:p text:style-name="P43"><text:bookmark text:name="code-block-viewer Copia 2"/>inventario_habitly.dat</text:p>
      <text:p text:style-name="Text_20_body">ya que es el núcleo de persistencia actual.</text:p>
      <text:h text:style-name="P8" text:outline-level="1"/>
      <text:h text:style-name="P5" text:outline-level="1"><text:bookmark-start text:name="__RefHeading___Toc977_2796764550"/>Qué NO debería hacer esta funcionalidad<text:bookmark-end text:name="__RefHeading___Toc977_2796764550"/></text:h>
      <text:p text:style-name="Text_20_body">Para evitar comportamientos peligrosos o poco mantenibles, esta función no debería:</text:p>
      <text:list text:style-name="L19">
        <text:list-item>
          <text:p text:style-name="P54">borrar archivos fuera del entorno de Habitly, </text:p>
        </text:list-item>
        <text:list-item>
          <text:p text:style-name="P54">eliminar carpetas del proyecto fuente, </text:p>
        </text:list-item>
        <text:list-item>
          <text:p text:style-name="P54">afectar al código Java, </text:p>
        </text:list-item>
        <text:list-item>
          <text:p text:style-name="P54">modificar el repositorio Git, </text:p>
        </text:list-item>
        <text:list-item>
          <text:p text:style-name="P54">tocar documentación o archivos del desarrollador, </text:p>
        </text:list-item>
        <text:list-item>
          <text:p text:style-name="P55">actuar fuera del directorio interno de datos de aplicación. </text:p>
        </text:list-item>
      </text:list>
      <text:h text:style-name="Heading_20_2" text:outline-level="2"><text:bookmark-start text:name="__RefHeading___Toc979_2796764550"/><text:s/>Principio clave<text:bookmark-end text:name="__RefHeading___Toc979_2796764550"/></text:h>
      <text:p text:style-name="P15">La limpieza debe limitarse estrictamente al entorno de almacenamiento controlado por Habitly.</text:p>
      <text:p text:style-name="Text_20_body">Esto es especialmente importante si el sistema empieza a usar rutas del tipo:</text:p>
      <text:list text:style-name="L20">
        <text:list-item>
          <text:p text:style-name="P56"><text:span text:style-name="Source_20_Text">%AppData%\Habitly</text:span> </text:p>
        </text:list-item>
        <text:list-item>
          <text:p text:style-name="P57"><text:span text:style-name="Source_20_Text">~/.habitly</text:span> </text:p>
        </text:list-item>
      </text:list>
      <text:p text:style-name="Text_20_body">como se describe en el <text:span text:style-name="Strong_20_Emphasis">Anexo </text:span><text:span text:style-name="Strong_20_Emphasis"><text:span text:style-name="T1">01</text:span></text:span>.</text:p>
      <text:h text:style-name="P8" text:outline-level="1"/>
      <text:h text:style-name="P5" text:outline-level="1"><text:bookmark-start text:name="__RefHeading___Toc981_2796764550"/>Relación con el Protocolo de Rutas (Anexo <text:span text:style-name="T2">01</text:span>)<text:bookmark-end text:name="__RefHeading___Toc981_2796764550"/></text:h>
      <text:p text:style-name="Text_20_body">Esta funcionalidad depende directamente del sistema de almacenamiento definido en el Anexo I.</text:p>
      <text:h text:style-name="Heading_20_2" text:outline-level="2"><text:bookmark-start text:name="__RefHeading___Toc983_2796764550"/><text:s/>Razón<text:bookmark-end text:name="__RefHeading___Toc983_2796764550"/></text:h>
      <text:p text:style-name="Text_20_body">Si Habitly guarda sus datos en una carpeta de aplicación estructurada, entonces puede también:</text:p>
      <text:list text:style-name="L21">
        <text:list-item>
          <text:p text:style-name="P58">identificar claramente qué pertenece a la app, </text:p>
        </text:list-item>
        <text:list-item>
          <text:p text:style-name="P58">limpiar sus propios residuos, </text:p>
        </text:list-item>
        <text:list-item>
          <text:p text:style-name="P59">y gestionar mejor su ciclo de vida local. </text:p>
        </text:list-item>
      </text:list>
      <text:h text:style-name="Heading_20_2" text:outline-level="2"><text:bookmark-start text:name="__RefHeading___Toc985_2796764550"/><text:s/>Conclusión<text:bookmark-end text:name="__RefHeading___Toc985_2796764550"/></text:h>
      <text:p text:style-name="P15">No tiene sentido diseñar una limpieza robusta si antes no existe una estructura ordenada de almacenamiento.</text:p>
      <text:p text:style-name="Text_20_body">Por eso ambos anexos están íntimamente conectados.</text:p>
      <text:h text:style-name="P8" text:outline-level="1"/>
      <text:h text:style-name="P5" text:outline-level="1"><text:bookmark-start text:name="__RefHeading___Toc987_2796764550"/>Relación con la Privacidad y Seguridad (Anexo <text:span text:style-name="T2">02</text:span>)<text:bookmark-end text:name="__RefHeading___Toc987_2796764550"/></text:h>
      <text:p text:style-name="Text_20_body">La funcionalidad de borrado también tiene una dimensión de privacidad.</text:p>
      <text:p text:style-name="Text_20_body">Eliminar correctamente los datos locales puede ser importante en escenarios como:</text:p>
      <text:list text:style-name="L22">
        <text:list-item>
          <text:p text:style-name="P60">cambio de usuario del equipo, </text:p>
        </text:list-item>
        <text:list-item>
          <text:p text:style-name="P60">cierre de uso de la aplicación, </text:p>
        </text:list-item>
        <text:list-item>
          <text:p text:style-name="P60">limpieza de pruebas con datos sensibles, </text:p>
        </text:list-item>
        <text:list-item>
          <text:p text:style-name="P60">mantenimiento previo a migraciones, </text:p>
        </text:list-item>
        <text:list-item>
          <text:p text:style-name="P61">o simplemente control del almacenamiento local. </text:p>
        </text:list-item>
      </text:list>
      <text:p text:style-name="Text_20_body">Por tanto, esta mejora no solo afecta al mantenimiento técnico, sino también a la <text:span text:style-name="Strong_20_Emphasis">higiene de datos</text:span>.</text:p>
      <text:h text:style-name="P8" text:outline-level="1"/>
      <text:h text:style-name="P5" text:outline-level="1"><text:bookmark-start text:name="__RefHeading___Toc989_2796764550"/>Consideración sobre Crecimiento del Inventario<text:bookmark-end text:name="__RefHeading___Toc989_2796764550"/></text:h>
      <text:p text:style-name="Text_20_body">Aunque en la fase actual Habitly aún no maneje volúmenes masivos de datos, es importante prever el comportamiento del sistema a medida que el inventario crezca.</text:p>
      <text:p text:style-name="Text_20_body">Con el tiempo, podrían acumularse:</text:p>
      <text:list text:style-name="L23">
        <text:list-item>
          <text:p text:style-name="P62">más viviendas, </text:p>
        </text:list-item>
        <text:list-item>
          <text:p text:style-name="P62">más estados, </text:p>
        </text:list-item>
        <text:list-item>
          <text:p text:style-name="P62">más pagos, </text:p>
        </text:list-item>
        <text:list-item>
          <text:p text:style-name="P62">más historiales, </text:p>
        </text:list-item>
        <text:list-item>
          <text:p text:style-name="P62">más backups, </text:p>
        </text:list-item>
        <text:list-item>
          <text:p text:style-name="P63">y más metadatos asociados. </text:p>
        </text:list-item>
      </text:list>
      <text:p text:style-name="Text_20_body">Esto puede hacer que el almacenamiento local aumente progresivamente.</text:p>
      <text:h text:style-name="Heading_20_2" text:outline-level="2"><text:bookmark-start text:name="__RefHeading___Toc991_2796764550"/><text:s/>Implicación técnica<text:bookmark-end text:name="__RefHeading___Toc991_2796764550"/></text:h>
      <text:p text:style-name="Text_20_body">Una funcionalidad de limpieza evita que Habitly se convierta en una aplicación que:</text:p>
      <text:list text:style-name="L24">
        <text:list-item>
          <text:p text:style-name="P64">solo sabe guardar, </text:p>
        </text:list-item>
        <text:list-item>
          <text:p text:style-name="P65">pero no sabe mantener su propio ecosistema de datos. </text:p>
        </text:list-item>
      </text:list>
      <text:h text:style-name="P8" text:outline-level="1"/>
      <text:h text:style-name="P5" text:outline-level="1"><text:bookmark-start text:name="__RefHeading___Toc993_2796764550"/><text:span text:style-name="T3">R</text:span>ecomendación de Arquitectura Técnica<text:bookmark-end text:name="__RefHeading___Toc993_2796764550"/></text:h>
      <text:p text:style-name="Text_20_body">Desde el punto de vista de diseño, esta funcionalidad no debería implementarse de forma improvisada dentro del <text:span text:style-name="Source_20_Text">main</text:span>.</text:p>
      <text:p text:style-name="Text_20_body">Lo recomendable es que exista una capa o clase responsable de las tareas de mantenimiento interno.</text:p>
      <text:h text:style-name="Heading_20_2" text:outline-level="2"><text:bookmark-start text:name="__RefHeading___Toc995_2796764550"/><text:s/>Posibles nombres recomendados<text:bookmark-end text:name="__RefHeading___Toc995_2796764550"/></text:h>
      <text:p text:style-name="P43"><text:bookmark text:name="code-block-viewer Copia 3"/>GestorMantenimiento</text:p>
      <text:p text:style-name="P66"><text:span text:style-name="T4">o</text:span></text:p>
      <text:p text:style-name="P43"><text:bookmark text:name="code-block-viewer Copia 4"/>AdministradorSistemaLocal</text:p>
      <text:p text:style-name="Text_20_body"><text:bookmark-start text:name="__RefHeading___Toc997_2796764550"/><text:span text:style-name="T5">Responsabilidades sugeridas</text:span><text:bookmark-end text:name="__RefHeading___Toc997_2796764550"/></text:p>
      <text:list text:style-name="L25">
        <text:list-item>
          <text:p text:style-name="P67">localizar el directorio de datos de Habitly </text:p>
        </text:list-item>
        <text:list-item>
          <text:p text:style-name="P67">comprobar qué archivos existen </text:p>
        </text:list-item>
        <text:list-item>
          <text:p text:style-name="P67">borrar archivos permitidos </text:p>
        </text:list-item>
        <text:list-item>
          <text:p text:style-name="P67">confirmar estados de limpieza </text:p>
        </text:list-item>
        <text:list-item>
          <text:p text:style-name="P68">devolver mensajes de resultado </text:p>
        </text:list-item>
      </text:list>
      <text:p text:style-name="Text_20_body">Esto evita mezclar lógica de sistema con lógica de negocio.</text:p>
      <text:h text:style-name="P8" text:outline-level="1"/>
      <text:h text:style-name="P5" text:outline-level="1"><text:bookmark-start text:name="__RefHeading___Toc999_2796764550"/>Flujo Técnico Esperado<text:bookmark-end text:name="__RefHeading___Toc999_2796764550"/></text:h>
      <text:p text:style-name="Text_20_body">A nivel interno, la funcionalidad debería seguir esta lógica general:</text:p>
      <text:h text:style-name="Heading_20_2" text:outline-level="2"><text:bookmark-start text:name="__RefHeading___Toc1001_2796764550"/><text:s/>Fase 1 — Verificación<text:bookmark-end text:name="__RefHeading___Toc1001_2796764550"/></text:h>
      <text:list xml:id="list3619151835" text:style-name="L26">
        <text:list-item>
          <text:p text:style-name="P69">localizar la carpeta de datos </text:p>
        </text:list-item>
        <text:list-item>
          <text:p text:style-name="P70">comprobar si existen archivos o subdirectorios relevantes </text:p>
        </text:list-item>
      </text:list>
      <text:h text:style-name="Heading_20_2" text:outline-level="2"><text:bookmark-start text:name="__RefHeading___Toc1003_2796764550"/><text:s/>Fase 2 — Confirmación<text:bookmark-end text:name="__RefHeading___Toc1003_2796764550"/></text:h>
      <text:list xml:id="list120934796468395" text:continue-numbering="true" text:style-name="L26">
        <text:list-item>
          <text:p text:style-name="P69">bloquear la acción hasta obtener confirmación explícita del usuario </text:p>
        </text:list-item>
      </text:list>
      <text:h text:style-name="Heading_20_2" text:outline-level="2"><text:bookmark-start text:name="__RefHeading___Toc1207_2796764550"/><text:s/>Fase 3 — Ejecución<text:bookmark-end text:name="__RefHeading___Toc1207_2796764550"/></text:h>
      <text:list xml:id="list120934771594334" text:continue-numbering="true" text:style-name="L26">
        <text:list-item>
          <text:p text:style-name="P69">borrar solo los archivos autorizados </text:p>
        </text:list-item>
      </text:list>
      <text:h text:style-name="Heading_20_2" text:outline-level="2"><text:bookmark-start text:name="__RefHeading___Toc1209_2796764550"/><text:s/>Fase 4 — Reconstrucción controlada<text:bookmark-end text:name="__RefHeading___Toc1209_2796764550"/></text:h>
      <text:list xml:id="list120934324159028" text:continue-numbering="true" text:style-name="L26">
        <text:list-item>
          <text:p text:style-name="P69">si la app necesita estructura mínima, podrá regenerarla en el siguiente inicio </text:p>
        </text:list-item>
      </text:list>
      <text:h text:style-name="Heading_20_2" text:outline-level="2"><text:bookmark-start text:name="__RefHeading___Toc1009_2796764550"/><text:s/>Fase 5 — Feedback<text:bookmark-end text:name="__RefHeading___Toc1009_2796764550"/></text:h>
      <text:list text:continue-numbering="true" text:style-name="L26">
        <text:list-item>
          <text:p text:style-name="P69">informar claramente si la limpieza fue correcta o si hubo errores </text:p>
        </text:list-item>
      </text:list>
      <text:h text:style-name="P8" text:outline-level="1"/>
      <text:h text:style-name="P5" text:outline-level="1"><text:bookmark-start text:name="__RefHeading___Toc1011_2796764550"/>Posible Evolución Futura de la Funcionalidad<text:bookmark-end text:name="__RefHeading___Toc1011_2796764550"/></text:h>
      <text:p text:style-name="Text_20_body">Aunque la primera versión de esta herramienta puede ser simple, su diseño debería permitir crecer en el futuro.</text:p>
      <text:h text:style-name="Heading_20_2" text:outline-level="2"><text:bookmark-start text:name="__RefHeading___Toc1013_2796764550"/>Evoluciones recomendables a medio plazo<text:bookmark-end text:name="__RefHeading___Toc1013_2796764550"/></text:h>
      <text:list text:style-name="L27">
        <text:list-item>
          <text:p text:style-name="P71">borrar solo caché </text:p>
        </text:list-item>
        <text:list-item>
          <text:p text:style-name="P71">borrar solo backups </text:p>
        </text:list-item>
        <text:list-item>
          <text:p text:style-name="P71">borrar solo logs </text:p>
        </text:list-item>
        <text:list-item>
          <text:p text:style-name="P71">restaurar configuración por defecto </text:p>
        </text:list-item>
        <text:list-item>
          <text:p text:style-name="P71">reinicio completo de Habitly </text:p>
        </text:list-item>
        <text:list-item>
          <text:p text:style-name="P72">limpieza con exportación previa opcional </text:p>
        </text:list-item>
      </text:list>
      <text:p text:style-name="Text_20_body">Esto permitiría pasar de una limpieza “todo o nada” a una administración más precisa.</text:p>
      <text:h text:style-name="P8" text:outline-level="1"/>
      <text:h text:style-name="P5" text:outline-level="1"><text:bookmark-start text:name="__RefHeading___Toc1015_2796764550"/>Requisitos Funcionales Asociados<text:bookmark-end text:name="__RefHeading___Toc1015_2796764550"/></text:h>
      <text:p text:style-name="Text_20_body">Para considerar correctamente implementada esta mejora, Habitly deberá cumplir los siguientes requisitos:</text:p>
      <text:h text:style-name="Heading_20_2" text:outline-level="2"><text:bookmark-start text:name="__RefHeading___Toc1017_2796764550"/><text:s/>RF-III.1<text:bookmark-end text:name="__RefHeading___Toc1017_2796764550"/></text:h>
      <text:p text:style-name="Text_20_body">El sistema deberá ofrecer una opción explícita para borrar los datos locales de aplicación.</text:p>
      <text:h text:style-name="Heading_20_2" text:outline-level="2"><text:bookmark-start text:name="__RefHeading___Toc1019_2796764550"/><text:s/>RF-III.2<text:bookmark-end text:name="__RefHeading___Toc1019_2796764550"/></text:h>
      <text:p text:style-name="Text_20_body">La operación deberá requerir confirmación reforzada por parte del usuario.</text:p>
      <text:h text:style-name="Heading_20_2" text:outline-level="2"><text:bookmark-start text:name="__RefHeading___Toc1021_2796764550"/><text:s/>RF-III.3<text:bookmark-end text:name="__RefHeading___Toc1021_2796764550"/></text:h>
      <text:p text:style-name="Text_20_body">El sistema deberá eliminar únicamente los archivos y estructuras controladas por Habitly.</text:p>
      <text:h text:style-name="Heading_20_2" text:outline-level="2"><text:bookmark-start text:name="__RefHeading___Toc1023_2796764550"/><text:s/>RF-III.4<text:bookmark-end text:name="__RefHeading___Toc1023_2796764550"/></text:h>
      <text:p text:style-name="Text_20_body">La aplicación deberá informar claramente del resultado de la operación.</text:p>
      <text:h text:style-name="Heading_20_2" text:outline-level="2"><text:bookmark-start text:name="__RefHeading___Toc1025_2796764550"/><text:s/>RF-III.5<text:bookmark-end text:name="__RefHeading___Toc1025_2796764550"/></text:h>
      <text:p text:style-name="Text_20_body">Tras la limpieza, Habitly deberá poder seguir funcionando correctamente y reconstruir su estructura básica si es necesario.</text:p>
      <text:h text:style-name="P8" text:outline-level="1"/>
      <text:h text:style-name="P5" text:outline-level="1"><text:bookmark-start text:name="__RefHeading___Toc1027_2796764550"/>Requisitos No Funcionales Asociados<text:bookmark-end text:name="__RefHeading___Toc1027_2796764550"/></text:h>
      <text:h text:style-name="Heading_20_2" text:outline-level="2"><text:bookmark-start text:name="__RefHeading___Toc1029_2796764550"/><text:s/>RNF-III.1 — Seguridad Operativa<text:bookmark-end text:name="__RefHeading___Toc1029_2796764550"/></text:h>
      <text:p text:style-name="Text_20_body">La limpieza no deberá afectar a archivos ajenos al entorno de Habitly.</text:p>
      <text:h text:style-name="Heading_20_2" text:outline-level="2"><text:bookmark-start text:name="__RefHeading___Toc1031_2796764550"/><text:s/>RNF-III.2 — Robustez<text:bookmark-end text:name="__RefHeading___Toc1031_2796764550"/></text:h>
      <text:p text:style-name="Text_20_body">La operación deberá tolerar que algunos archivos no existan o ya hayan sido eliminados.</text:p>
      <text:h text:style-name="Heading_20_2" text:outline-level="2"><text:bookmark-start text:name="__RefHeading___Toc1033_2796764550"/><text:s/>RNF-III.3 — Usabilidad<text:bookmark-end text:name="__RefHeading___Toc1033_2796764550"/></text:h>
      <text:p text:style-name="Text_20_body">El usuario deberá comprender claramente las consecuencias de la acción.</text:p>
      <text:h text:style-name="Heading_20_2" text:outline-level="2"><text:bookmark-start text:name="__RefHeading___Toc1035_2796764550"/><text:s/>RNF-III.4 — Mantenibilidad<text:bookmark-end text:name="__RefHeading___Toc1035_2796764550"/></text:h>
      <text:p text:style-name="Text_20_body">La lógica de limpieza deberá estar desacoplada del flujo principal de negocio.</text:p>
      <text:h text:style-name="Heading_20_2" text:outline-level="2"><text:bookmark-start text:name="__RefHeading___Toc1037_2796764550"/><text:s/>RNF-III.5 — Escalabilidad<text:bookmark-end text:name="__RefHeading___Toc1037_2796764550"/></text:h>
      <text:p text:style-name="Text_20_body">La solución deberá permitir ampliar el mantenimiento a otros tipos de datos en el futuro.</text:p>
      <text:h text:style-name="P8" text:outline-level="1"/>
      <text:h text:style-name="P5" text:outline-level="1"><text:bookmark-start text:name="__RefHeading___Toc1039_2796764550"/>Riesgos si No se Implementa esta Mejora<text:bookmark-end text:name="__RefHeading___Toc1039_2796764550"/></text:h>
      <text:p text:style-name="Text_20_body">Si Habitly sigue creciendo sin una funcionalidad interna de mantenimiento, pueden aparecer varios problemas:</text:p>
      <text:list text:style-name="L28">
        <text:list-item>
          <text:p text:style-name="P73">acumulación innecesaria de archivos locales, </text:p>
        </text:list-item>
        <text:list-item>
          <text:p text:style-name="P73">dificultad para reiniciar el sistema de forma limpia, </text:p>
        </text:list-item>
        <text:list-item>
          <text:p text:style-name="P73">dependencia del borrado manual, </text:p>
        </text:list-item>
        <text:list-item>
          <text:p text:style-name="P73">riesgo de errores por datos antiguos o corruptos, </text:p>
        </text:list-item>
        <text:list-item>
          <text:p text:style-name="P73">peor experiencia de soporte y pruebas, </text:p>
        </text:list-item>
        <text:list-item>
          <text:p text:style-name="P74">y falta de control sobre el ciclo de vida del almacenamiento. </text:p>
        </text:list-item>
      </text:list>
      <text:p text:style-name="Text_20_body">A largo plazo, esto se traduce en <text:span text:style-name="Strong_20_Emphasis">desorden técnico y menor profesionalidad del sistema</text:span>.</text:p>
      <text:h text:style-name="P8" text:outline-level="1"/>
      <text:h text:style-name="P5" text:outline-level="1"><text:bookmark-start text:name="__RefHeading___Toc1041_2796764550"/>Conclusión<text:bookmark-end text:name="__RefHeading___Toc1041_2796764550"/></text:h>
      <text:p text:style-name="Text_20_body">La funcionalidad <text:span text:style-name="Strong_20_Emphasis">“Borrar Datos de Aplicación”</text:span> constituye una mejora de mantenimiento altamente recomendable para la evolución de Habitly.</text:p>
      <text:p text:style-name="Text_20_body">No se trata simplemente de añadir una opción de borrado, sino de incorporar una <text:span text:style-name="Strong_20_Emphasis">política de limpieza controlada, segura y coherente con el crecimiento del proyecto</text:span>.</text:p>
      <text:p text:style-name="Text_20_body">Su implementación permitirá a Habitly:</text:p>
      <text:list text:style-name="L29">
        <text:list-item>
          <text:p text:style-name="P75">gestionar mejor su almacenamiento local, </text:p>
        </text:list-item>
        <text:list-item>
          <text:p text:style-name="P75">facilitar reinicios y pruebas, </text:p>
        </text:list-item>
        <text:list-item>
          <text:p text:style-name="P75">mejorar la higiene del sistema, </text:p>
        </text:list-item>
        <text:list-item>
          <text:p text:style-name="P75">reforzar la privacidad operativa, </text:p>
        </text:list-item>
        <text:list-item>
          <text:p text:style-name="P76">y preparar el terreno para versiones más complejas. </text:p>
        </text:list-item>
      </text:list>
      <text:p text:style-name="Text_20_body">En combinación con el <text:span text:style-name="Strong_20_Emphasis">Anexo </text:span><text:span text:style-name="Strong_20_Emphasis"><text:span text:style-name="T6">01</text:span></text:span><text:span text:style-name="Strong_20_Emphasis"> (Rutas de Sistema)</text:span> y el <text:span text:style-name="Strong_20_Emphasis">Anexo </text:span><text:span text:style-name="Strong_20_Emphasis"><text:span text:style-name="T6">02</text:span></text:span><text:span text:style-name="Strong_20_Emphasis"> (Cifrado AES)</text:span>, este anexo completa una base técnica muy sólida para la maduración de la persistencia local de Habitly de cara a la futura línea <text:span text:style-name="Strong_20_Emphasis">v1.1</text:span>.</text:p>
      <text:p text:style-name="Text_20_body"><text:span text:style-name="Strong_20_Emphasis"/></text:p>
      <text:p text:style-name="P7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styles>
    <draw:fill-image draw:name="Portada_5f_Anexo_5f_03_5f_Gestion_5f_Mantenimiento_5f_y_5f_Limpieza_5f_Cache_5f_Habitly" draw:display-name="Portada_Anexo_03_Gestion_Mantenimiento_y_Limpieza_Cache_Habitly" xlink:href="Pictures/10000000000009B200000DB53330D3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75cm" style:auto-text-indent="false" style:page-number="auto">
        <style:tab-stops/>
      </style:paragraph-properties>
      <style:text-properties style:font-name="Arial3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6cm" fo:margin-right="0.3cm" fo:margin-top="0cm" fo:margin-bottom="0.247cm" style:contextual-spacing="false" fo:line-height="115%" style:page-number="auto"/>
      <style:text-properties fo:text-transform="uppercase" fo:color="#000080" loext:opacity="100%" style:font-name="Verdana" fo:font-family="Verdana" style:font-style-name="Negrita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349cm" fo:margin-right="0.15cm" fo:margin-top="0cm" fo:margin-bottom="0.247cm" style:contextual-spacing="false" fo:line-height="115%"/>
      <style:text-properties fo:color="#000080" loext:opacity="100%" style:font-name="Verdana" fo:font-family="Verdana" style:font-style-name="Negrita" style:font-family-generic="swiss" style:font-pitch="variable" fo:font-size="14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.349cm" fo:margin-right="0.15cm" fo:margin-top="0.247cm" fo:margin-bottom="0.212cm" style:contextual-spacing="false" style:page-number="auto"/>
      <style:text-properties fo:color="#000080" loext:opacity="100%" style:font-name="Verdana" fo:font-family="Verdana" style:font-style-name="Negrita" style:font-family-generic="swiss" style:font-pitch="variable" fo:font-size="13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ítulo_20_General" style:display-name="Título General" style:family="paragraph" style:parent-style-name="Heading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1_20_Cont." style:display-name="List 1 Cont." style:family="paragraph" style:parent-style-name="List" style:list-style-name="List_20_2" style:class="list" style:master-page-name="">
      <style:paragraph-properties fo:margin-top="0cm" fo:margin-bottom="0.212cm" style:contextual-spacing="false" style:page-number="auto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style:font-name="Arial3" fo:font-family="Arial" style:font-style-name="Normal" style:font-family-generic="swiss" style:font-pitch="variable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a_5f_Guion_5f_Habitly" style:display-name="Lista_Guion_Habitly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officeooo:rsid="009b3bce" officeooo:paragraph-rsid="009b3bce"/>
    </style:style>
    <style:style style:name="MT1" style:family="text">
      <style:text-properties officeooo:rsid="00b8b413"/>
    </style:style>
    <style:style style:name="MT2" style:family="text">
      <style:text-properties style:font-name="Arial1" officeooo:rsid="00285030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4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rtada_5f_Anexo_5f_03_5f_Gestion_5f_Mantenimiento_5f_y_5f_Limpieza_5f_Cache_5f_Habitly" draw:fill-image-width="100%" draw:fill-image-height="100%" style:repeat="no-repeat" draw:fill-image-ref-point="center" style:footnote-max-height="0cm" loext:margin-gutter="0cm">
        <style:background-image xlink:href="Pictures/10000000000009B200000DB53330D3AC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a_5f_Anexo_5f_03_5f_Gestion_5f_Mantenimiento_5f_y_5f_Limpieza_5f_Cache_5f_Habitly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Anexo 0<text:span text:style-name="MT1">3</text:span> – v1.0.<text:span text:style-name="MT1">1A</text:span></text:p>
      </style:header>
      <style:footer>
        <text:p text:style-name="Footer"><text:tab/><text:span text:style-name="MT2">Página </text:span><text:span text:style-name="MT2"><text:page-number text:select-page="current">29</text:page-number></text:span><text:span text:style-name="MT2"><text:s/>de </text:span><text:span text:style-name="MT2"><text:page-count>29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0:08:53.820272000</meta:creation-date>
    <dc:date>2026-04-03T12:09:34.144965200</dc:date>
    <meta:editing-duration>PT4H40M51S</meta:editing-duration>
    <meta:editing-cycles>198</meta:editing-cycles>
    <meta:generator>LibreOffice/25.8.5.2$Windows_X86_64 LibreOffice_project/9c8b85f387cc00a89945a79c9e6239f32e450ac2</meta:generator>
    <meta:print-date>2026-04-02T12:03:24.038836500</meta:print-date>
    <meta:printed-by>Archivos PDF</meta:printed-by>
    <meta:document-statistic meta:table-count="0" meta:image-count="0" meta:object-count="0" meta:page-count="29" meta:paragraph-count="363" meta:word-count="2593" meta:character-count="16610" meta:non-whitespace-character-count="14361"/>
  </office:meta>
</office:document-meta>
</file>